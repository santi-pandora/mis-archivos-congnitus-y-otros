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66000000B386494609.png" manifest:media-type="image/png"/>
  <manifest:file-entry manifest:full-path="Pictures/1000000100000723000001546A8D58D8.png" manifest:media-type="image/png"/>
  <manifest:file-entry manifest:full-path="Pictures/1000000100000718000000AE2B31332D.png" manifest:media-type="image/png"/>
  <manifest:file-entry manifest:full-path="Pictures/100000010000047C0000005DE0DF2048.png" manifest:media-type="image/png"/>
  <manifest:file-entry manifest:full-path="Pictures/10000001000006F5000001D1302811AD.png" manifest:media-type="image/png"/>
  <manifest:file-entry manifest:full-path="Pictures/1000000100000721000003C1BE9D8C88.png" manifest:media-type="image/png"/>
  <manifest:file-entry manifest:full-path="Pictures/1000000100000499000001AF314DB951.png" manifest:media-type="image/png"/>
  <manifest:file-entry manifest:full-path="Pictures/1000000100000476000002A33D58AE8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adornments="Negrita Cursiva" style:font-family-generic="roman" style:font-pitch="variable"/>
    <style:font-face style:name="Times New Roman1" svg:font-family="'Times New Roman'" style:font-adornments="Normal" style:font-family-generic="roman" style:font-pitch="variable"/>
  </office:font-face-decls>
  <office:automatic-styles>
    <style:style style:name="P1" style:family="paragraph" style:parent-style-name="Footer">
      <style:text-properties fo:language="es" fo:country="CO"/>
    </style:style>
    <style:style style:name="P2" style:family="paragraph" style:parent-style-name="N1_20_APA">
      <style:text-properties fo:language="es" fo:country="CO"/>
    </style:style>
    <style:style style:name="P3" style:family="paragraph" style:parent-style-name="ParrafoAPA">
      <style:text-properties fo:font-size="14pt" fo:language="es" fo:country="CO" style:font-size-asian="14pt" style:font-size-complex="14pt"/>
    </style:style>
    <style:style style:name="P4" style:family="paragraph" style:parent-style-name="ParrafoAPA">
      <style:text-properties fo:font-size="14pt" fo:language="es" fo:country="CO" officeooo:rsid="002a3df2" officeooo:paragraph-rsid="002a3df2" style:font-size-asian="14pt" style:font-size-complex="14pt"/>
    </style:style>
    <style:style style:name="P5" style:family="paragraph" style:parent-style-name="ParrafoAPA">
      <style:paragraph-properties fo:text-indent="0in" style:auto-text-indent="false"/>
      <style:text-properties fo:font-size="14pt" fo:language="es" fo:country="CO" officeooo:rsid="002a3df2" officeooo:paragraph-rsid="002a3df2" style:font-size-asian="14pt" style:font-size-complex="14pt"/>
    </style:style>
    <style:style style:name="P6" style:family="paragraph" style:parent-style-name="ParrafoAPA">
      <style:paragraph-properties fo:text-indent="0in" style:auto-text-indent="false"/>
      <style:text-properties fo:font-size="14pt" fo:language="es" fo:country="CO" style:font-size-asian="14pt" style:font-size-complex="14pt"/>
    </style:style>
    <style:style style:name="P7" style:family="paragraph" style:parent-style-name="ParrafoAPA">
      <style:paragraph-properties fo:text-align="center" style:justify-single-word="false"/>
      <style:text-properties fo:font-size="14pt" fo:language="es" fo:country="CO" style:font-size-asian="14pt" style:font-size-complex="14pt"/>
    </style:style>
    <style:style style:name="P8" style:family="paragraph" style:parent-style-name="ParrafoAPA">
      <style:paragraph-properties fo:text-align="center" style:justify-single-word="false" fo:text-indent="0in" style:auto-text-indent="false"/>
      <style:text-properties fo:font-size="14pt" fo:language="es" fo:country="CO" style:font-size-asian="14pt" style:font-size-complex="14pt"/>
    </style:style>
    <style:style style:name="P9" style:family="paragraph" style:parent-style-name="ParrafoAPA">
      <style:text-properties fo:font-size="14pt" fo:language="es" fo:country="CO" officeooo:rsid="002c262b" officeooo:paragraph-rsid="002c262b" style:font-size-asian="14pt" style:font-size-complex="14pt"/>
    </style:style>
    <style:style style:name="P10" style:family="paragraph" style:parent-style-name="ParrafoAPA">
      <style:paragraph-properties fo:text-indent="0in" style:auto-text-indent="false"/>
      <style:text-properties fo:font-size="14pt" fo:language="es" fo:country="CO" officeooo:rsid="00321d2e" officeooo:paragraph-rsid="00321d2e" style:font-size-asian="14pt" style:font-size-complex="14pt"/>
    </style:style>
    <style:style style:name="P11" style:family="paragraph" style:parent-style-name="ParrafoAPA">
      <style:paragraph-properties fo:text-indent="0in" style:auto-text-indent="false"/>
      <style:text-properties fo:font-size="14pt" fo:language="es" fo:country="CO" officeooo:rsid="00331396" officeooo:paragraph-rsid="00331396" style:font-size-asian="14pt" style:font-size-complex="14pt"/>
    </style:style>
    <style:style style:name="P12" style:family="paragraph" style:parent-style-name="ParrafoAPA">
      <style:text-properties fo:font-size="14pt" fo:language="es" fo:country="CO" officeooo:paragraph-rsid="00348762" style:font-size-asian="14pt" style:font-size-complex="14pt"/>
    </style:style>
    <style:style style:name="P13" style:family="paragraph" style:parent-style-name="ParrafoAPA">
      <style:paragraph-properties fo:text-indent="0in" style:auto-text-indent="false"/>
      <style:text-properties fo:font-size="14pt" fo:language="es" fo:country="CO" officeooo:paragraph-rsid="004885f3" style:font-size-asian="14pt" style:font-size-complex="14pt"/>
    </style:style>
    <style:style style:name="P14" style:family="paragraph" style:parent-style-name="ParrafoAPA">
      <style:paragraph-properties fo:text-indent="0in" style:auto-text-indent="false"/>
      <style:text-properties fo:font-size="14pt" fo:language="es" fo:country="CO" officeooo:paragraph-rsid="0049c3c5" style:font-size-asian="14pt" style:font-size-complex="14pt"/>
    </style:style>
    <style:style style:name="P15" style:family="paragraph" style:parent-style-name="ParrafoAPA">
      <style:paragraph-properties fo:text-indent="0in" style:auto-text-indent="false"/>
      <style:text-properties fo:font-size="14pt" fo:language="es" fo:country="CO" officeooo:paragraph-rsid="002c262b" style:font-size-asian="14pt" style:font-size-complex="14pt"/>
    </style:style>
    <style:style style:name="P16" style:family="paragraph" style:parent-style-name="ParrafoAPA">
      <style:paragraph-properties fo:text-indent="0in" style:auto-text-indent="false"/>
      <style:text-properties fo:font-size="14pt" fo:language="es" fo:country="CO" officeooo:rsid="004f1a12" officeooo:paragraph-rsid="004f1a12" style:font-size-asian="14pt" style:font-size-complex="14pt"/>
    </style:style>
    <style:style style:name="P17" style:family="paragraph" style:parent-style-name="ParrafoAPA">
      <style:paragraph-properties fo:text-indent="0in" style:auto-text-indent="false"/>
      <style:text-properties fo:font-size="14pt" fo:language="es" fo:country="CO" officeooo:rsid="004fa52c" officeooo:paragraph-rsid="004fa52c" style:font-size-asian="14pt" style:font-size-complex="14pt"/>
    </style:style>
    <style:style style:name="P18" style:family="paragraph" style:parent-style-name="ParrafoAPA">
      <style:paragraph-properties fo:text-indent="0in" style:auto-text-indent="false"/>
      <style:text-properties fo:font-size="14pt" fo:language="es" fo:country="CO" officeooo:rsid="004fde14" officeooo:paragraph-rsid="004fde14" style:font-size-asian="14pt" style:font-size-complex="14pt"/>
    </style:style>
    <style:style style:name="P19" style:family="paragraph" style:parent-style-name="ParrafoAPA">
      <style:paragraph-properties fo:text-indent="0in" style:auto-text-indent="false"/>
      <style:text-properties fo:font-size="14pt" fo:language="es" fo:country="CO" officeooo:paragraph-rsid="0052bc33" style:font-size-asian="14pt" style:font-size-complex="14pt"/>
    </style:style>
    <style:style style:name="P20" style:family="paragraph" style:parent-style-name="ParrafoAPA">
      <style:text-properties fo:font-size="14pt" fo:language="es" fo:country="CO" fo:font-weight="bold" style:font-size-asian="14pt" style:font-weight-asian="bold" style:font-size-complex="14pt" style:font-weight-complex="bold"/>
    </style:style>
    <style:style style:name="P21" style:family="paragraph" style:parent-style-name="ParrafoAPA">
      <style:text-properties fo:font-size="14pt" fo:language="es" fo:country="CO" fo:font-weight="normal" officeooo:rsid="002e3144" officeooo:paragraph-rsid="002e3144" style:font-size-asian="14pt" style:font-weight-asian="normal" style:font-size-complex="14pt" style:font-weight-complex="normal"/>
    </style:style>
    <style:style style:name="P22" style:family="paragraph" style:parent-style-name="ParrafoAPA">
      <style:paragraph-properties fo:text-indent="0in" style:auto-text-indent="false"/>
      <style:text-properties officeooo:rsid="004c46ec" officeooo:paragraph-rsid="004c46ec"/>
    </style:style>
    <style:style style:name="P23" style:family="paragraph" style:parent-style-name="ParrafoAPA">
      <style:text-properties officeooo:rsid="004c46ec" officeooo:paragraph-rsid="004c46ec"/>
    </style:style>
    <style:style style:name="P24" style:family="paragraph" style:parent-style-name="CitaBloque1" style:list-style-name="L1">
      <style:text-properties fo:font-size="14pt" fo:language="es" fo:country="CO" fo:font-weight="bold" style:font-size-asian="14pt" style:font-weight-asian="bold" style:font-size-complex="14pt" style:font-weight-complex="bold"/>
    </style:style>
    <style:style style:name="P25" style:family="paragraph" style:parent-style-name="ParrafoAPA" style:list-style-name="L2">
      <style:text-properties fo:font-size="14pt" fo:language="es" fo:country="CO" officeooo:paragraph-rsid="00261d53" style:font-size-asian="14pt" style:font-size-complex="14pt"/>
    </style:style>
    <style:style style:name="P26" style:family="paragraph" style:parent-style-name="ParrafoAPA" style:list-style-name="L4">
      <style:paragraph-properties fo:text-indent="0in" style:auto-text-indent="false"/>
      <style:text-properties fo:font-size="14pt" fo:language="es" fo:country="CO" officeooo:rsid="004c46ec" officeooo:paragraph-rsid="004c46ec" style:font-size-asian="14pt" style:font-size-complex="14pt"/>
    </style:style>
    <style:style style:name="P27" style:family="paragraph" style:parent-style-name="ParrafoAPA">
      <style:paragraph-properties fo:text-indent="0in" style:auto-text-indent="false"/>
      <style:text-properties fo:font-size="14pt" fo:language="es" fo:country="CO" officeooo:rsid="0052bc33" officeooo:paragraph-rsid="0052bc33" style:font-size-asian="14pt" style:font-size-complex="14pt"/>
    </style:style>
    <style:style style:name="P28" style:family="paragraph" style:parent-style-name="ParrafoAPA" style:list-style-name="L5">
      <style:paragraph-properties fo:text-align="start" style:justify-single-word="false"/>
      <style:text-properties fo:font-size="14pt" fo:language="es" fo:country="CO" fo:font-weight="bold" officeooo:rsid="002837f7" officeooo:paragraph-rsid="002837f7" style:font-size-asian="14pt" style:font-weight-asian="bold" style:font-size-complex="14pt" style:font-weight-complex="bold"/>
    </style:style>
    <style:style style:name="P29" style:family="paragraph" style:parent-style-name="ParrafoAPA" style:list-style-name="L6">
      <style:text-properties fo:font-size="14pt" fo:language="es" fo:country="CO" fo:font-weight="bold" officeooo:rsid="002e3144" officeooo:paragraph-rsid="002e3144" style:font-size-asian="14pt" style:font-weight-asian="bold" style:font-size-complex="14pt" style:font-weight-complex="bold"/>
    </style:style>
    <style:style style:name="P30" style:family="paragraph" style:parent-style-name="ParrafoAPA" style:list-style-name="L6">
      <style:text-properties fo:font-size="14pt" fo:language="es" fo:country="CO" fo:font-weight="normal" officeooo:rsid="002e3144" officeooo:paragraph-rsid="002e3144" style:font-size-asian="14pt" style:font-weight-asian="normal" style:font-size-complex="14pt" style:font-weight-complex="normal"/>
    </style:style>
    <style:style style:name="P31" style:family="paragraph" style:parent-style-name="ParrafoAPA" style:list-style-name="L3">
      <style:paragraph-properties fo:text-indent="0in" style:auto-text-indent="false"/>
      <style:text-properties officeooo:paragraph-rsid="0049c3c5"/>
    </style:style>
    <style:style style:name="P32" style:family="paragraph" style:parent-style-name="ParrafoAPA" style:list-style-name="L4">
      <style:text-properties officeooo:paragraph-rsid="0049c3c5"/>
    </style:style>
    <style:style style:name="T1" style:family="text">
      <style:text-properties officeooo:rsid="00028251"/>
    </style:style>
    <style:style style:name="T2" style:family="text">
      <style:text-properties officeooo:rsid="00047419"/>
    </style:style>
    <style:style style:name="T3" style:family="text">
      <style:text-properties officeooo:rsid="000a2b42"/>
    </style:style>
    <style:style style:name="T4" style:family="text">
      <style:text-properties officeooo:rsid="001d23bc"/>
    </style:style>
    <style:style style:name="T5" style:family="text">
      <style:text-properties officeooo:rsid="001d5e7a"/>
    </style:style>
    <style:style style:name="T6" style:family="text">
      <style:text-properties officeooo:rsid="001e9fc2"/>
    </style:style>
    <style:style style:name="T7" style:family="text">
      <style:text-properties officeooo:rsid="001f9464"/>
    </style:style>
    <style:style style:name="T8" style:family="text">
      <style:text-properties officeooo:rsid="0021b94f"/>
    </style:style>
    <style:style style:name="T9" style:family="text">
      <style:text-properties officeooo:rsid="00256e4d"/>
    </style:style>
    <style:style style:name="T10" style:family="text">
      <style:text-properties officeooo:rsid="00260f50"/>
    </style:style>
    <style:style style:name="T11" style:family="text">
      <style:text-properties officeooo:rsid="00261d53"/>
    </style:style>
    <style:style style:name="T12" style:family="text">
      <style:text-properties fo:font-weight="bold" style:font-weight-asian="bold" style:font-weight-complex="bold"/>
    </style:style>
    <style:style style:name="T13" style:family="text">
      <style:text-properties fo:font-weight="bold" officeooo:rsid="0015ecd5" style:font-weight-asian="bold" style:font-weight-complex="bold"/>
    </style:style>
    <style:style style:name="T14" style:family="text">
      <style:text-properties fo:font-weight="bold" officeooo:rsid="003fb65e" style:font-weight-asian="bold" style:font-weight-complex="bold"/>
    </style:style>
    <style:style style:name="T15" style:family="text">
      <style:text-properties officeooo:rsid="002a3df2"/>
    </style:style>
    <style:style style:name="T16" style:family="text">
      <style:text-properties officeooo:rsid="002b40b7"/>
    </style:style>
    <style:style style:name="T17" style:family="text">
      <style:text-properties officeooo:rsid="002e3144"/>
    </style:style>
    <style:style style:name="T18" style:family="text">
      <style:text-properties officeooo:rsid="002f0648"/>
    </style:style>
    <style:style style:name="T19" style:family="text">
      <style:text-properties officeooo:rsid="00310569"/>
    </style:style>
    <style:style style:name="T20" style:family="text">
      <style:text-properties officeooo:rsid="004178b7"/>
    </style:style>
    <style:style style:name="T21" style:family="text">
      <style:text-properties officeooo:rsid="00434cbe"/>
    </style:style>
    <style:style style:name="T22" style:family="text">
      <style:text-properties officeooo:rsid="00443d81"/>
    </style:style>
    <style:style style:name="T23" style:family="text">
      <style:text-properties officeooo:rsid="0046bad8"/>
    </style:style>
    <style:style style:name="T24" style:family="text">
      <style:text-properties officeooo:rsid="004885f3"/>
    </style:style>
    <style:style style:name="T25" style:family="text">
      <style:text-properties fo:font-size="14pt" fo:language="es" fo:country="CO" style:font-size-asian="14pt" style:font-size-complex="14pt"/>
    </style:style>
    <style:style style:name="T26" style:family="text">
      <style:text-properties fo:font-size="14pt" fo:language="es" fo:country="CO" officeooo:rsid="004885f3" style:font-size-asian="14pt" style:font-size-complex="14pt"/>
    </style:style>
    <style:style style:name="T27" style:family="text">
      <style:text-properties fo:font-size="14pt" fo:language="es" fo:country="CO" officeooo:rsid="00499db6" style:font-size-asian="14pt" style:font-size-complex="14pt"/>
    </style:style>
    <style:style style:name="T28" style:family="text">
      <style:text-properties fo:font-size="14pt" fo:language="es" fo:country="CO" officeooo:rsid="0049c3c5" style:font-size-asian="14pt" style:font-size-complex="14pt"/>
    </style:style>
    <style:style style:name="T29" style:family="text">
      <style:text-properties fo:font-size="14pt" fo:language="es" fo:country="CO" officeooo:rsid="004ae4c4" style:font-size-asian="14pt" style:font-size-complex="14pt"/>
    </style:style>
    <style:style style:name="T30" style:family="text">
      <style:text-properties fo:font-size="14pt" fo:language="es" fo:country="CO" officeooo:rsid="004c46ec" style:font-size-asian="14pt" style:font-size-complex="14pt"/>
    </style:style>
    <style:style style:name="T31" style:family="text">
      <style:text-properties officeooo:rsid="004c46ec"/>
    </style:style>
    <style:style style:name="T32" style:family="text">
      <style:text-properties officeooo:rsid="004d2df0"/>
    </style:style>
    <style:style style:name="T33" style:family="text">
      <style:text-properties officeooo:rsid="004f1a12"/>
    </style:style>
    <style:style style:name="T34" style:family="text">
      <style:text-properties officeooo:rsid="004fa52c"/>
    </style:style>
    <style:style style:name="T35" style:family="text">
      <style:text-properties officeooo:rsid="004fde14"/>
    </style:style>
    <style:style style:name="T36" style:family="text">
      <style:text-properties officeooo:rsid="00539d77"/>
    </style:style>
    <style:style style:name="T37" style:family="text">
      <style:text-properties officeooo:rsid="0054ef49"/>
    </style:style>
    <style:style style:name="T38" style:family="text">
      <style:text-properties officeooo:rsid="0056ee5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Informe sobre mi actividad frontend estruct<text:span text:style-name="T3">u</text:span>rado<text:span text:style-name="T3">(maquetación)</text:span></text:p>
      <text:p text:style-name="P3"/>
      <text:p text:style-name="P3"/>
      <text:p text:style-name="P3"/>
      <text:p text:style-name="P3"/>
      <text:p text:style-name="P3">Nombre: Santiago Rojas Rodríguez</text:p>
      <text:p text:style-name="P3"/>
      <text:p text:style-name="P4"/>
      <text:p text:style-name="P3"/>
      <text:p text:style-name="P3"/>
      <text:p text:style-name="P3"/>
      <text:p text:style-name="P3"><text:span text:style-name="T11">P</text:span>resentado a: jefe Pablo Velasquez</text:p>
      <text:p text:style-name="P3"><text:s/></text:p>
      <text:p text:style-name="P3"/>
      <text:p text:style-name="P3"/>
      <text:p text:style-name="P6"/>
      <text:p text:style-name="P6"><text:span text:style-name="T11"><text:tab/>A</text:span>ño: 2025</text:p>
      <text:p text:style-name="P3"/>
      <text:p text:style-name="P3"/>
      <text:p text:style-name="P3"/>
      <text:p text:style-name="P3"/>
      <text:p text:style-name="P3"/>
      <text:p text:style-name="P8"><text:soft-page-break/><text:span text:style-name="T14">I</text:span><text:span text:style-name="T12">ntroducción</text:span></text:p>
      <text:p text:style-name="P3"/>
      <text:p text:style-name="P3"/>
      <text:p text:style-name="P6">A continuación se pr<text:span text:style-name="T2">e</text:span>sent<text:span text:style-name="T1">a</text:span>ra<text:span text:style-name="T1"> </text:span>en este documento <text:span text:style-name="T4">imágenes comparando partes del la imagen traída desde canvas con la pa</text:span><text:span text:style-name="T15">g</text:span><text:span text:style-name="T4">ina web construida en weweb con el propósito d</text:span><text:span text:style-name="T20">e mirar los cambios necesarios dete</text:span><text:span text:style-name="T21">c</text:span><text:span text:style-name="T20">tados en el informe anterior, y que se revisaran qui en este informe para </text:span><text:span text:style-name="T22">v</text:span><text:span text:style-name="T20">er la paridad de la pagina web con la imagen</text:span><text:span text:style-name="T4">.</text:span></text:p>
      <text:p text:style-name="P3"/>
      <text:p text:style-name="P3"/>
      <text:p text:style-name="P3"/>
      <text:p text:style-name="P3"/>
      <text:p text:style-name="P3"/>
      <text:p text:style-name="P3"/>
      <text:p text:style-name="P3"/>
      <text:p text:style-name="P3"/>
      <text:p text:style-name="P3"/>
      <text:p text:style-name="P3"/>
      <text:p text:style-name="P3"/>
      <text:h text:style-name="P2" text:outline-level="1"/>
      <text:h text:style-name="P2" text:outline-level="1"/>
      <text:h text:style-name="P2" text:outline-level="1"/>
      <text:h text:style-name="P2" text:outline-level="1"/>
      <text:h text:style-name="P2" text:outline-level="1"><text:soft-page-break/></text:h>
      <text:h text:style-name="P2" text:outline-level="1"/>
      <text:h text:style-name="P2" text:outline-level="1">Desarrollo</text:h>
      <text:p text:style-name="P3"/>
      <text:p text:style-name="P3"><text:span text:style-name="T9">N</text:span>ombre de la actividad: <text:s/><text:span text:style-name="T2">Tracking Numbers</text:span></text:p>
      <text:p text:style-name="P3"/>
      <text:p text:style-name="P3"><text:span text:style-name="T9">P</text:span>ara realizar la comparación <text:s/><text:span text:style-name="T5">se tomara como punto de partida las siguien</text:span><text:span text:style-name="T16">t</text:span><text:span text:style-name="T5">es <text:s text:c="3"/><text:tab/>imágenes:</text:span></text:p>
      <text:p text:style-name="P3"/>
      <text:p text:style-name="P3"><text:s/>la imagen del canvas</text:p>
      <text:p text:style-name="P3"><draw:frame draw:style-name="fr4" draw:name="Image4" text:anchor-type="char" svg:width="6.6929in" svg:height="3.9555in" draw:z-index="0"><draw:image xlink:href="Pictures/1000000100000476000002A33D58AE8D.png" xlink:type="simple" xlink:show="embed" xlink:actuate="onLoad" draw:mime-type="image/png"/></draw:frame></text:p>
      <text:p text:style-name="P3"/>
      <text:p text:style-name="P3">y la image<text:span text:style-name="T15">n</text:span> <text:span text:style-name="T6">del resultado final </text:span><text:span text:style-name="T7">hasta ahora</text:span></text:p>
      <text:p text:style-name="P3"><draw:frame draw:style-name="fr1" draw:name="Imagen5" text:anchor-type="char" svg:width="6.6929in" svg:height="3.5244in" draw:z-index="2"><draw:image xlink:href="Pictures/1000000100000721000003C1BE9D8C88.png" xlink:type="simple" xlink:show="embed" xlink:actuate="onLoad" draw:mime-type="image/png"/></draw:frame><text:soft-page-break/></text:p>
      <text:p text:style-name="P3"/>
      <text:p text:style-name="P3"><text:span text:style-name="T9">A</text:span>hora se comenzara con la comparación de componente por componente. </text:p>
      <text:p text:style-name="P3"/>
      <text:p text:style-name="P3"><text:span text:style-name="T9">C</text:span>ome<text:span text:style-name="T9">n</text:span>zaremo<text:span text:style-name="T8">s</text:span> c<text:span text:style-name="T8">o</text:span>n el header:</text:p>
      <text:list text:style-name="L1">
        <text:list-item>
          <text:p text:style-name="P24">header:</text:p>
        </text:list-item>
      </text:list>
      <text:list text:style-name="L2">
        <text:list-header>
          <text:p text:style-name="P25">header imagen en canvas</text:p>
        </text:list-header>
      </text:list>
      <text:p text:style-name="P3"><draw:frame draw:style-name="fr2" draw:name="Image1" text:anchor-type="char" svg:width="6.6929in" svg:height="0.5417in" draw:z-index="1"><draw:image xlink:href="Pictures/100000010000047C0000005DE0DF2048.png" xlink:type="simple" xlink:show="embed" xlink:actuate="onLoad" draw:mime-type="image/png"/></draw:frame></text:p>
      <text:p text:style-name="P3"/>
      <text:p text:style-name="P3">y aquí esta el header de la pagina web <text:s/></text:p>
      <text:p text:style-name="P3"><draw:frame draw:style-name="fr1" draw:name="Imagen6" text:anchor-type="char" svg:width="6.6929in" svg:height="0.6409in" draw:z-index="3"><draw:image xlink:href="Pictures/1000000100000718000000AE2B31332D.png" xlink:type="simple" xlink:show="embed" xlink:actuate="onLoad" draw:mime-type="image/png"/></draw:frame></text:p>
      <text:p text:style-name="P3"><text:soft-page-break/></text:p>
      <text:p text:style-name="P14"><text:s/>como podemos ver <text:span text:style-name="T23">se nota <text:s/>que ambas imágenes son prácticamente iguales ya que se tubo </text:span><text:span text:style-name="T24">en cuenta la siguiente:</text:span></text:p>
      <text:list text:style-name="L3">
        <text:list-item>
          <text:p text:style-name="P31"><text:span text:style-name="T28">T</text:span><text:span text:style-name="T26">amaño de los iconos: se reviso y comparo el tamaño de cada icono desde información hasta el de generar y exportar <text:s/>asi como el de crear; aunque </text:span><text:span text:style-name="T27">la similitud de los logos es diferente <text:s/>sobre todo la del generate labels y export ya que en weweb no hay </text:span><text:span text:style-name="T28">logos que se van exactamente igual.</text:span></text:p>
        </text:list-item>
      </text:list>
      <text:p text:style-name="P13"/>
      <text:list text:style-name="L4">
        <text:list-item>
          <text:p text:style-name="P32"><text:span text:style-name="T28">Letra y Espacios: </text:span><text:span text:style-name="T29">En el ámbito de la letra esta se dejo en el mismo tamaño que en la imagen ta</text:span><text:span text:style-name="T30">n</text:span><text:span text:style-name="T29">to en titulo como en botones <text:s/></text:span><text:span text:style-name="T30">y en cuanto a los espacios se colocaron de tal manera de que los elementos estuviera fijos unto con el main y el footer.</text:span></text:p>
          <text:p text:style-name="P26">Gracias a estos cambios la paridad entre el header de la imagen y de la pagina web realizada en weweb es el 24%.</text:p>
        </text:list-item>
      </text:list>
      <text:p text:style-name="P23"><text:span text:style-name="T25"/></text:p>
      <text:p text:style-name="P22"><text:span text:style-name="T25"/></text:p>
      <text:p text:style-name="P12"><text:span text:style-name="T31">A continuación se procederá</text:span> con el bloq<text:span text:style-name="T10">u</text:span>e main</text:p>
      <text:list text:style-name="L5">
        <text:list-item>
          <text:p text:style-name="P28">Main:</text:p>
        </text:list-item>
      </text:list>
      <text:p text:style-name="P9"/>
      <text:p text:style-name="P9">el Main de la imagen:</text:p>
      <text:p text:style-name="P9"/>
      <text:p text:style-name="P9"/>
      <text:p text:style-name="P9"><draw:frame draw:style-name="fr3" draw:name="Imagen1" text:anchor-type="char" svg:x="0in" svg:y="-0.7874in" svg:width="6.6929in" svg:height="2.4508in" draw:z-index="5"><draw:image xlink:href="Pictures/1000000100000499000001AF314DB951.png" xlink:type="simple" xlink:show="embed" xlink:actuate="onLoad" draw:mime-type="image/png"/></draw:frame><text:soft-page-break/></text:p>
      <text:p text:style-name="P9"><draw:frame draw:style-name="fr3" draw:name="Imagen2" text:anchor-type="char" svg:x="0in" svg:y="0.3161in" svg:width="6.6929in" svg:height="1.7472in" draw:z-index="4"><draw:image xlink:href="Pictures/10000001000006F5000001D1302811AD.png" xlink:type="simple" xlink:show="embed" xlink:actuate="onLoad" draw:mime-type="image/png"/></draw:frame>el Main de la pagina web:</text:p>
      <text:p text:style-name="P9"/>
      <text:p text:style-name="P9"/>
      <text:p text:style-name="P15"><text:span text:style-name="T17">Aquí se puede observar que tanto el main de la imagen y el main de la pagina web </text:span><text:span text:style-name="T19">aunque</text:span><text:span text:style-name="T18"> </text:span><text:span text:style-name="T32">están mas</text:span><text:span text:style-name="T18"> parecid</text:span><text:span text:style-name="T19">a</text:span><text:span text:style-name="T18">s;</text:span><text:span text:style-name="T17"> </text:span><text:span text:style-name="T18">pero ahí unos detalles que hace que haya una </text:span><text:span text:style-name="T19">gran diferencia entre las 2 versiones uno en la versión de pagina web, donde ahí </text:span><text:span text:style-name="T32">un</text:span><text:span text:style-name="T19"> overflow para que se puedan observar los filtros sin la necesidad del raw, para que la pagina tenga una representación congruente con la imagen del canvas; </text:span><text:span text:style-name="T32">se modifico <text:s/>el tamaño de cada celda de la tabla se pudo modificar colectivamente con el row en este se agrego una formula para cambiar el color de la tabla con </text:span><text:span text:style-name="T33">la formula if ítem mod 2</text:span></text:p>
      <text:p text:style-name="P16">color 1 y color 2, para cambiar el color de cada columna de la tabla <text:s/>según los datos tipo 1 o tpo 2.</text:p>
      <text:p text:style-name="P16"><text:soft-page-break/>en la zona del filtro se encogió los bordes de cada filtro; ademas de poner el botón y los filtros en 2 contenedores diferentes se modifico <text:s/>para asegurarse de que quedaran en lados opuestos del contenedor principal llamado filter and limit también se le agrego a ese contenedor un relleno de 44px para que <text:span text:style-name="T34">se viera con los espacios correspondientes.</text:span></text:p>
      <text:p text:style-name="P17">En los iconos correspondientes a la tabla se agrego cada imagen e icono lo mas parecido posible a los de la referencia; sin embargo el incoo de dinero no se puede cambiar el color debido a que es una imagen estática y se necesita una formula par cambiar ese color según los datos ingresados por el usuario, <text:s/><text:span text:style-name="T35">lo miso va para los números de discripancy ya que deben cambiar de color según la columna de de box value las imágenes de los iconos fueron otorgadas por un compañero que tenia conocimientos sobre la pagina web a construir, </text:span><text:span text:style-name="T38">todo estos cambios se deben realizar ciando s pase de maquetación ha formulas y direccionamiento de rutas</text:span><text:span text:style-name="T35">.</text:span></text:p>
      <text:p text:style-name="P18">Se modifico los headers y columnas de la tabla asi como el paginator de esta para que al crecer la pagina estos crecieran a ritmo de esta misma sin importar el ancho de la <text:span text:style-name="T37">zona</text:span>, esto mismo se aplico al header principal.</text:p>
      <text:p text:style-name="P18">Estos cambios efectuados permitieron que esta seccion de la pagina web <text:s/>estuviera en un nivel de compatibilidad de 48 %, por los detalles explicados anteriormente. </text:p>
      <text:p text:style-name="P18"/>
      <text:list text:style-name="L6">
        <text:list-item>
          <text:p text:style-name="P29">Footer:</text:p>
          <text:p text:style-name="P30">el footer de la imagen:</text:p>
          <text:p text:style-name="P30"><draw:frame draw:style-name="fr2" draw:name="Imagen7" text:anchor-type="char" svg:width="6.4429in" svg:height="1.0236in" draw:z-index="6"><draw:image xlink:href="Pictures/1000000100000466000000B386494609.png" xlink:type="simple" xlink:show="embed" xlink:actuate="onLoad" draw:mime-type="image/png"/></draw:frame><text:soft-page-break/></text:p>
        </text:list-item>
      </text:list>
      <text:p text:style-name="P21"/>
      <text:p text:style-name="P21"/>
      <text:p text:style-name="P21">el footer de la pagina web:</text:p>
      <text:p text:style-name="P21"><draw:frame draw:style-name="fr1" draw:name="Imagen3" text:anchor-type="char" svg:width="6.6929in" svg:height="1.2453in" draw:z-index="7"><draw:image xlink:href="Pictures/1000000100000723000001546A8D58D8.png" xlink:type="simple" xlink:show="embed" xlink:actuate="onLoad" draw:mime-type="image/png"/></draw:frame></text:p>
      <text:p text:style-name="P27">Se edito la pagina web en configuración para dejar el color base de pagina web como el de la imagen y se dejo igual ara el footer, esto dio como resultado que el footer de la pagina sea igual al de la imagen <text:s/>en un 25% del total de la pagina web.</text:p>
      <text:p text:style-name="P19"/>
      <text:p text:style-name="P10"/>
      <text:p text:style-name="P10"/>
      <text:p text:style-name="P10"/>
      <text:p text:style-name="P3"/>
      <text:p text:style-name="P3"/>
      <text:p text:style-name="P3"/>
      <text:p text:style-name="P3"/>
      <text:p text:style-name="P3"><text:soft-page-break/></text:p>
      <text:p text:style-name="P7"><text:span text:style-name="T12"/></text:p>
      <text:p text:style-name="P8"><text:span text:style-name="T12"/></text:p>
      <text:p text:style-name="P8"><text:span text:style-name="T12"/></text:p>
      <text:p text:style-name="P8"><text:span text:style-name="T12">Conc</text:span><text:span text:style-name="T13">l</text:span><text:span text:style-name="T12">usión</text:span> </text:p>
      <text:p text:style-name="P7"/>
      <text:p text:style-name="P11">El total de toda la maquetación <text:span text:style-name="T36">con los cambios que se detectaron en el primer informe </text:span><text:s/>es del 9<text:span text:style-name="T36">7</text:span>%; para poder obtener el 100% <text:span text:style-name="T36">realizar y si</text:span> es posible; <text:span text:style-name="T36"><text:s/>efectuar los cambios posibles en según las posibilidades de la aplicación para asi obtener el 100% del total de esta </text:span><text:span text:style-name="T37">zona de la pagina web</text:span><text:span text:style-name="T36">.</text:span></text:p>
      <text:p text:style-name="P11"/>
      <text:p text:style-name="P5"/>
      <text:p text:style-name="P5"/>
      <text:p text:style-name="P5"/>
      <text:p text:style-name="P5"/>
      <text:p text:style-name="P5"/>
      <text:p text:style-name="P5"/>
      <text:p text:style-name="P5"/>
      <text:p text:style-name="P5"/>
      <text:p text:style-name="P5"/>
      <text:p text:style-name="P5"/>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adornments="Negrita Cursiva" style:font-family-generic="roman" style:font-pitch="variable"/>
    <style:font-face style:name="Times New Roman1" svg:font-family="'Times New Roman'" style:font-adornments="Normal"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s" fo:country="CO"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CO"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arrafoAPA" style:family="paragraph">
      <style:paragraph-properties fo:margin-left="0in" fo:margin-right="0in" fo:line-height="200%" fo:text-indent="0.5in" style:auto-text-indent="false"/>
      <style:text-properties style:font-name="Times New Roman1" fo:font-family="'Times New Roman'" style:font-style-name="Normal" style:font-family-generic="roman" style:font-pitch="variable"/>
    </style:style>
    <style:style style:name="N1_20_APA" style:display-name="N1 APA" style:family="paragraph" style:parent-style-name="ParrafoAPA" style:default-outline-level="1" style:list-style-name="">
      <style:paragraph-properties fo:margin-left="0in" fo:margin-right="0in" fo:text-align="center" style:justify-single-word="false" fo:text-indent="0in" style:auto-text-indent="false">
        <style:tab-stops/>
      </style:paragraph-properties>
      <style:text-properties fo:font-weight="bold"/>
    </style:style>
    <style:style style:name="N2_20_APA" style:display-name="N2 APA" style:family="paragraph" style:parent-style-name="ParrafoAPA" style:default-outline-level="2" style:list-style-name="">
      <style:paragraph-properties fo:margin-left="0in" fo:margin-right="0in" fo:text-indent="0in" style:auto-text-indent="false"/>
      <style:text-properties fo:font-weight="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N3_20_APA" style:display-name="N3 APA" style:family="paragraph" style:parent-style-name="ParrafoAPA" style:next-style-name="ParrafoAPA" style:default-outline-level="3" style:list-style-name="">
      <style:paragraph-properties fo:margin-left="0in" fo:margin-right="0in" fo:text-indent="0in" style:auto-text-indent="false"/>
      <style:text-properties style:font-name="Times New Roman" fo:font-family="'Times New Roman'" style:font-style-name="Negrita Cursiva" style:font-family-generic="roman" style:font-pitch="variable" fo:font-style="italic" fo:font-weight="bold"/>
    </style:style>
    <style:style style:name="N4_20_APA" style:display-name="N4 APA" style:family="paragraph" style:parent-style-name="N3_20_APA" style:next-style-name="ParrafoAPA" style:default-outline-level="4" style:list-style-name="">
      <style:paragraph-properties fo:margin-left="0in" fo:margin-right="0in" fo:text-indent="0.5in" style:auto-text-indent="false"/>
      <style:text-properties fo:font-style="normal"/>
    </style:style>
    <style:style style:name="N5_20_APA" style:display-name="N5 APA" style:family="paragraph" style:parent-style-name="N4_20_APA" style:next-style-name="ParrafoAPA" style:default-outline-level="5" style:list-style-name="">
      <style:text-properties fo:font-style="italic"/>
    </style:style>
    <style:style style:name="CitaBloque1" style:family="paragraph" style:parent-style-name="ParrafoAPA" style:next-style-name="ParrafoAPA">
      <style:paragraph-properties fo:margin-left="0.5in" fo:margin-right="0in" fo:text-indent="0in" style:auto-text-indent="false"/>
    </style:style>
    <style:style style:name="CitaBloque2" style:family="paragraph" style:parent-style-name="CitaBloque1" style:next-style-name="ParrafoAPA">
      <style:paragraph-properties fo:margin-left="0.5in" fo:margin-right="0in" fo:text-indent="0.5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15P0" style:volatile="true">
      <number:currency-symbol number:language="en" number:country="US">$</number:currency-symbol>
      <number:number number:decimal-places="0" number:min-decimal-places="0" number:min-integer-digits="1" number:grouping="true"/>
    </number:currency-style>
    <number:currency-style style:name="N115">
      <number:text>-</number:text>
      <number:currency-symbol number:language="en" number:country="US">$</number:currency-symbol>
      <number:number number:decimal-places="0" number: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number:min-decimal-places="2" number:min-integer-digits="1" number:grouping="true"/>
    </number:currency-style>
    <number:currency-style style:name="N117">
      <number:text>-</number:text>
      <number:currency-symbol number:language="en" number:country="US">$</number:currency-symbol>
      <number:number number:decimal-places="2" number:min-decimal-places="2" number:min-integer-digits="1" number:grouping="true"/>
      <style:map style:condition="value()&gt;=0" style:apply-style-name="N117P0"/>
    </number:currency-style>
    <number:currency-style style:name="N118P0" style:volatile="true">
      <number:currency-symbol number:language="en" number:country="US">$</number:currency-symbol>
      <number:number number:decimal-places="0" number:min-decimal-places="0" number:min-integer-digits="1" number:grouping="true"/>
    </number:currency-style>
    <number:currency-style style:name="N118">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8P0"/>
    </number:currency-style>
    <number:currency-style style:name="N119P0" style:volatile="true">
      <number:currency-symbol number:language="en" number:country="US">$</number:currency-symbol>
      <number:number number:decimal-places="2" number:min-decimal-places="2" number:min-integer-digits="1" number:grouping="true"/>
    </number:currency-style>
    <number:currency-style style:name="N11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9P0"/>
    </number:currency-style>
    <number:currency-style style:name="N121P0" style:volatile="true">
      <number:currency-symbol number:language="en" number:country="US">$</number:currency-symbol>
      <number:number number:decimal-places="2" number:min-decimal-places="0" number:decimal-replacement="--" number:min-integer-digits="1" number:grouping="true"/>
    </number:currency-style>
    <number:currency-style style:name="N121">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21P0"/>
    </number:currency-style>
    <number:number-style style:name="N123P0" style:volatile="true">
      <number:number number:decimal-places="0" number:min-decimal-places="0" number:min-integer-digits="1" number:grouping="true"/>
      <number:text loext:blank-width-char=")"> </number:text>
    </number:number-style>
    <number:number-style style:name="N123">
      <number:text>(</number:text>
      <number:number number:decimal-places="0" number:min-decimal-places="0" number:min-integer-digits="1" number:grouping="true"/>
      <number:text>)</number:text>
      <style:map style:condition="value()&gt;=0" style:apply-style-name="N123P0"/>
    </number:number-style>
    <number:number-style style:name="N125P0" style:volatile="true">
      <number:number number:decimal-places="2" number:min-decimal-places="2" number:min-integer-digits="1" number:grouping="true"/>
      <number:text loext:blank-width-char=")"> </number:text>
    </number:number-style>
    <number:number-style style:name="N125">
      <number:text>(</number:text>
      <number:number number:decimal-places="2" number:min-decimal-places="2" number:min-integer-digits="1" number:grouping="true"/>
      <number:text>)</number:text>
      <style:map style:condition="value()&gt;=0" style:apply-style-name="N125P0"/>
    </number:number-style>
    <number:currency-style style:name="N127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7">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7P0"/>
    </number:currency-style>
    <number:currency-style style:name="N129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9">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9P0"/>
    </number:currency-style>
    <number:date-style style:name="N130">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3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32">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33">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4">
      <number:day number:calendar="jewish"/>
      <number:text> </number:text>
      <number:month number:calendar="jewish" number:style="long" number:textual="true"/>
      <number:text> </number:text>
      <number:year number:calendar="jewish" number:style="long"/>
    </number:date-style>
    <number:date-style style:name="N135">
      <number:month number:calendar="jewish" number:style="long" number:textual="true"/>
      <number:text> </number:text>
      <number:day number:calendar="jewish"/>
      <number:text> </number:text>
      <number:year number:calendar="jewish" number:style="long"/>
    </number:date-style>
    <number:date-style style:name="N136">
      <number:day number:calendar="jewish"/>
      <number:text> </number:text>
      <number:month number:calendar="jewish" number:style="long" number:textual="true"/>
    </number:date-style>
    <number:date-style style:name="N137">
      <number:month number:calendar="jewish" number:style="long" number:textual="true"/>
      <number:text> </number:text>
      <number:day number:calendar="jewish"/>
    </number:date-style>
    <number:date-style style:name="N138">
      <number:month number:calendar="jewish" number:style="long" number:textual="true"/>
      <number:text> </number:text>
      <number:year number:calendar="jewish" number:style="long"/>
    </number:date-style>
    <number:date-style style:name="N139">
      <number:month number:calendar="jewish" number:style="long" number:textual="true"/>
    </number:date-style>
    <number:number-style style:name="N10114" number:language="es" number:country="CO" loext:transliteration-spellout="title cardinal" number:transliteration-language="es" number:transliteration-country="CO">
      <number:number number:decimal-places="0" number:min-decimal-places="0" number:min-integer-digits="1"/>
    </number:number-style>
    <number:number-style style:name="N10115" number:language="es" number:country="CO" loext:transliteration-spellout="title USD" number:transliteration-language="es" number:transliteration-country="CO">
      <number:number number:decimal-places="0" number:min-decimal-places="0" number:min-integer-digits="1"/>
    </number:number-style>
    <number:number-style style:name="N10116" number:language="es" number:country="CO" loext:transliteration-spellout="title USD" number:transliteration-language="es" number:transliteration-country="CO">
      <number:number number:decimal-places="2" number:min-decimal-places="2" number:min-integer-digits="1"/>
    </number:number-style>
    <number:number-style style:name="N10117" number:language="es" number:country="CO" loext:transliteration-spellout="upper USD" number:transliteration-language="es" number:transliteration-country="CO">
      <number:number number:decimal-places="0" number:min-decimal-places="0" number:min-integer-digits="1"/>
    </number:number-style>
    <number:number-style style:name="N10118" number:language="es" number:country="CO" loext:transliteration-spellout="upper USD" number:transliteration-language="es" number:transliteration-country="CO">
      <number:number number:decimal-places="2" number:min-decimal-places="2" number:min-integer-digits="1"/>
    </number:number-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language="es" fo:country="CO"/>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05T11:11:05.761268365</meta:creation-date>
    <dc:date>2025-05-21T10:57:58.545150142</dc:date>
    <meta:editing-duration>PT3H39M16S</meta:editing-duration>
    <meta:editing-cycles>40</meta:editing-cycles>
    <meta:generator>LibreOffice/24.2.7.2$Linux_X86_64 LibreOffice_project/420$Build-2</meta:generator>
    <meta:print-date>2025-05-06T15:11:02.859219234</meta:print-date>
    <meta:printed-by>Archivos PDF</meta:printed-by>
    <meta:document-statistic meta:table-count="0" meta:image-count="8" meta:object-count="0" meta:page-count="9" meta:paragraph-count="39" meta:word-count="802" meta:character-count="4358" meta:non-whitespace-character-count="3575"/>
  </office:meta>
</office:document-meta>
</file>