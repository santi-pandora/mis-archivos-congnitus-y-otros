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B000000640AFE0B5C3.png" manifest:media-type="image/png"/>
  <manifest:file-entry manifest:full-path="Pictures/1000000000000640000004B08A4E8036.png" manifest:media-type="image/png"/>
  <manifest:file-entry manifest:full-path="Pictures/1000000000000384000006409EA2443E.png" manifest:media-type="image/png"/>
  <manifest:file-entry manifest:full-path="Pictures/1000000000000640000004B0C7DAF65F.png" manifest:media-type="image/png"/>
  <manifest:file-entry manifest:full-path="Pictures/1000000100000394000001920499CEED.png" manifest:media-type="image/png"/>
  <manifest:file-entry manifest:full-path="Pictures/10000001000001B10000013340A47C9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4pt" officeooo:rsid="000bf45e" officeooo:paragraph-rsid="000bf45e" style:font-size-asian="24pt" style:font-size-complex="24pt"/>
    </style:style>
    <style:style style:name="P2" style:family="paragraph" style:parent-style-name="Standard">
      <style:text-properties fo:font-size="24pt" officeooo:rsid="000c4a4e" officeooo:paragraph-rsid="000c4a4e" style:font-size-asian="24pt" style:font-size-complex="24pt"/>
    </style:style>
    <style:style style:name="P3" style:family="paragraph" style:parent-style-name="Standard">
      <style:text-properties fo:font-size="24pt" officeooo:rsid="0011e5f4" officeooo:paragraph-rsid="0011e5f4" style:font-size-asian="24pt" style:font-size-complex="24pt"/>
    </style:style>
    <style:style style:name="P4" style:family="paragraph" style:parent-style-name="Standard">
      <style:text-properties fo:font-size="24pt" officeooo:rsid="0042e6e8" officeooo:paragraph-rsid="0042e6e8" style:font-size-asian="24pt" style:font-size-complex="24pt"/>
    </style:style>
    <style:style style:name="P5" style:family="paragraph" style:parent-style-name="Standard">
      <style:text-properties fo:font-size="24pt" officeooo:rsid="003a19f8" officeooo:paragraph-rsid="003a19f8" style:font-size-asian="24pt" style:font-size-complex="24pt"/>
    </style:style>
    <style:style style:name="P6" style:family="paragraph" style:parent-style-name="Standard">
      <style:text-properties fo:font-size="24pt" officeooo:rsid="003a9d6e" officeooo:paragraph-rsid="003a9d6e" style:font-size-asian="24pt" style:font-size-complex="24pt"/>
    </style:style>
    <style:style style:name="P7" style:family="paragraph" style:parent-style-name="Standard">
      <style:text-properties fo:font-size="24pt" officeooo:rsid="003c90d5" officeooo:paragraph-rsid="003c90d5" style:font-size-asian="24pt" style:font-size-complex="24pt"/>
    </style:style>
    <style:style style:name="P8" style:family="paragraph" style:parent-style-name="Standard">
      <style:text-properties fo:font-size="24pt" officeooo:rsid="003d4fff" officeooo:paragraph-rsid="003d4fff" style:font-size-asian="24pt" style:font-size-complex="24pt"/>
    </style:style>
    <style:style style:name="P9" style:family="paragraph" style:parent-style-name="Standard">
      <style:text-properties fo:font-size="24pt" officeooo:rsid="003d4fff" officeooo:paragraph-rsid="0011e5f4" style:font-size-asian="24pt" style:font-size-complex="24pt"/>
    </style:style>
    <style:style style:name="P10" style:family="paragraph" style:parent-style-name="Standard">
      <style:text-properties fo:font-size="24pt" officeooo:rsid="001c66b8" officeooo:paragraph-rsid="00157125" style:font-size-asian="24pt" style:font-size-complex="24pt"/>
    </style:style>
    <style:style style:name="P11" style:family="paragraph" style:parent-style-name="Standard">
      <style:text-properties fo:font-size="24pt" officeooo:rsid="001c66b8" officeooo:paragraph-rsid="001c66b8" style:font-size-asian="24pt" style:font-size-complex="24pt"/>
    </style:style>
    <style:style style:name="P12" style:family="paragraph" style:parent-style-name="Standard">
      <style:text-properties fo:font-size="24pt" officeooo:rsid="001c66b8" officeooo:paragraph-rsid="001fa426" style:font-size-asian="24pt" style:font-size-complex="24pt"/>
    </style:style>
    <style:style style:name="P13" style:family="paragraph" style:parent-style-name="Standard">
      <style:text-properties fo:font-size="24pt" officeooo:rsid="004122b6" officeooo:paragraph-rsid="004122b6" style:font-size-asian="24pt" style:font-size-complex="24pt"/>
    </style:style>
    <style:style style:name="P14" style:family="paragraph" style:parent-style-name="Standard">
      <style:text-properties fo:font-size="24pt" officeooo:rsid="0041ffe0" officeooo:paragraph-rsid="0041ffe0" style:font-size-asian="24pt" style:font-size-complex="24pt"/>
    </style:style>
    <style:style style:name="P15" style:family="paragraph" style:parent-style-name="Standard">
      <style:text-properties fo:font-size="24pt" officeooo:rsid="0042dfdc" officeooo:paragraph-rsid="0042dfdc" style:font-size-asian="24pt" style:font-size-complex="24pt"/>
    </style:style>
    <style:style style:name="P16" style:family="paragraph" style:parent-style-name="Standard">
      <style:text-properties fo:font-size="24pt" officeooo:rsid="00451145" officeooo:paragraph-rsid="00451145" style:font-size-asian="24pt" style:font-size-complex="24pt"/>
    </style:style>
    <style:style style:name="P17" style:family="paragraph" style:parent-style-name="Standard">
      <style:text-properties fo:font-size="24pt" officeooo:rsid="000fa755" officeooo:paragraph-rsid="000fa755" style:font-size-asian="24pt" style:font-size-complex="24pt"/>
    </style:style>
    <style:style style:name="P18" style:family="paragraph" style:parent-style-name="Standard">
      <style:text-properties fo:font-size="24pt" officeooo:rsid="001fa426" officeooo:paragraph-rsid="000fa755" style:font-size-asian="24pt" style:font-size-complex="24pt"/>
    </style:style>
    <style:style style:name="P19" style:family="paragraph" style:parent-style-name="Standard">
      <style:text-properties fo:font-size="24pt" officeooo:rsid="001fa426" officeooo:paragraph-rsid="001fa426" style:font-size-asian="24pt" style:font-size-complex="24pt"/>
    </style:style>
    <style:style style:name="P20" style:family="paragraph" style:parent-style-name="Standard">
      <style:text-properties fo:font-size="24pt" officeooo:rsid="00157125" officeooo:paragraph-rsid="001fa426" style:font-size-asian="24pt" style:font-size-complex="24pt"/>
    </style:style>
    <style:style style:name="P21" style:family="paragraph" style:parent-style-name="Standard">
      <style:text-properties fo:font-size="24pt" officeooo:rsid="0015eb93" officeooo:paragraph-rsid="001fa426" style:font-size-asian="24pt" style:font-size-complex="24pt"/>
    </style:style>
    <style:style style:name="P22" style:family="paragraph" style:parent-style-name="Standard">
      <style:text-properties fo:font-size="24pt" officeooo:rsid="00172e8d" officeooo:paragraph-rsid="001fa426" style:font-size-asian="24pt" style:font-size-complex="24pt"/>
    </style:style>
    <style:style style:name="P23" style:family="paragraph" style:parent-style-name="Standard">
      <style:text-properties fo:font-size="24pt" officeooo:rsid="001935b1" officeooo:paragraph-rsid="001fa426" style:font-size-asian="24pt" style:font-size-complex="24pt"/>
    </style:style>
    <style:style style:name="P24" style:family="paragraph" style:parent-style-name="Standard">
      <style:text-properties fo:font-size="24pt" officeooo:rsid="00201dc3" officeooo:paragraph-rsid="00201dc3" style:font-size-asian="24pt" style:font-size-complex="24pt"/>
    </style:style>
    <style:style style:name="P25" style:family="paragraph" style:parent-style-name="Standard">
      <style:text-properties fo:font-size="24pt" officeooo:rsid="0021566f" officeooo:paragraph-rsid="0021566f" style:font-size-asian="24pt" style:font-size-complex="24pt"/>
    </style:style>
    <style:style style:name="P26" style:family="paragraph" style:parent-style-name="Standard">
      <style:text-properties fo:font-size="24pt" officeooo:rsid="002187b4" officeooo:paragraph-rsid="002187b4" style:font-size-asian="24pt" style:font-size-complex="24pt"/>
    </style:style>
    <style:style style:name="P27" style:family="paragraph" style:parent-style-name="Standard">
      <style:text-properties fo:font-size="24pt" officeooo:rsid="00238268" officeooo:paragraph-rsid="00238268" style:font-size-asian="24pt" style:font-size-complex="24pt"/>
    </style:style>
    <style:style style:name="P28" style:family="paragraph" style:parent-style-name="Standard">
      <style:text-properties fo:font-size="24pt" officeooo:rsid="002a3747" officeooo:paragraph-rsid="002a3747" style:font-size-asian="24pt" style:font-size-complex="24pt"/>
    </style:style>
    <style:style style:name="P29" style:family="paragraph" style:parent-style-name="Standard">
      <style:text-properties fo:font-size="24pt" officeooo:rsid="002d2cc9" officeooo:paragraph-rsid="002d2cc9" style:font-size-asian="24pt" style:font-size-complex="24pt"/>
    </style:style>
    <style:style style:name="P30" style:family="paragraph" style:parent-style-name="Standard">
      <style:text-properties fo:font-size="24pt" officeooo:rsid="0035b01f" officeooo:paragraph-rsid="0035b01f" style:font-size-asian="24pt" style:font-size-complex="24pt"/>
    </style:style>
    <style:style style:name="P31" style:family="paragraph" style:parent-style-name="Standard">
      <style:text-properties fo:font-size="24pt" officeooo:rsid="0038e64c" officeooo:paragraph-rsid="0038e64c" style:font-size-asian="24pt" style:font-size-complex="24pt"/>
    </style:style>
    <style:style style:name="P32" style:family="paragraph" style:parent-style-name="Standard">
      <style:text-properties fo:font-size="24pt" officeooo:rsid="0046a801" officeooo:paragraph-rsid="0046a801" style:font-size-asian="24pt" style:font-size-complex="24pt"/>
    </style:style>
    <style:style style:name="P33" style:family="paragraph" style:parent-style-name="Standard">
      <style:text-properties fo:font-size="24pt" officeooo:rsid="0046bdba" officeooo:paragraph-rsid="0046bdba" style:font-size-asian="24pt" style:font-size-complex="24pt"/>
    </style:style>
    <style:style style:name="P34" style:family="paragraph" style:parent-style-name="Standard">
      <style:text-properties fo:font-size="24pt" officeooo:rsid="004c183b" officeooo:paragraph-rsid="004c183b" style:font-size-asian="24pt" style:font-size-complex="24pt"/>
    </style:style>
    <style:style style:name="P35" style:family="paragraph" style:parent-style-name="Standard">
      <style:text-properties fo:font-size="24pt" officeooo:rsid="004d2641" officeooo:paragraph-rsid="004d2641" style:font-size-asian="24pt" style:font-size-complex="24pt"/>
    </style:style>
    <style:style style:name="P36" style:family="paragraph" style:parent-style-name="Standard">
      <style:text-properties fo:font-size="24pt" officeooo:rsid="004dda92" officeooo:paragraph-rsid="004dda92" style:font-size-asian="24pt" style:font-size-complex="24pt"/>
    </style:style>
    <style:style style:name="P37" style:family="paragraph" style:parent-style-name="Standard">
      <style:text-properties fo:font-size="24pt" officeooo:rsid="004f3841" officeooo:paragraph-rsid="004f3841" style:font-size-asian="24pt" style:font-size-complex="24pt"/>
    </style:style>
    <style:style style:name="P38" style:family="paragraph" style:parent-style-name="Standard">
      <style:text-properties fo:font-size="24pt" officeooo:rsid="0050b7d3" officeooo:paragraph-rsid="0050b7d3" style:font-size-asian="24pt" style:font-size-complex="24pt"/>
    </style:style>
    <style:style style:name="P39" style:family="paragraph" style:parent-style-name="Standard">
      <style:text-properties fo:font-size="24pt" officeooo:rsid="0050e199" officeooo:paragraph-rsid="0051bd12" style:font-size-asian="24pt" style:font-size-complex="24pt"/>
    </style:style>
    <style:style style:name="P40" style:family="paragraph" style:parent-style-name="Standard">
      <style:text-properties fo:font-size="24pt" officeooo:rsid="0051bd12" officeooo:paragraph-rsid="0051bd12" style:font-size-asian="24pt" style:font-size-complex="24pt"/>
    </style:style>
    <style:style style:name="P41" style:family="paragraph" style:parent-style-name="Standard">
      <style:text-properties fo:font-size="24pt" officeooo:rsid="00530f2e" officeooo:paragraph-rsid="00530f2e" style:font-size-asian="24pt" style:font-size-complex="24pt"/>
    </style:style>
    <style:style style:name="P42" style:family="paragraph" style:parent-style-name="Standard">
      <style:text-properties fo:font-size="24pt" officeooo:rsid="0056636e" officeooo:paragraph-rsid="0056636e" style:font-size-asian="24pt" style:font-size-complex="24pt"/>
    </style:style>
    <style:style style:name="P43" style:family="paragraph" style:parent-style-name="Standard">
      <style:text-properties fo:font-size="24pt" officeooo:rsid="00576b81" officeooo:paragraph-rsid="00576b81" style:font-size-asian="24pt" style:font-size-complex="24pt"/>
    </style:style>
    <style:style style:name="P44" style:family="paragraph" style:parent-style-name="Standard">
      <style:text-properties fo:font-size="24pt" officeooo:rsid="0058b24a" officeooo:paragraph-rsid="0058b24a" style:font-size-asian="24pt" style:font-size-complex="24pt"/>
    </style:style>
    <style:style style:name="P45" style:family="paragraph" style:parent-style-name="Standard">
      <style:text-properties fo:font-size="24pt" officeooo:rsid="005b2315" officeooo:paragraph-rsid="005b2315" style:font-size-asian="24pt" style:font-size-complex="24pt"/>
    </style:style>
    <style:style style:name="P46" style:family="paragraph" style:parent-style-name="Standard">
      <style:text-properties fo:font-size="24pt" officeooo:rsid="005c156b" officeooo:paragraph-rsid="005c156b" style:font-size-asian="24pt" style:font-size-complex="24pt"/>
    </style:style>
    <style:style style:name="P47" style:family="paragraph" style:parent-style-name="Standard">
      <style:text-properties fo:font-size="24pt" officeooo:rsid="005c156b" officeooo:paragraph-rsid="005db877" style:font-size-asian="24pt" style:font-size-complex="24pt"/>
    </style:style>
    <style:style style:name="P48" style:family="paragraph" style:parent-style-name="Standard">
      <style:text-properties fo:font-size="24pt" officeooo:rsid="005db877" officeooo:paragraph-rsid="005db877" style:font-size-asian="24pt" style:font-size-complex="24pt"/>
    </style:style>
    <style:style style:name="P49" style:family="paragraph" style:parent-style-name="Standard">
      <style:text-properties fo:font-size="24pt" officeooo:rsid="005db877" officeooo:paragraph-rsid="005fa613" style:font-size-asian="24pt" style:font-size-complex="24pt"/>
    </style:style>
    <style:style style:name="P50" style:family="paragraph" style:parent-style-name="Standard">
      <style:text-properties fo:font-size="24pt" officeooo:rsid="005fa613" officeooo:paragraph-rsid="005fa613" style:font-size-asian="24pt" style:font-size-complex="24pt"/>
    </style:style>
    <style:style style:name="P51" style:family="paragraph" style:parent-style-name="Standard">
      <style:text-properties fo:font-size="24pt" officeooo:rsid="00619797" officeooo:paragraph-rsid="00619797" style:font-size-asian="24pt" style:font-size-complex="24pt"/>
    </style:style>
    <style:style style:name="P52" style:family="paragraph" style:parent-style-name="Standard">
      <style:text-properties fo:font-size="24pt" officeooo:rsid="0061adb5" officeooo:paragraph-rsid="0061adb5" style:font-size-asian="24pt" style:font-size-complex="24pt"/>
    </style:style>
    <style:style style:name="P53" style:family="paragraph" style:parent-style-name="Standard">
      <style:text-properties fo:font-size="24pt" officeooo:rsid="00633947" officeooo:paragraph-rsid="00633947" style:font-size-asian="24pt" style:font-size-complex="24pt"/>
    </style:style>
    <style:style style:name="P54" style:family="paragraph" style:parent-style-name="Standard">
      <style:text-properties fo:font-size="24pt" officeooo:rsid="0065397d" officeooo:paragraph-rsid="0065397d" style:font-size-asian="24pt" style:font-size-complex="24pt"/>
    </style:style>
    <style:style style:name="P55" style:family="paragraph" style:parent-style-name="Standard">
      <style:text-properties fo:font-size="24pt" officeooo:rsid="00655a6a" officeooo:paragraph-rsid="00655a6a" style:font-size-asian="24pt" style:font-size-complex="24pt"/>
    </style:style>
    <style:style style:name="P56" style:family="paragraph" style:parent-style-name="Standard">
      <style:text-properties fo:font-size="24pt" officeooo:rsid="0066f177" officeooo:paragraph-rsid="0066f177" style:font-size-asian="24pt" style:font-size-complex="24pt"/>
    </style:style>
    <style:style style:name="P57" style:family="paragraph" style:parent-style-name="Standard">
      <style:text-properties fo:font-size="24pt" officeooo:rsid="00681736" officeooo:paragraph-rsid="00681736" style:font-size-asian="24pt" style:font-size-complex="24pt"/>
    </style:style>
    <style:style style:name="P58" style:family="paragraph" style:parent-style-name="Standard">
      <style:text-properties fo:font-size="24pt" officeooo:rsid="0068efed" officeooo:paragraph-rsid="006aa587" style:font-size-asian="24pt" style:font-size-complex="24pt"/>
    </style:style>
    <style:style style:name="P59" style:family="paragraph" style:parent-style-name="Standard">
      <style:text-properties fo:font-size="24pt" officeooo:rsid="006aa587" officeooo:paragraph-rsid="006aa587" style:font-size-asian="24pt" style:font-size-complex="24pt"/>
    </style:style>
    <style:style style:name="P60" style:family="paragraph" style:parent-style-name="Standard">
      <style:text-properties fo:font-size="24pt" officeooo:rsid="006c8cfc" officeooo:paragraph-rsid="006c8cfc" style:font-size-asian="24pt" style:font-size-complex="24pt"/>
    </style:style>
    <style:style style:name="P61" style:family="paragraph" style:parent-style-name="Standard">
      <style:text-properties fo:font-size="24pt" officeooo:rsid="006d2e76" officeooo:paragraph-rsid="006d2e76" style:font-size-asian="24pt" style:font-size-complex="24pt"/>
    </style:style>
    <style:style style:name="P62" style:family="paragraph" style:parent-style-name="Standard">
      <style:text-properties fo:font-size="24pt" officeooo:rsid="006f385b" officeooo:paragraph-rsid="006f385b" style:font-size-asian="24pt" style:font-size-complex="24pt"/>
    </style:style>
    <style:style style:name="P63" style:family="paragraph" style:parent-style-name="Standard">
      <style:text-properties fo:font-size="24pt" officeooo:rsid="0070aa35" officeooo:paragraph-rsid="0070aa35" style:font-size-asian="24pt" style:font-size-complex="24pt"/>
    </style:style>
    <style:style style:name="P64" style:family="paragraph" style:parent-style-name="Standard">
      <style:text-properties fo:font-size="24pt" officeooo:rsid="007477ef" officeooo:paragraph-rsid="007477ef" style:font-size-asian="24pt" style:font-size-complex="24pt"/>
    </style:style>
    <style:style style:name="P65" style:family="paragraph" style:parent-style-name="Standard">
      <style:text-properties fo:font-size="24pt" officeooo:rsid="0074b10a" officeooo:paragraph-rsid="0074b10a" style:font-size-asian="24pt" style:font-size-complex="24pt"/>
    </style:style>
    <style:style style:name="P66" style:family="paragraph" style:parent-style-name="Standard">
      <style:text-properties fo:font-size="24pt" officeooo:rsid="0076185a" officeooo:paragraph-rsid="00762a49" style:font-size-asian="24pt" style:font-size-complex="24pt"/>
    </style:style>
    <style:style style:name="P67" style:family="paragraph" style:parent-style-name="Standard">
      <style:text-properties fo:font-size="24pt" officeooo:rsid="00762a49" officeooo:paragraph-rsid="00762a49" style:font-size-asian="24pt" style:font-size-complex="24pt"/>
    </style:style>
    <style:style style:name="P68" style:family="paragraph" style:parent-style-name="Standard">
      <style:text-properties fo:font-size="24pt" officeooo:rsid="0077d6a2" officeooo:paragraph-rsid="0077d6a2" style:font-size-asian="24pt" style:font-size-complex="24pt"/>
    </style:style>
    <style:style style:name="P69" style:family="paragraph" style:parent-style-name="Standard">
      <style:text-properties fo:font-size="24pt" officeooo:rsid="007e6a7f" officeooo:paragraph-rsid="007e6a7f" style:font-size-asian="24pt" style:font-size-complex="24pt"/>
    </style:style>
    <style:style style:name="P70" style:family="paragraph" style:parent-style-name="Standard">
      <style:text-properties fo:font-size="24pt" officeooo:rsid="007ed311" officeooo:paragraph-rsid="007ed311" style:font-size-asian="24pt" style:font-size-complex="24pt"/>
    </style:style>
    <style:style style:name="P71" style:family="paragraph" style:parent-style-name="Standard">
      <style:text-properties fo:font-size="24pt" officeooo:rsid="007fbaf9" officeooo:paragraph-rsid="007fbaf9" style:font-size-asian="24pt" style:font-size-complex="24pt"/>
    </style:style>
    <style:style style:name="P72" style:family="paragraph" style:parent-style-name="Standard">
      <style:text-properties fo:font-size="24pt" officeooo:rsid="007aae6a" officeooo:paragraph-rsid="007aae6a" style:font-size-asian="24pt" style:font-size-complex="24pt"/>
    </style:style>
    <style:style style:name="P73" style:family="paragraph" style:parent-style-name="Standard">
      <style:text-properties fo:font-size="24pt" officeooo:rsid="007c6dcc" officeooo:paragraph-rsid="007c6dcc" style:font-size-asian="24pt" style:font-size-complex="24pt"/>
    </style:style>
    <style:style style:name="P74" style:family="paragraph" style:parent-style-name="Standard">
      <style:text-properties fo:font-size="24pt" officeooo:rsid="0081dac0" officeooo:paragraph-rsid="0081dac0" style:font-size-asian="24pt" style:font-size-complex="24pt"/>
    </style:style>
    <style:style style:name="P75" style:family="paragraph" style:parent-style-name="Standard">
      <style:text-properties fo:font-size="24pt" officeooo:rsid="0082306f" officeooo:paragraph-rsid="0082306f" style:font-size-asian="24pt" style:font-size-complex="24pt"/>
    </style:style>
    <style:style style:name="P76" style:family="paragraph" style:parent-style-name="Standard">
      <style:text-properties fo:font-size="24pt" officeooo:rsid="0084b2cc" officeooo:paragraph-rsid="0084b2cc" style:font-size-asian="24pt" style:font-size-complex="24pt"/>
    </style:style>
    <style:style style:name="P77" style:family="paragraph" style:parent-style-name="Standard">
      <style:text-properties fo:font-size="24pt" officeooo:rsid="00855eb0" officeooo:paragraph-rsid="00855eb0" style:font-size-asian="24pt" style:font-size-complex="24pt"/>
    </style:style>
    <style:style style:name="P78" style:family="paragraph" style:parent-style-name="Standard">
      <style:text-properties fo:font-size="24pt" officeooo:rsid="008a88a1" officeooo:paragraph-rsid="008a88a1" style:font-size-asian="24pt" style:font-size-complex="24pt"/>
    </style:style>
    <style:style style:name="P79" style:family="paragraph" style:parent-style-name="Standard">
      <style:text-properties fo:font-size="24pt" officeooo:rsid="008bee73" officeooo:paragraph-rsid="008bee73" style:font-size-asian="24pt" style:font-size-complex="24pt"/>
    </style:style>
    <style:style style:name="P80" style:family="paragraph" style:parent-style-name="Standard">
      <style:text-properties fo:font-size="24pt" officeooo:rsid="008c7559" officeooo:paragraph-rsid="008c7559" style:font-size-asian="24pt" style:font-size-complex="24pt"/>
    </style:style>
    <style:style style:name="P81" style:family="paragraph" style:parent-style-name="Standard">
      <style:text-properties fo:font-size="24pt" officeooo:rsid="008d39ee" officeooo:paragraph-rsid="008d39ee" style:font-size-asian="24pt" style:font-size-complex="24pt"/>
    </style:style>
    <style:style style:name="P82" style:family="paragraph" style:parent-style-name="Standard">
      <style:text-properties fo:font-size="24pt" officeooo:rsid="008de5f9" officeooo:paragraph-rsid="008de5f9" style:font-size-asian="24pt" style:font-size-complex="24pt"/>
    </style:style>
    <style:style style:name="P83" style:family="paragraph" style:parent-style-name="Standard">
      <style:text-properties fo:font-size="24pt" officeooo:rsid="008f7ea6" officeooo:paragraph-rsid="008f7ea6" style:font-size-asian="24pt" style:font-size-complex="24pt"/>
    </style:style>
    <style:style style:name="P84" style:family="paragraph" style:parent-style-name="Standard">
      <style:text-properties fo:font-size="24pt" officeooo:rsid="0090cd30" officeooo:paragraph-rsid="0090cd30" style:font-size-asian="24pt" style:font-size-complex="24pt"/>
    </style:style>
    <style:style style:name="P85" style:family="paragraph" style:parent-style-name="Standard">
      <style:text-properties fo:font-size="24pt" officeooo:rsid="0093fd8d" officeooo:paragraph-rsid="0093fd8d" style:font-size-asian="24pt" style:font-size-complex="24pt"/>
    </style:style>
    <style:style style:name="P86" style:family="paragraph" style:parent-style-name="Standard">
      <style:text-properties fo:font-size="24pt" officeooo:rsid="0092b1f8" officeooo:paragraph-rsid="0092b1f8" style:font-size-asian="24pt" style:font-size-complex="24pt"/>
    </style:style>
    <style:style style:name="P87" style:family="paragraph" style:parent-style-name="Standard">
      <style:text-properties fo:font-size="24pt" officeooo:rsid="0095f040" officeooo:paragraph-rsid="0095f040" style:font-size-asian="24pt" style:font-size-complex="24pt"/>
    </style:style>
    <style:style style:name="P88" style:family="paragraph" style:parent-style-name="Standard">
      <style:text-properties fo:font-size="24pt" officeooo:rsid="009620e6" officeooo:paragraph-rsid="009620e6" style:font-size-asian="24pt" style:font-size-complex="24pt"/>
    </style:style>
    <style:style style:name="P89" style:family="paragraph" style:parent-style-name="Standard">
      <style:text-properties fo:font-size="24pt" officeooo:rsid="0096ffe1" officeooo:paragraph-rsid="0096ffe1" style:font-size-asian="24pt" style:font-size-complex="24pt"/>
    </style:style>
    <style:style style:name="P90" style:family="paragraph" style:parent-style-name="Standard">
      <style:text-properties fo:font-size="24pt" officeooo:rsid="0098a28d" officeooo:paragraph-rsid="0098a28d" style:font-size-asian="24pt" style:font-size-complex="24pt"/>
    </style:style>
    <style:style style:name="P91" style:family="paragraph" style:parent-style-name="Standard">
      <style:text-properties fo:font-size="24pt" officeooo:rsid="009c67ad" officeooo:paragraph-rsid="009c67ad" style:font-size-asian="24pt" style:font-size-complex="24pt"/>
    </style:style>
    <style:style style:name="P92" style:family="paragraph" style:parent-style-name="Standard">
      <style:text-properties fo:font-size="24pt" officeooo:rsid="009f29f5" officeooo:paragraph-rsid="009f29f5" style:font-size-asian="24pt" style:font-size-complex="24pt"/>
    </style:style>
    <style:style style:name="P93" style:family="paragraph" style:parent-style-name="Standard">
      <style:text-properties fo:font-size="24pt" officeooo:rsid="00a0a9e2" officeooo:paragraph-rsid="00a0a9e2" style:font-size-asian="24pt" style:font-size-complex="24pt"/>
    </style:style>
    <style:style style:name="P94" style:family="paragraph" style:parent-style-name="Standard">
      <style:text-properties fo:font-size="24pt" officeooo:rsid="00a3ab6c" officeooo:paragraph-rsid="00a3ab6c" style:font-size-asian="24pt" style:font-size-complex="24pt"/>
    </style:style>
    <style:style style:name="P95" style:family="paragraph" style:parent-style-name="Standard">
      <style:text-properties fo:font-size="24pt" officeooo:rsid="00a9058b" officeooo:paragraph-rsid="00a9058b" style:font-size-asian="24pt" style:font-size-complex="24pt"/>
    </style:style>
    <style:style style:name="P96" style:family="paragraph" style:parent-style-name="Standard">
      <style:text-properties fo:font-size="24pt" officeooo:rsid="00aaa5bd" officeooo:paragraph-rsid="00aaa5bd" style:font-size-asian="24pt" style:font-size-complex="24pt"/>
    </style:style>
    <style:style style:name="P97" style:family="paragraph" style:parent-style-name="Standard">
      <style:text-properties fo:font-size="24pt" officeooo:rsid="00aaea5f" officeooo:paragraph-rsid="00aaea5f" style:font-size-asian="24pt" style:font-size-complex="24pt"/>
    </style:style>
    <style:style style:name="P98" style:family="paragraph" style:parent-style-name="Standard">
      <style:text-properties fo:font-size="24pt" officeooo:rsid="00ab9add" officeooo:paragraph-rsid="00ab9add" style:font-size-asian="24pt" style:font-size-complex="24pt"/>
    </style:style>
    <style:style style:name="P99" style:family="paragraph" style:parent-style-name="Standard">
      <style:text-properties fo:font-size="24pt" officeooo:rsid="00acc9ec" officeooo:paragraph-rsid="00acc9ec" style:font-size-asian="24pt" style:font-size-complex="24pt"/>
    </style:style>
    <style:style style:name="P100" style:family="paragraph" style:parent-style-name="Standard">
      <style:text-properties fo:font-size="24pt" officeooo:rsid="00aec26b" officeooo:paragraph-rsid="00aec26b" style:font-size-asian="24pt" style:font-size-complex="24pt"/>
    </style:style>
    <style:style style:name="P101" style:family="paragraph" style:parent-style-name="Standard">
      <style:text-properties fo:font-size="24pt" officeooo:rsid="00b08116" officeooo:paragraph-rsid="00b08116" style:font-size-asian="24pt" style:font-size-complex="24pt"/>
    </style:style>
    <style:style style:name="P102" style:family="paragraph" style:parent-style-name="Standard">
      <style:text-properties fo:font-size="24pt" officeooo:rsid="00b1f251" officeooo:paragraph-rsid="00b1f251" style:font-size-asian="24pt" style:font-size-complex="24pt"/>
    </style:style>
    <style:style style:name="P103" style:family="paragraph" style:parent-style-name="Standard">
      <style:text-properties fo:font-size="24pt" officeooo:rsid="00b32cc9" officeooo:paragraph-rsid="00b32cc9" style:font-size-asian="24pt" style:font-size-complex="24pt"/>
    </style:style>
    <style:style style:name="P104" style:family="paragraph" style:parent-style-name="Standard">
      <style:text-properties fo:font-size="24pt" officeooo:rsid="00b32cc9" officeooo:paragraph-rsid="00b1f251" style:font-size-asian="24pt" style:font-size-complex="24pt"/>
    </style:style>
    <style:style style:name="P105" style:family="paragraph" style:parent-style-name="Standard">
      <style:text-properties fo:font-size="24pt" officeooo:rsid="00b32cc9" officeooo:paragraph-rsid="00b32cc9" style:font-size-asian="24pt" style:font-size-complex="24pt"/>
    </style:style>
    <style:style style:name="P106" style:family="paragraph" style:parent-style-name="Standard">
      <style:text-properties fo:font-size="24pt" officeooo:rsid="00b6336b" officeooo:paragraph-rsid="00b6336b" style:font-size-asian="24pt" style:font-size-complex="24pt"/>
    </style:style>
    <style:style style:name="T1" style:family="text">
      <style:text-properties officeooo:rsid="003fc211"/>
    </style:style>
    <style:style style:name="T2" style:family="text">
      <style:text-properties officeooo:rsid="0042e6e8"/>
    </style:style>
    <style:style style:name="T3" style:family="text">
      <style:text-properties officeooo:rsid="000fa755"/>
    </style:style>
    <style:style style:name="T4" style:family="text">
      <style:text-properties officeooo:rsid="00115889"/>
    </style:style>
    <style:style style:name="T5" style:family="text">
      <style:text-properties officeooo:rsid="00274b90"/>
    </style:style>
    <style:style style:name="T6" style:family="text">
      <style:text-properties officeooo:rsid="002b699d"/>
    </style:style>
    <style:style style:name="T7" style:family="text">
      <style:text-properties officeooo:rsid="002d2cc9"/>
    </style:style>
    <style:style style:name="T8" style:family="text">
      <style:text-properties officeooo:rsid="00329c44"/>
    </style:style>
    <style:style style:name="T9" style:family="text">
      <style:text-properties officeooo:rsid="0065397d"/>
    </style:style>
    <style:style style:name="T10" style:family="text">
      <style:text-properties officeooo:rsid="002d2fff"/>
    </style:style>
    <style:style style:name="T11" style:family="text">
      <style:text-properties officeooo:rsid="003043fb"/>
    </style:style>
    <style:style style:name="T12" style:family="text">
      <style:text-properties officeooo:rsid="002e23cb"/>
    </style:style>
    <style:style style:name="T13" style:family="text">
      <style:text-properties officeooo:rsid="00394157"/>
    </style:style>
    <style:style style:name="T14" style:family="text">
      <style:text-properties officeooo:rsid="004a2d8b"/>
    </style:style>
    <style:style style:name="T15" style:family="text">
      <style:text-properties officeooo:rsid="0051bd12"/>
    </style:style>
    <style:style style:name="T16" style:family="text">
      <style:text-properties officeooo:rsid="00599006"/>
    </style:style>
    <style:style style:name="T17" style:family="text">
      <style:text-properties officeooo:rsid="005888bc"/>
    </style:style>
    <style:style style:name="T18" style:family="text">
      <style:text-properties officeooo:rsid="005fa613"/>
    </style:style>
    <style:style style:name="T19" style:family="text">
      <style:text-properties officeooo:rsid="00640e60"/>
    </style:style>
    <style:style style:name="T20" style:family="text">
      <style:text-properties officeooo:rsid="0066f177"/>
    </style:style>
    <style:style style:name="T21" style:family="text">
      <style:text-properties officeooo:rsid="0076185a"/>
    </style:style>
    <style:style style:name="T22" style:family="text">
      <style:text-properties officeooo:rsid="007fbaf9"/>
    </style:style>
    <style:style style:name="T23" style:family="text">
      <style:text-properties officeooo:rsid="00875a72"/>
    </style:style>
    <style:style style:name="T24" style:family="text">
      <style:text-properties officeooo:rsid="0097fa1c"/>
    </style:style>
    <style:style style:name="T25" style:family="text">
      <style:text-properties officeooo:rsid="00919175"/>
    </style:style>
    <style:style style:name="T26" style:family="text">
      <style:text-properties officeooo:rsid="0095e202"/>
    </style:style>
    <style:style style:name="T27" style:family="text">
      <style:text-properties officeooo:rsid="0093fd8d"/>
    </style:style>
    <style:style style:name="T28" style:family="text">
      <style:text-properties officeooo:rsid="00a772f1"/>
    </style:style>
    <style:style style:name="T29" style:family="text">
      <style:text-properties officeooo:rsid="00a9058b"/>
    </style:style>
    <style:style style:name="T30" style:family="text">
      <style:text-properties officeooo:rsid="00acc9ec"/>
    </style:style>
    <style:style style:name="T31" style:family="text">
      <style:text-properties officeooo:rsid="00b4597d"/>
    </style:style>
    <style:style style:name="T32" style:family="text">
      <style:text-properties officeooo:rsid="00b48c2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Numero primo</text:p>
      <text:p text:style-name="P1"/>
      <text:p text:style-name="P1">1 y or si mismo</text:p>
      <text:p text:style-name="P1"/>
      <text:p text:style-name="P1"/>
      <text:p text:style-name="P1"/>
      <text:p text:style-name="P2">uml </text:p>
      <text:p text:style-name="P2">se crea mapa </text:p>
      <text:p text:style-name="P2"/>
      <text:p text:style-name="P2"/>
      <text:p text:style-name="P2"/>
      <text:p text:style-name="P2"/>
      <text:p text:style-name="P2"/>
      <text:p text:style-name="P2">empleado </text:p>
      <text:p text:style-name="P2">epleado medio de tiempo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polimorfismo osea e usa para evotr duplicacuon de codigo</text:p>
      <text:p text:style-name="P3"><text:soft-page-break/></text:p>
      <text:p text:style-name="P4">SCRUM </text:p>
      <text:p text:style-name="P4"/>
      <text:p text:style-name="P5">metodologia agiles</text:p>
      <text:p text:style-name="P5"/>
      <text:p text:style-name="P6">es por el proyecti colombo y fundacion</text:p>
      <text:p text:style-name="P6">politicas prender la camara .</text:p>
      <text:p text:style-name="P6"/>
      <text:p text:style-name="P7">Carlos esta desde el año 2011</text:p>
      <text:p text:style-name="P7"/>
      <text:p text:style-name="P7">agilidad</text:p>
      <text:p text:style-name="P7">es lo qe podemos entregar en un mes</text:p>
      <text:p text:style-name="P7"/>
      <text:p text:style-name="P8">manifiesto agil</text:p>
      <text:p text:style-name="P7"/>
      <text:p text:style-name="P7"/>
      <text:p text:style-name="P8">ntrega soporte</text:p>
      <text:p text:style-name="P7"/>
      <text:p text:style-name="P10"/>
      <text:p text:style-name="P8">e maifiesto agil es un doxumento con pautas <text:s/>donde se piorizr personas, colabraciones</text:p>
      <text:p text:style-name="P11"/>
      <text:p text:style-name="P3"/>
      <text:p text:style-name="P3"/>
      <text:p text:style-name="P9"><text:soft-page-break/></text:p>
      <text:p text:style-name="P8">algunos opinas de manera tecnica oh prwsencial</text:p>
      <text:p text:style-name="P8"/>
      <text:p text:style-name="P8"><draw:frame draw:style-name="fr1" draw:name="Image5" text:anchor-type="char" svg:x="3.979cm" svg:y="-0.489cm" svg:width="9.165cm" svg:height="6.498cm" draw:z-index="4"><draw:image xlink:href="Pictures/10000001000001B10000013340A47C9C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/><text:span text:style-name="T1">review necesidades del ciente</text:span></text:p>
      <text:p text:style-name="P8"/>
      <text:p text:style-name="P13">doscovery </text:p>
      <text:p text:style-name="P13"/>
      <text:p text:style-name="P13"><text:soft-page-break/>pimero es por que</text:p>
      <text:p text:style-name="P13"/>
      <text:p text:style-name="P14">segundo vision</text:p>
      <text:p text:style-name="P14">prodct vsion <text:s/>construir para que que</text:p>
      <text:p text:style-name="P14"/>
      <text:p text:style-name="P14">riegps de lo que haran</text:p>
      <text:p text:style-name="P14"/>
      <text:p text:style-name="P15">existe en impact makin</text:p>
      <text:p text:style-name="P15"/>
      <text:p text:style-name="P15"/>
      <text:p text:style-name="P15">discovery </text:p>
      <text:p text:style-name="P15"/>
      <text:p text:style-name="P15">definir personas</text:p>
      <text:p text:style-name="P15"/>
      <text:p text:style-name="P15"/>
      <text:p text:style-name="P15">historias de usuarios</text:p>
      <text:p text:style-name="P15"/>
      <text:p text:style-name="P15"/>
      <text:p text:style-name="P15">incestio dev</text:p>
      <text:p text:style-name="P15">designer spring</text:p>
      <text:p text:style-name="P15"/>
      <text:p text:style-name="P15">bac<text:span text:style-name="T2">k</text:span>log</text:p>
      <text:p text:style-name="P15">Sprint Planning Tips • Timbox de la reunión • Tener el backlog refinado y priorizado • Repasar la visión <text:soft-page-break/>al iniciar la sesión • Recordar la definición de DONE • Debe estar presente todo el equipo </text:p>
      <text:p text:style-name="P8"/>
      <text:p text:style-name="P8"/>
      <text:p text:style-name="P8"/>
      <text:p text:style-name="P8"/>
      <text:p text:style-name="P8"/>
      <text:p text:style-name="P8"/>
      <text:p text:style-name="P3"/>
      <text:p text:style-name="P3"><draw:frame draw:style-name="fr4" draw:name="Image6" text:anchor-type="char" svg:width="17.59cm" svg:height="7.717cm" draw:z-index="5"><draw:image xlink:href="Pictures/1000000100000394000001920499CEED.png" xlink:type="simple" xlink:show="embed" xlink:actuate="onLoad" draw:mime-type="image/png"/></draw:frame></text:p>
      <text:p text:style-name="P3"/>
      <text:p text:style-name="P3"/>
      <text:p text:style-name="P3"/>
      <text:p text:style-name="P16">recorsar que todos deben de sabr el tramafodo del prouyecto</text:p>
      <text:p text:style-name="P3"><draw:frame draw:style-name="fr3" draw:name="Image4" text:anchor-type="char" svg:width="17.59cm" svg:height="13.192cm" draw:z-index="3"><draw:image xlink:href="Pictures/1000000000000640000004B08A4E8036.png" xlink:type="simple" xlink:show="embed" xlink:actuate="onLoad" draw:mime-type="image/png"/></draw:frame><text:soft-page-break/></text:p>
      <text:p text:style-name="P3"><draw:frame draw:style-name="fr2" draw:name="Image3" text:anchor-type="char" svg:width="17.59cm" svg:height="23.453cm" draw:z-index="2"><draw:image xlink:href="Pictures/10000000000004B000000640AFE0B5C3.png" xlink:type="simple" xlink:show="embed" xlink:actuate="onLoad" draw:mime-type="image/png"/></draw:frame><text:soft-page-break/></text:p>
      <text:p text:style-name="P3"><text:soft-page-break/></text:p>
      <text:p text:style-name="P3"/>
      <text:p text:style-name="P3"/>
      <text:p text:style-name="P3"><draw:frame draw:style-name="fr2" draw:name="Image2" text:anchor-type="char" svg:width="17.59cm" svg:height="13.192cm" draw:z-index="1"><draw:image xlink:href="Pictures/1000000000000640000004B0C7DAF65F.png" xlink:type="simple" xlink:show="embed" xlink:actuate="onLoad" draw:mime-type="image/png"/></draw:frame></text:p>
      <text:p text:style-name="P2"><draw:frame draw:style-name="fr1" draw:name="Image1" text:anchor-type="char" svg:x="1.27cm" svg:y="-2cm" svg:width="15.716cm" svg:height="27.94cm" draw:z-index="0"><draw:image xlink:href="Pictures/1000000000000384000006409EA2443E.png" xlink:type="simple" xlink:show="embed" xlink:actuate="onLoad" draw:mime-type="image/png"/></draw:frame><text:soft-page-break/></text:p>
      <text:p text:style-name="P2"><text:soft-page-break/><text:s text:c="2"/><text:span text:style-name="T3">tarea</text:span></text:p>
      <text:p text:style-name="P2"/>
      <text:p text:style-name="P17">investigar <text:span text:style-name="T4">sobre la d en p´rincipios solid</text:span></text:p>
      <text:p text:style-name="P18"/>
      <text:p text:style-name="P19"/>
      <text:p text:style-name="P20">peticiones dns</text:p>
      <text:p text:style-name="P20">spengboot java</text:p>
      <text:p text:style-name="P20"><text:s/>framework</text:p>
      <text:p text:style-name="P20">n8n</text:p>
      <text:p text:style-name="P20"/>
      <text:p text:style-name="P20">flujo de trabajo </text:p>
      <text:p text:style-name="P20">n8n</text:p>
      <text:p text:style-name="P20">trugger</text:p>
      <text:p text:style-name="P21">ocr/rag</text:p>
      <text:p text:style-name="P22">ocr frma de extraer informacoion</text:p>
      <text:p text:style-name="P23">anigravity ide</text:p>
      <text:p text:style-name="P23">vsc editor de texo</text:p>
      <text:p text:style-name="P23">front lo que ve ell usuario</text:p>
      <text:p text:style-name="P23">back las funciones de la aplicación</text:p>
      <text:p text:style-name="P12">supabase backend</text:p>
      <text:p text:style-name="P12"/>
      <text:p text:style-name="P19">qe tranings perfprmers testing</text:p>
      <text:p text:style-name="P19"/>
      <text:p text:style-name="P24">basic concepts</text:p>
      <text:p text:style-name="P24"><text:soft-page-break/></text:p>
      <text:p text:style-name="P24">jmeter tool structure</text:p>
      <text:p text:style-name="P24">7designer a tedt permorer</text:p>
      <text:p text:style-name="P24">perforers es evaluar la capacidad de una app ante la cantidad de usuarios que puede recibir la aplicación</text:p>
      <text:p text:style-name="P24"/>
      <text:p text:style-name="P25">esto se maneja co las peticiones</text:p>
      <text:p text:style-name="P25"/>
      <text:p text:style-name="P26">apm <text:s/>monitorear transacciones en tiempo real latencia y y disponibilidad.</text:p>
      <text:p text:style-name="P26"/>
      <text:p text:style-name="P26"/>
      <text:p text:style-name="P26"/>
      <text:p text:style-name="P26"/>
      <text:p text:style-name="P26">Basic </text:p>
      <text:p text:style-name="P26">endurance</text:p>
      <text:p text:style-name="P26">sppike</text:p>
      <text:p text:style-name="P26">scalability</text:p>
      <text:p text:style-name="P26"/>
      <text:p text:style-name="P26">smock 1 a 3 usuarios </text:p>
      <text:p text:style-name="P26"/>
      <text:p text:style-name="P27">load </text:p>
      <text:p text:style-name="P27">street</text:p>
      <text:p text:style-name="P27"/>
      <text:p text:style-name="P26"><text:soft-page-break/><text:s/><text:span text:style-name="T5">historias de usuario.</text:span></text:p>
      <text:p text:style-name="P26"/>
      <text:p text:style-name="P26"/>
      <text:p text:style-name="P26"/>
      <text:p text:style-name="P28">Descripcion breve y simple de un funcionalidad del sistema <text:s/>escrita desde el punto de vista del usuario</text:p>
      <text:p text:style-name="P28"/>
      <text:p text:style-name="P28">lo qie hacen es la compr<text:span text:style-name="T6">omi</text:span>so del problema, mantieen un efoqie de usuarios y no tecnologi<text:span text:style-name="T6">a</text:span>. </text:p>
      <text:p text:style-name="P28"><text:span text:style-name="T6">Mejoran</text:span> <text:span text:style-name="T6">la comunicacion</text:span> <text:span text:style-name="T6">entre</text:span> <text:span text:style-name="T6">clientes analistas y desarrolladores</text:span></text:p>
      <text:p text:style-name="P28"><text:span text:style-name="T6">permiten piorizar</text:span> <text:span text:style-name="T6">funcionalidades según va</text:span>lor</text:p>
      <text:p text:style-name="P28"><text:span text:style-name="T6">evitan requisitos regidos y dificiles de entender</text:span> </text:p>
      <text:p text:style-name="P28"><text:span text:style-name="T6">F</text:span><text:span text:style-name="T7">a</text:span><text:span text:style-name="T6">vorecen el desarrollo</text:span> <text:span text:style-name="T6">increment</text:span>al y flexible</text:p>
      <text:p text:style-name="P28"/>
      <text:p text:style-name="P28"/>
      <text:p text:style-name="P29">funcionales: cosas<text:tab/>ue pueden usar</text:p>
      <text:p text:style-name="P29">no funcional: cuanyo soporte a tantas personas</text:p>
      <text:p text:style-name="P29"/>
      <text:p text:style-name="P29"/>
      <text:p text:style-name="P29">sirven para las hu par ident<text:span text:style-name="T8">i</text:span>ficar y documentar necesidades</text:p>
      <text:p text:style-name="P29">defini fun<text:span text:style-name="T9">c</text:span>ionalidades</text:p>
      <text:p text:style-name="P29"><text:soft-page-break/>construir y <text:span text:style-name="T10">o</text:span>rganizar el bac<text:span text:style-name="T11">k</text:span>log planificar el desarrollo de <text:s/>por interacciones</text:p>
      <text:p text:style-name="P29">V<text:span text:style-name="T12">a</text:span>lidar e<text:span text:style-name="T12">l</text:span> sistema desde la perspectia del usuario</text:p>
      <text:p text:style-name="P29"/>
      <text:p text:style-name="P29"/>
      <text:p text:style-name="P29"/>
      <text:p text:style-name="P30">como quiero y para quien que qué y por que </text:p>
      <text:p text:style-name="P30"/>
      <text:p text:style-name="P30"/>
      <text:p text:style-name="P30">como tipo de usuarios </text:p>
      <text:p text:style-name="P30">quiero accion funcionalidad </text:p>
      <text:p text:style-name="P30">para beneficio o valor</text:p>
      <text:p text:style-name="P30"/>
      <text:p text:style-name="P30">quien usa el sistema </text:p>
      <text:p text:style-name="P30">qué quiere hacer </text:p>
      <text:p text:style-name="P30">y por que es importante</text:p>
      <text:p text:style-name="P30"/>
      <text:p text:style-name="P31">Errores </text:p>
      <text:p text:style-name="P31">escribirlo desde el pun<text:span text:style-name="T13">t</text:span>o de vista del s<text:span text:style-name="T13">i</text:span>stema no incluir beneficio y valor</text:p>
      <text:p text:style-name="P28"/>
      <text:p text:style-name="P28"/>
      <text:p text:style-name="P28"/>
      <text:p text:style-name="P32">proyecto colombo</text:p>
      <text:p text:style-name="P32"><text:soft-page-break/></text:p>
      <text:p text:style-name="P32">tatiana/gestion.</text:p>
      <text:p text:style-name="P32">david/lider de proyecto.</text:p>
      <text:p text:style-name="P32">Front / julian </text:p>
      <text:p text:style-name="P32">back/daniel.</text:p>
      <text:p text:style-name="P32"/>
      <text:p text:style-name="P32">Back daniel se hace cargo de la logica del negocio en este caso autorizacion, verifocacio 2 pasos o texto , iniciar proyecto jango ara mnejar la api</text:p>
      <text:p text:style-name="P33">requerimientos duncionales y no funcionales</text:p>
      <text:p text:style-name="P33">modckus diferentes</text:p>
      <text:p text:style-name="P33">excepciones y listado</text:p>
      <text:p text:style-name="P33"/>
      <text:p text:style-name="P33">se<text:span text:style-name="T14">p</text:span>arac<text:span text:style-name="T14">ió</text:span>n otras tareas.</text:p>
      <text:p text:style-name="P33"/>
      <text:p text:style-name="P34">To do list </text:p>
      <text:p text:style-name="P34">in progress</text:p>
      <text:p text:style-name="P34">ready for review</text:p>
      <text:p text:style-name="P34">completed</text:p>
      <text:p text:style-name="P34"/>
      <text:p text:style-name="P35">se observo una todo list real</text:p>
      <text:p text:style-name="P35"/>
      <text:p text:style-name="P36">dieños con ia</text:p>
      <text:p text:style-name="P37">hace <text:s/>en lo lngaje qe tw guste </text:p>
      <text:p text:style-name="P37"><text:soft-page-break/></text:p>
      <text:p text:style-name="P38">u <text:s/>dato puede ser el texto</text:p>
      <text:p text:style-name="P39">oh nu<text:span text:style-name="T15">m</text:span>eros </text:p>
      <text:p text:style-name="P40">nombre edad</text:p>
      <text:p text:style-name="P40"/>
      <text:p text:style-name="P40">no logico </text:p>
      <text:p text:style-name="P40"/>
      <text:p text:style-name="P41">javascript </text:p>
      <text:p text:style-name="P41"/>
      <text:p text:style-name="P41">alto nivel </text:p>
      <text:p text:style-name="P42">tipado debil: <text:s/>cualquier dato no exigente</text:p>
      <text:p text:style-name="P42">tipado fuerte: datos especifico exigente</text:p>
      <text:p text:style-name="P42">typescript</text:p>
      <text:p text:style-name="P42">const age = 25 tipado;</text:p>
      <text:p text:style-name="P42">javacript </text:p>
      <text:p text:style-name="P42">const age: number = 25; no tipado </text:p>
      <text:p text:style-name="P42"/>
      <text:p text:style-name="P43">prograacuon funcional en u<text:span text:style-name="T16">n</text:span> mismo archovo para <text:s/>funciones</text:p>
      <text:p text:style-name="P43"/>
      <text:p text:style-name="P43">programaion objeto: varios objetos separadps en archivos diferentes.</text:p>
      <text:p text:style-name="P43"/>
      <text:p text:style-name="P43">Paradigmas </text:p>
      <text:p text:style-name="P43"><text:soft-page-break/>imperact<text:span text:style-name="T17">i</text:span>vos </text:p>
      <text:p text:style-name="P43">dec<text:span text:style-name="T17">i</text:span>re paso a aso que de<text:span text:style-name="T17">b</text:span>e hacer el computador</text:p>
      <text:p text:style-name="P43"/>
      <text:p text:style-name="P43"/>
      <text:p text:style-name="P43">declarativos <text:s/>des<text:span text:style-name="T17">c</text:span>rbir lo q<text:span text:style-name="T17">ue </text:span>quieres lograr</text:p>
      <text:p text:style-name="P43"/>
      <text:p text:style-name="P43"/>
      <text:p text:style-name="P44">a partor del mockup de juli se decidieron la tarea.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5">En la principal se crearon alterntiva</text:p>
      <text:p text:style-name="P45">se diseño el maso</text:p>
      <text:p text:style-name="P45">nivel genero <text:s/>dstriucion</text:p>
      <text:p text:style-name="P46">geminni </text:p>
      <text:p text:style-name="P47">chat gpt cumplir requisitos </text:p>
      <text:p text:style-name="P48">modificaciones grandes</text:p>
      <text:p text:style-name="P49">rinero mov<text:span text:style-name="T18">i</text:span>l perspe<text:span text:style-name="T18">ctive</text:span></text:p>
      <text:p text:style-name="P49"/>
      <text:p text:style-name="P50">orden jerarquico </text:p>
      <text:p text:style-name="P50"><text:soft-page-break/></text:p>
      <text:p text:style-name="P50"/>
      <text:p text:style-name="P50"/>
      <text:p text:style-name="P50"/>
      <text:p text:style-name="P50">navbar</text:p>
      <text:p text:style-name="P50">main foteer</text:p>
      <text:p text:style-name="P50"/>
      <text:p text:style-name="P51">difuminacion de fonds odal</text:p>
      <text:p text:style-name="P51"/>
      <text:p text:style-name="P51"/>
      <text:p text:style-name="P51"/>
      <text:p text:style-name="P52">stprybook documentar front</text:p>
      <text:p text:style-name="P53"><text:span text:style-name="T19">Documentar front</text:span> </text:p>
      <text:p text:style-name="P48"/>
      <text:p text:style-name="P48"/>
      <text:p text:style-name="P54">n8n charla </text:p>
      <text:p text:style-name="P48"/>
      <text:p text:style-name="P48"/>
      <text:p text:style-name="P55">probar las transacciones del dia desde te<text:span text:style-name="T20">legrAM</text:span></text:p>
      <text:p text:style-name="P55"/>
      <text:p text:style-name="P55"/>
      <text:p text:style-name="P56">Si es <text:s/>es bot no resonde automaticamente .</text:p>
      <text:p text:style-name="P56"/>
      <text:p text:style-name="P57">Interaccion si es una maquina oh no</text:p>
      <text:p text:style-name="P57"><text:soft-page-break/></text:p>
      <text:p text:style-name="P57"/>
      <text:p text:style-name="P58">gemini usar ia paraprocess automaticos </text:p>
      <text:p text:style-name="P58"/>
      <text:p text:style-name="P59">n8n e un modo rapido de crear bots entre otros </text:p>
      <text:p text:style-name="P59"/>
      <text:p text:style-name="P60">colocas el condicion luego en los caminos defines li qie se debe hacer?</text:p>
      <text:p text:style-name="P60"/>
      <text:p text:style-name="P61">Instalar docker</text:p>
      <text:p text:style-name="P61"/>
      <text:p text:style-name="P62">oh nition</text:p>
      <text:p text:style-name="P62">instla node y con node </text:p>
      <text:p text:style-name="P62"/>
      <text:p text:style-name="P62">npx <text:s/>n8n</text:p>
      <text:p text:style-name="P62"/>
      <text:p text:style-name="P62"/>
      <text:p text:style-name="P63">nm</text:p>
      <text:p text:style-name="P63">npm paquetes alternativoso</text:p>
      <text:p text:style-name="P63"/>
      <text:p text:style-name="P63"/>
      <text:p text:style-name="P64">se uso app de la mit para crear aaplicaciíón</text:p>
      <text:p text:style-name="P64"/>
      <text:p text:style-name="P64"/>
      <text:p text:style-name="P65"><text:soft-page-break/>reordar concepros web ia apis <text:span text:style-name="T21">jsn</text:span></text:p>
      <text:p text:style-name="P66">y tambien se resolvieron probñemas de logica</text:p>
      <text:p text:style-name="P67">y como los jsondon presentados</text:p>
      <text:p text:style-name="P67"/>
      <text:p text:style-name="P67"/>
      <text:p text:style-name="P67"/>
      <text:p text:style-name="P67">9 monedas</text:p>
      <text:p text:style-name="P67">1 peso dferente a las demas</text:p>
      <text:p text:style-name="P67"/>
      <text:p text:style-name="P67">cual es la moneda que esa menos</text:p>
      <text:p text:style-name="P67">2 veces la balanza.</text:p>
      <text:p text:style-name="P67">Pesar el peso total de las 9 monedas</text:p>
      <text:p text:style-name="P67">suponiendo que <text:s/>todas pesan 9 kilos menos</text:p>
      <text:p text:style-name="P67"/>
      <text:p text:style-name="P67">se cosodera que una monda es de un materal siferente</text:p>
      <text:p text:style-name="P68">ejemplo oro i pr ekemplo colocamos esa moneda de pr a un lado de las de cobre la balanza se inclinara a las de oro por que se usa mas este omponente que en las monedas</text:p>
      <text:p text:style-name="P68"/>
      <text:p text:style-name="P68"/>
      <text:p text:style-name="P68"/>
      <text:p text:style-name="P68"/>
      <text:p text:style-name="P68"><text:soft-page-break/></text:p>
      <text:p text:style-name="P68"/>
      <text:p text:style-name="P69">o dividir las monedas en grups de 3.</text:p>
      <text:p text:style-name="P69">y esarlas cada ua las 2 veces, </text:p>
      <text:p text:style-name="P69">y si uno pesa mas que el otro ah esta la moneda mas pesads</text:p>
      <text:p text:style-name="P70">no dejar <text:s text:c="3"/>los arhvos solo db <text:s text:c="66"/></text:p>
      <text:p text:style-name="P68">3 interumptores fuera de la habotacio<text:span text:style-name="T22">n</text:span></text:p>
      <text:p text:style-name="P68"/>
      <text:p text:style-name="P68">3 bombillos</text:p>
      <text:p text:style-name="P71">cual es el correspondiente bombillo con su interruptor</text:p>
      <text:p text:style-name="P68"/>
      <text:p text:style-name="P72">entro al cuarto dejo unos termómetros inhalabricos para medir temperatura y salgo</text:p>
      <text:p text:style-name="P72">enciendo cada bombilla con <text:s/>el inte<text:span text:style-name="T22">r</text:span>ruptor y mido <text:s/>la cantidad de calor que sale de cad bombilla desde donde registre los datos para saber cual es la temperatira correspondiente al bombillo y asi sabremos cual es el bombillo que pertenece el interruptor</text:p>
      <text:p text:style-name="P72"/>
      <text:p text:style-name="P73">html estructura </text:p>
      <text:p text:style-name="P73">espacio ordenado prgramacarpeta cognitus</text:p>
      <text:p text:style-name="P74"><text:soft-page-break/>ir creando portafolio</text:p>
      <text:p text:style-name="P74"/>
      <text:p text:style-name="P75">reto game of life a futuro</text:p>
      <text:p text:style-name="P75">basico pajinas</text:p>
      <text:p text:style-name="P75">html</text:p>
      <text:p text:style-name="P75">css</text:p>
      <text:p text:style-name="P75">javascript</text:p>
      <text:p text:style-name="P75"/>
      <text:p text:style-name="P75">html estructura</text:p>
      <text:p text:style-name="P75">cssestilos ve el uduario</text:p>
      <text:p text:style-name="P75"/>
      <text:p text:style-name="P75">javascript el cerebro</text:p>
      <text:p text:style-name="P75"/>
      <text:p text:style-name="P75"/>
      <text:p text:style-name="P76">qe son las bases de datos</text:p>
      <text:p text:style-name="P77">las bases de datos son:<text:span text:style-name="T23">conjuntos de datos dividids en campos</text:span></text:p>
      <text:p text:style-name="P77"/>
      <text:p text:style-name="P77"/>
      <text:p text:style-name="P78">se recordo que es html, css y javascript</text:p>
      <text:p text:style-name="P78">repaso etiquetas como se ven en html</text:p>
      <text:p text:style-name="P78">jemplo</text:p>
      <text:p text:style-name="P78"/>
      <text:p text:style-name="P78">div</text:p>
      <text:p text:style-name="P78"><text:soft-page-break/>h1</text:p>
      <text:p text:style-name="P79">grupo acomodr en css</text:p>
      <text:p text:style-name="P79"/>
      <text:p text:style-name="P80">paletas</text:p>
      <text:p text:style-name="P80">mas detalles</text:p>
      <text:p text:style-name="P80">buscar structuras bases+</text:p>
      <text:p text:style-name="P80">deckrle que pregubtarle</text:p>
      <text:p text:style-name="P80">infrmacion necesaria</text:p>
      <text:p text:style-name="P80"/>
      <text:p text:style-name="P80"/>
      <text:p text:style-name="P81">recuuerdo de lo qoe vimos en html y css</text:p>
      <text:p text:style-name="P81"/>
      <text:p text:style-name="P81">ahora vemos logica y cfunciones co javascript</text:p>
      <text:p text:style-name="P81"/>
      <text:p text:style-name="P81"/>
      <text:p text:style-name="P82">infprmacion en javascript</text:p>
      <text:p text:style-name="P82"/>
      <text:p text:style-name="P82">mensaje</text:p>
      <text:p text:style-name="P82"/>
      <text:p text:style-name="P82">jhon es un tipo de datos texto</text:p>
      <text:p text:style-name="P82"/>
      <text:p text:style-name="P82">tipo de informacionn</text:p>
      <text:p text:style-name="P82"/>
      <text:p text:style-name="P82">letras</text:p>
      <text:p text:style-name="P82"><text:soft-page-break/>numeros</text:p>
      <text:p text:style-name="P82">frase puede c<text:span text:style-name="T24">o</text:span>ntener n<text:span text:style-name="T24">u</text:span>meros</text:p>
      <text:p text:style-name="P82"/>
      <text:p text:style-name="P82"/>
      <text:p text:style-name="P83">logica es si oh no aynque el problema es llegar ala respuesta</text:p>
      <text:p text:style-name="P83"/>
      <text:p text:style-name="P83"/>
      <text:p text:style-name="P83">s <text:s/>conteto la indfomacion se queda sin exto</text:p>
      <text:p text:style-name="P83"/>
      <text:p text:style-name="P84">los numer s diferencian de texto <text:span text:style-name="T25">por las</text:span> comillas</text:p>
      <text:p text:style-name="P84"/>
      <text:p text:style-name="P85">tpos de dat<text:span text:style-name="T26">o</text:span>s javasrcrip</text:p>
      <text:p text:style-name="P86">texto <text:s/>“hola”, “hola” <text:span text:style-name="T27">”</text:span>1”</text:p>
      <text:p text:style-name="P86"/>
      <text:p text:style-name="P86">numerico 23</text:p>
      <text:p text:style-name="P86">logico true false</text:p>
      <text:p text:style-name="P86"/>
      <text:p text:style-name="P87">slash no es cometaio</text:p>
      <text:p text:style-name="P87"/>
      <text:p text:style-name="P88">Variable informacion que uede ir cambiando qe esta en una caja</text:p>
      <text:p text:style-name="P89">reservadas pslabras propias del lnguaje</text:p>
      <text:p text:style-name="P89"/>
      <text:p text:style-name="P90"><text:soft-page-break/>ejercicios logica</text:p>
      <text:p text:style-name="P90"/>
      <text:p text:style-name="P90">secuencias</text:p>
      <text:p text:style-name="P90">iguras</text:p>
      <text:p text:style-name="P90">problemas matematicps</text:p>
      <text:p text:style-name="P90">pruebas escritorio</text:p>
      <text:p text:style-name="P90"/>
      <text:p text:style-name="P90"/>
      <text:p text:style-name="P90"/>
      <text:p text:style-name="P90">desiciones civlos</text:p>
      <text:p text:style-name="P90"/>
      <text:p text:style-name="P90">funcion qie reciba nuero n</text:p>
      <text:p text:style-name="P90"/>
      <text:p text:style-name="P90"/>
      <text:p text:style-name="P90"/>
      <text:p text:style-name="P90"/>
      <text:p text:style-name="P91">variables javascript</text:p>
      <text:p text:style-name="P91"/>
      <text:p text:style-name="P91"/>
      <text:p text:style-name="P91">condicionales</text:p>
      <text:p text:style-name="P91">ciclos</text:p>
      <text:p text:style-name="P91">condicioal tomar una desicion</text:p>
      <text:p text:style-name="P91"/>
      <text:p text:style-name="P91"/>
      <text:p text:style-name="P91"><text:soft-page-break/></text:p>
      <text:p text:style-name="P92">== es <text:s/>una comparacion esxrtricta osea debe ser comparado entre los 2 valores true false</text:p>
      <text:p text:style-name="P92">= asinacion</text:p>
      <text:p text:style-name="P93">mini repaso variables for while y ver matematicas</text:p>
      <text:p text:style-name="P93"/>
      <text:p text:style-name="P93"/>
      <text:p text:style-name="P93"/>
      <text:p text:style-name="P94">10 cosasue se a la progra,acion</text:p>
      <text:p text:style-name="P94">soy s<text:span text:style-name="T28">ocia</text:span>ble</text:p>
      <text:p text:style-name="P94">compromet<text:span text:style-name="T29">i</text:span>d<text:span text:style-name="T28">o</text:span></text:p>
      <text:p text:style-name="P95">empatico</text:p>
      <text:p text:style-name="P95">receptivo</text:p>
      <text:p text:style-name="P94"/>
      <text:p text:style-name="P94"/>
      <text:p text:style-name="P94">javascript for <text:span text:style-name="T30">7</text:span></text:p>
      <text:p text:style-name="P96">github <text:span text:style-name="T30">7</text:span></text:p>
      <text:p text:style-name="P94">funciones <text:span text:style-name="T30">7</text:span></text:p>
      <text:p text:style-name="P94">variables <text:span text:style-name="T30">7</text:span></text:p>
      <text:p text:style-name="P97">switch <text:span text:style-name="T30">7</text:span></text:p>
      <text:p text:style-name="P98">software general <text:span text:style-name="T30">7</text:span></text:p>
      <text:p text:style-name="P98"/>
      <text:p text:style-name="P96"/>
      <text:p text:style-name="P96"/>
      <text:p text:style-name="P99"><text:soft-page-break/>comunicativo</text:p>
      <text:p text:style-name="P99"/>
      <text:p text:style-name="P100">ordenar inventario del vove digital</text:p>
      <text:p text:style-name="P100"/>
      <text:p text:style-name="P100"/>
      <text:p text:style-name="P101">sistema de identoficacion para coputadores</text:p>
      <text:p text:style-name="P104">explicacion n8n para una empresa donde se quiuere predecir si un producto funcionara al futuro miraremos el precio y utilidad</text:p>
      <text:p text:style-name="P102"/>
      <text:p text:style-name="P103">explicacion n8n railway <text:span text:style-name="T31">creacion datos nuev</text:span><text:span text:style-name="T32">o</text:span><text:span text:style-name="T31">s etc</text:span></text:p>
      <text:p text:style-name="P103"/>
      <text:p text:style-name="P103"/>
      <text:p text:style-name="P106">key n8n </text:p>
      <text:p text:style-name="P106"/>
      <text:p text:style-name="P106">b790b38bb46026717282fc25b183da52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8T09:23:48.679390600</meta:creation-date>
    <dc:date>2026-06-20T15:37:44.333932505</dc:date>
    <meta:editing-duration>P9DT20H6M19S</meta:editing-duration>
    <meta:editing-cycles>116</meta:editing-cycles>
    <meta:generator>LibreOffice/24.2.7.2$Linux_X86_64 LibreOffice_project/420$Build-2</meta:generator>
    <meta:document-statistic meta:table-count="0" meta:image-count="6" meta:object-count="0" meta:page-count="26" meta:paragraph-count="243" meta:word-count="1180" meta:character-count="7166" meta:non-whitespace-character-count="6094"/>
  </office:meta>
</office:document-meta>
</file>