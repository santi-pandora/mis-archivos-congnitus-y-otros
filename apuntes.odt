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text-properties fo:font-size="14pt" officeooo:rsid="00030224" officeooo:paragraph-rsid="00030224" style:font-size-asian="14pt" style:font-size-complex="14pt"/>
    </style:style>
    <style:style style:name="P3" style:family="paragraph" style:parent-style-name="Preformatted_20_Text">
      <style:text-properties fo:font-size="14pt" officeooo:rsid="00046d46" officeooo:paragraph-rsid="00046d46" style:font-size-asian="14pt" style:font-size-complex="14pt"/>
    </style:style>
    <style:style style:name="P4" style:family="paragraph" style:parent-style-name="Preformatted_20_Text">
      <style:text-properties fo:font-size="14pt" officeooo:rsid="0004c99b" officeooo:paragraph-rsid="0004c99b" style:font-size-asian="14pt" style:font-size-complex="14pt"/>
    </style:style>
    <style:style style:name="P5" style:family="paragraph" style:parent-style-name="Preformatted_20_Text">
      <style:text-properties fo:font-size="14pt" officeooo:rsid="00075802" officeooo:paragraph-rsid="00075802" style:font-size-asian="14pt" style:font-size-complex="14pt"/>
    </style:style>
    <style:style style:name="P6" style:family="paragraph" style:parent-style-name="Preformatted_20_Text">
      <style:text-properties fo:font-size="14pt" officeooo:rsid="0008270a" officeooo:paragraph-rsid="0008270a" style:font-size-asian="14pt" style:font-size-complex="14pt"/>
    </style:style>
    <style:style style:name="P7" style:family="paragraph" style:parent-style-name="Preformatted_20_Text">
      <style:text-properties fo:font-size="14pt" officeooo:rsid="00092941" officeooo:paragraph-rsid="00092941" style:font-size-asian="14pt" style:font-size-complex="14pt"/>
    </style:style>
    <style:style style:name="P8" style:family="paragraph" style:parent-style-name="Preformatted_20_Text">
      <style:text-properties fo:font-size="14pt" officeooo:rsid="000a13eb" officeooo:paragraph-rsid="000a13eb" style:font-size-asian="14pt" style:font-size-complex="14pt"/>
    </style:style>
    <style:style style:name="P9" style:family="paragraph" style:parent-style-name="Preformatted_20_Text">
      <style:text-properties fo:font-size="14pt" officeooo:rsid="000bb597" officeooo:paragraph-rsid="000bb597" style:font-size-asian="14pt" style:font-size-complex="14pt"/>
    </style:style>
    <style:style style:name="P10" style:family="paragraph" style:parent-style-name="Preformatted_20_Text">
      <style:text-properties fo:font-size="14pt" officeooo:rsid="000c33a7" officeooo:paragraph-rsid="000c33a7" style:font-size-asian="14pt" style:font-size-complex="14pt"/>
    </style:style>
    <style:style style:name="P11" style:family="paragraph" style:parent-style-name="Preformatted_20_Text">
      <style:text-properties fo:font-size="14pt" officeooo:rsid="000d141e" officeooo:paragraph-rsid="000d141e" style:font-size-asian="14pt" style:font-size-complex="14pt"/>
    </style:style>
    <style:style style:name="P12" style:family="paragraph" style:parent-style-name="Preformatted_20_Text">
      <style:text-properties fo:font-size="14pt" officeooo:rsid="000fbe98" officeooo:paragraph-rsid="000e30a3" style:font-size-asian="14pt" style:font-size-complex="14pt"/>
    </style:style>
    <style:style style:name="P13" style:family="paragraph" style:parent-style-name="Preformatted_20_Text">
      <style:text-properties fo:font-size="14pt" officeooo:rsid="000fbe98" officeooo:paragraph-rsid="000fbe98" style:font-size-asian="14pt" style:font-size-complex="14pt"/>
    </style:style>
    <style:style style:name="P14" style:family="paragraph" style:parent-style-name="Preformatted_20_Text">
      <style:text-properties fo:font-size="14pt" officeooo:rsid="0010e7e9" officeooo:paragraph-rsid="0010e7e9" style:font-size-asian="14pt" style:font-size-complex="14pt"/>
    </style:style>
    <style:style style:name="P15" style:family="paragraph" style:parent-style-name="Preformatted_20_Text">
      <style:text-properties fo:font-size="14pt" officeooo:rsid="0014275e" officeooo:paragraph-rsid="0014275e" style:font-size-asian="14pt" style:font-size-complex="14pt"/>
    </style:style>
    <style:style style:name="P16" style:family="paragraph" style:parent-style-name="Preformatted_20_Text">
      <style:text-properties fo:font-size="14pt" officeooo:rsid="00158f2f" officeooo:paragraph-rsid="00158f2f" style:font-size-asian="14pt" style:font-size-complex="14pt"/>
    </style:style>
    <style:style style:name="P17" style:family="paragraph" style:parent-style-name="Preformatted_20_Text">
      <style:text-properties fo:font-size="14pt" officeooo:rsid="001707de" officeooo:paragraph-rsid="001707de" style:font-size-asian="14pt" style:font-size-complex="14pt"/>
    </style:style>
    <style:style style:name="P18" style:family="paragraph" style:parent-style-name="Preformatted_20_Text">
      <style:text-properties fo:font-size="14pt" officeooo:rsid="001811ac" officeooo:paragraph-rsid="001811ac" style:font-size-asian="14pt" style:font-size-complex="14pt"/>
    </style:style>
    <style:style style:name="P19" style:family="paragraph" style:parent-style-name="Preformatted_20_Text">
      <style:text-properties fo:font-size="14pt" officeooo:rsid="0019c35e" officeooo:paragraph-rsid="0019c35e" style:font-size-asian="14pt" style:font-size-complex="14pt"/>
    </style:style>
    <style:style style:name="P20" style:family="paragraph" style:parent-style-name="Preformatted_20_Text">
      <style:text-properties fo:font-size="14pt" officeooo:rsid="0019c5c2" officeooo:paragraph-rsid="0019c5c2" style:font-size-asian="14pt" style:font-size-complex="14pt"/>
    </style:style>
    <style:style style:name="P21" style:family="paragraph" style:parent-style-name="Preformatted_20_Text">
      <style:text-properties fo:font-size="14pt" officeooo:rsid="001aeb0d" officeooo:paragraph-rsid="001aeb0d" style:font-size-asian="14pt" style:font-size-complex="14pt"/>
    </style:style>
    <style:style style:name="P22" style:family="paragraph" style:parent-style-name="Preformatted_20_Text">
      <style:text-properties fo:font-size="14pt" officeooo:rsid="001cea91" officeooo:paragraph-rsid="001cea91" style:font-size-asian="14pt" style:font-size-complex="14pt"/>
    </style:style>
    <style:style style:name="P23" style:family="paragraph" style:parent-style-name="Preformatted_20_Text">
      <style:text-properties fo:font-size="14pt" officeooo:rsid="001dbe32" officeooo:paragraph-rsid="001dbe32" style:font-size-asian="14pt" style:font-size-complex="14pt"/>
    </style:style>
    <style:style style:name="P24" style:family="paragraph" style:parent-style-name="Preformatted_20_Text">
      <style:text-properties fo:font-size="14pt" officeooo:rsid="00219ea8" officeooo:paragraph-rsid="001cea91" style:font-size-asian="14pt" style:font-size-complex="14pt"/>
    </style:style>
    <style:style style:name="P25" style:family="paragraph" style:parent-style-name="Preformatted_20_Text">
      <style:text-properties fo:font-size="14pt" officeooo:rsid="0022eb87" officeooo:paragraph-rsid="0022eb87" style:font-size-asian="14pt" style:font-size-complex="14pt"/>
    </style:style>
    <style:style style:name="P26" style:family="paragraph" style:parent-style-name="Preformatted_20_Text">
      <style:text-properties fo:font-size="14pt" officeooo:rsid="00230452" officeooo:paragraph-rsid="00230452" style:font-size-asian="14pt" style:font-size-complex="14pt"/>
    </style:style>
    <style:style style:name="P27" style:family="paragraph" style:parent-style-name="Preformatted_20_Text">
      <style:text-properties fo:font-size="14pt" officeooo:rsid="0024f744" officeooo:paragraph-rsid="0024f744" style:font-size-asian="14pt" style:font-size-complex="14pt"/>
    </style:style>
    <style:style style:name="P28" style:family="paragraph" style:parent-style-name="Preformatted_20_Text">
      <style:text-properties fo:font-size="14pt" officeooo:rsid="002559ca" officeooo:paragraph-rsid="002559ca" style:font-size-asian="14pt" style:font-size-complex="14pt"/>
    </style:style>
    <style:style style:name="P29" style:family="paragraph" style:parent-style-name="Preformatted_20_Text">
      <style:text-properties fo:font-size="14pt" officeooo:rsid="0027c851" officeooo:paragraph-rsid="0027c851" style:font-size-asian="14pt" style:font-size-complex="14pt"/>
    </style:style>
    <style:style style:name="P30" style:family="paragraph" style:parent-style-name="Preformatted_20_Text">
      <style:text-properties fo:font-size="14pt" officeooo:rsid="002aa1ca" officeooo:paragraph-rsid="002aa1ca" style:font-size-asian="14pt" style:font-size-complex="14pt"/>
    </style:style>
    <style:style style:name="P31" style:family="paragraph" style:parent-style-name="Preformatted_20_Text">
      <style:text-properties fo:font-size="14pt" officeooo:rsid="002cd3f8" officeooo:paragraph-rsid="002cd3f8" style:font-size-asian="14pt" style:font-size-complex="14pt"/>
    </style:style>
    <style:style style:name="P32" style:family="paragraph" style:parent-style-name="Preformatted_20_Text">
      <style:text-properties fo:font-size="14pt" officeooo:rsid="002e50f6" officeooo:paragraph-rsid="002e50f6" style:font-size-asian="14pt" style:font-size-complex="14pt"/>
    </style:style>
    <style:style style:name="P33" style:family="paragraph" style:parent-style-name="Preformatted_20_Text">
      <style:text-properties fo:font-size="14pt" officeooo:rsid="002f670c" officeooo:paragraph-rsid="002f670c" style:font-size-asian="14pt" style:font-size-complex="14pt"/>
    </style:style>
    <style:style style:name="P34" style:family="paragraph" style:parent-style-name="Preformatted_20_Text">
      <style:text-properties fo:font-size="14pt" officeooo:rsid="00323265" officeooo:paragraph-rsid="00323265" style:font-size-asian="14pt" style:font-size-complex="14pt"/>
    </style:style>
    <style:style style:name="P35" style:family="paragraph" style:parent-style-name="Preformatted_20_Text">
      <style:text-properties fo:font-size="14pt" officeooo:rsid="0032a83c" officeooo:paragraph-rsid="0032a83c" style:font-size-asian="14pt" style:font-size-complex="14pt"/>
    </style:style>
    <style:style style:name="P36" style:family="paragraph" style:parent-style-name="Preformatted_20_Text">
      <style:text-properties fo:font-size="14pt" officeooo:rsid="00348a41" officeooo:paragraph-rsid="00348a41" style:font-size-asian="14pt" style:font-size-complex="14pt"/>
    </style:style>
    <style:style style:name="P37" style:family="paragraph" style:parent-style-name="Preformatted_20_Text">
      <style:text-properties fo:font-size="14pt" officeooo:rsid="0037583b" officeooo:paragraph-rsid="0037583b" style:font-size-asian="14pt" style:font-size-complex="14pt"/>
    </style:style>
    <style:style style:name="P38" style:family="paragraph" style:parent-style-name="Preformatted_20_Text">
      <style:text-properties fo:font-size="14pt" officeooo:rsid="0037fe04" officeooo:paragraph-rsid="0037fe04" style:font-size-asian="14pt" style:font-size-complex="14pt"/>
    </style:style>
    <style:style style:name="P39" style:family="paragraph" style:parent-style-name="Standard">
      <style:text-properties fo:font-size="14pt" officeooo:rsid="003b01eb" officeooo:paragraph-rsid="003b01eb" style:font-size-asian="14pt" style:font-size-complex="14pt"/>
    </style:style>
    <style:style style:name="P40" style:family="paragraph" style:parent-style-name="Standard">
      <style:text-properties fo:font-size="14pt" officeooo:rsid="001306b5" officeooo:paragraph-rsid="0038e7ec" style:font-size-asian="14pt" style:font-size-complex="14pt"/>
    </style:style>
    <style:style style:name="P41" style:family="paragraph" style:parent-style-name="Standard">
      <style:text-properties fo:font-size="14pt" officeooo:rsid="003961f0" officeooo:paragraph-rsid="003961f0" style:font-size-asian="14pt" style:font-size-complex="14pt"/>
    </style:style>
    <style:style style:name="P42" style:family="paragraph" style:parent-style-name="Standard">
      <style:text-properties fo:font-size="14pt" officeooo:rsid="003d9837" officeooo:paragraph-rsid="003d9837" style:font-size-asian="14pt" style:font-size-complex="14pt"/>
    </style:style>
    <style:style style:name="P43" style:family="paragraph" style:parent-style-name="Standard">
      <style:text-properties fo:font-size="14pt" officeooo:rsid="003e8ef8" officeooo:paragraph-rsid="003e8ef8" style:font-size-asian="14pt" style:font-size-complex="14pt"/>
    </style:style>
    <style:style style:name="P44" style:family="paragraph" style:parent-style-name="Standard">
      <style:text-properties fo:font-size="14pt" officeooo:rsid="003fcb93" officeooo:paragraph-rsid="003fcb93" style:font-size-asian="14pt" style:font-size-complex="14pt"/>
    </style:style>
    <style:style style:name="P45" style:family="paragraph" style:parent-style-name="Standard">
      <style:text-properties fo:font-size="14pt" officeooo:rsid="003e8ef8" officeooo:paragraph-rsid="0041290f" style:font-size-asian="14pt" style:font-size-complex="14pt"/>
    </style:style>
    <style:style style:name="P46" style:family="paragraph" style:parent-style-name="Standard">
      <style:text-properties fo:font-size="14pt" officeooo:rsid="0041290f" officeooo:paragraph-rsid="0041290f" style:font-size-asian="14pt" style:font-size-complex="14pt"/>
    </style:style>
    <style:style style:name="P47" style:family="paragraph" style:parent-style-name="Standard">
      <style:text-properties fo:font-size="14pt" officeooo:rsid="00426ae6" officeooo:paragraph-rsid="003d9837" style:font-size-asian="14pt" style:font-size-complex="14pt"/>
    </style:style>
    <style:style style:name="P48" style:family="paragraph" style:parent-style-name="Standard">
      <style:text-properties fo:font-size="14pt" officeooo:rsid="005ce342" officeooo:paragraph-rsid="005ce342" style:font-size-asian="14pt" style:font-size-complex="14pt"/>
    </style:style>
    <style:style style:name="P49" style:family="paragraph" style:parent-style-name="Standard">
      <style:text-properties fo:font-size="14pt" officeooo:rsid="004365b0" officeooo:paragraph-rsid="004365b0" style:font-size-asian="14pt" style:font-size-complex="14pt"/>
    </style:style>
    <style:style style:name="P50" style:family="paragraph" style:parent-style-name="Standard">
      <style:text-properties fo:font-size="14pt" officeooo:rsid="00461035" officeooo:paragraph-rsid="00461035" style:font-size-asian="14pt" style:font-size-complex="14pt"/>
    </style:style>
    <style:style style:name="P51" style:family="paragraph" style:parent-style-name="Standard">
      <style:text-properties fo:font-size="14pt" officeooo:rsid="00463d37" officeooo:paragraph-rsid="00463d37" style:font-size-asian="14pt" style:font-size-complex="14pt"/>
    </style:style>
    <style:style style:name="P52" style:family="paragraph" style:parent-style-name="Standard">
      <style:text-properties fo:font-size="14pt" officeooo:rsid="00488633" officeooo:paragraph-rsid="00488633" style:font-size-asian="14pt" style:font-size-complex="14pt"/>
    </style:style>
    <style:style style:name="P53" style:family="paragraph" style:parent-style-name="Standard">
      <style:text-properties fo:font-size="14pt" officeooo:rsid="004b37e8" officeooo:paragraph-rsid="004b37e8" style:font-size-asian="14pt" style:font-size-complex="14pt"/>
    </style:style>
    <style:style style:name="P54" style:family="paragraph" style:parent-style-name="Standard">
      <style:text-properties fo:font-size="14pt" officeooo:rsid="00519da8" officeooo:paragraph-rsid="00519da8" style:font-size-asian="14pt" style:font-size-complex="14pt"/>
    </style:style>
    <style:style style:name="P55" style:family="paragraph" style:parent-style-name="Standard">
      <style:text-properties fo:font-size="14pt" officeooo:rsid="0053d3a0" officeooo:paragraph-rsid="00574fc9" style:font-size-asian="14pt" style:font-size-complex="14pt"/>
    </style:style>
    <style:style style:name="P56" style:family="paragraph" style:parent-style-name="Standard">
      <style:text-properties fo:font-size="14pt" officeooo:rsid="00547918" officeooo:paragraph-rsid="00547918" style:font-size-asian="14pt" style:font-size-complex="14pt"/>
    </style:style>
    <style:style style:name="P57" style:family="paragraph" style:parent-style-name="Standard">
      <style:text-properties fo:font-size="14pt" officeooo:rsid="00574fc9" officeooo:paragraph-rsid="00574fc9" style:font-size-asian="14pt" style:font-size-complex="14pt"/>
    </style:style>
    <style:style style:name="P58" style:family="paragraph" style:parent-style-name="Standard">
      <style:text-properties fo:font-size="14pt" officeooo:rsid="00560de2" officeooo:paragraph-rsid="00560de2" style:font-size-asian="14pt" style:font-size-complex="14pt"/>
    </style:style>
    <style:style style:name="P59" style:family="paragraph" style:parent-style-name="Standard">
      <style:text-properties fo:font-size="14pt" officeooo:rsid="0058f830" officeooo:paragraph-rsid="0058f830" style:font-size-asian="14pt" style:font-size-complex="14pt"/>
    </style:style>
    <style:style style:name="P60" style:family="paragraph" style:parent-style-name="Standard">
      <style:text-properties fo:font-size="16pt" officeooo:rsid="0058f830" officeooo:paragraph-rsid="0058f830" style:font-size-asian="16pt" style:font-size-complex="16pt"/>
    </style:style>
    <style:style style:name="P61" style:family="paragraph" style:parent-style-name="Standard">
      <style:text-properties fo:font-size="16pt" officeooo:rsid="00461035" officeooo:paragraph-rsid="00461035" style:font-size-asian="16pt" style:font-size-complex="16pt"/>
    </style:style>
    <style:style style:name="P62" style:family="paragraph" style:parent-style-name="Standard">
      <style:text-properties fo:font-size="16pt" officeooo:rsid="0060327a" officeooo:paragraph-rsid="0060327a" style:font-size-asian="16pt" style:font-size-complex="16pt"/>
    </style:style>
    <style:style style:name="P63" style:family="paragraph" style:parent-style-name="Standard">
      <style:text-properties fo:font-size="16pt" officeooo:rsid="00563b86" officeooo:paragraph-rsid="00563b86" style:font-size-asian="16pt" style:font-size-complex="16pt"/>
    </style:style>
    <style:style style:name="P64" style:family="paragraph" style:parent-style-name="Standard">
      <style:text-properties fo:font-size="14pt" officeooo:rsid="00563b86" officeooo:paragraph-rsid="00563b86" style:font-size-asian="14pt" style:font-size-complex="14pt"/>
    </style:style>
    <style:style style:name="P65" style:family="paragraph" style:parent-style-name="Standard">
      <style:paragraph-properties fo:margin-left="0cm" fo:margin-right="0cm" fo:text-indent="0cm" style:auto-text-indent="false"/>
    </style:style>
    <style:style style:name="P66" style:family="paragraph" style:parent-style-name="Standard">
      <style:text-properties fo:font-size="16pt" officeooo:rsid="00632a31" officeooo:paragraph-rsid="00632a31" style:font-size-asian="16pt" style:font-size-complex="16pt"/>
    </style:style>
    <style:style style:name="P67" style:family="paragraph" style:parent-style-name="Standard">
      <style:text-properties fo:font-size="16pt" officeooo:rsid="006400ee" officeooo:paragraph-rsid="006400ee" style:font-size-asian="16pt" style:font-size-complex="16pt"/>
    </style:style>
    <style:style style:name="P68" style:family="paragraph" style:parent-style-name="Standard">
      <style:text-properties fo:font-size="16pt" officeooo:rsid="006449ca" officeooo:paragraph-rsid="006449ca" style:font-size-asian="16pt" style:font-size-complex="16pt"/>
    </style:style>
    <style:style style:name="P69" style:family="paragraph" style:parent-style-name="Standard">
      <style:text-properties fo:font-size="16pt" fo:language="es" fo:country="CO" officeooo:rsid="0066e4a3" officeooo:paragraph-rsid="007e37aa" style:font-size-asian="16pt" style:font-size-complex="16pt"/>
    </style:style>
    <style:style style:name="P70" style:family="paragraph" style:parent-style-name="Standard">
      <style:text-properties fo:font-size="16pt" fo:language="es" fo:country="CO" officeooo:rsid="00675c95" officeooo:paragraph-rsid="007e37aa" style:font-size-asian="16pt" style:font-size-complex="16pt"/>
    </style:style>
    <style:style style:name="P71" style:family="paragraph" style:parent-style-name="Standard">
      <style:text-properties fo:font-size="16pt" fo:language="es" fo:country="CO" officeooo:rsid="008c60fd" officeooo:paragraph-rsid="008c60fd" style:font-size-asian="16pt" style:font-size-complex="16pt"/>
    </style:style>
    <style:style style:name="P72" style:family="paragraph" style:parent-style-name="Standard">
      <style:text-properties fo:font-size="16pt" fo:language="es" fo:country="CO" officeooo:rsid="008a6808" officeooo:paragraph-rsid="008a6808" style:font-size-asian="16pt" style:font-size-complex="16pt"/>
    </style:style>
    <style:style style:name="P73" style:family="paragraph" style:parent-style-name="Standard">
      <style:text-properties fo:font-size="16pt" fo:language="es" fo:country="ES" officeooo:rsid="0072fa0b" officeooo:paragraph-rsid="00871807" style:font-size-asian="16pt" style:font-size-complex="16pt"/>
    </style:style>
    <style:style style:name="P74" style:family="paragraph" style:parent-style-name="Standard">
      <style:text-properties fo:font-size="16pt" fo:language="es" fo:country="CO" officeooo:rsid="00871807" officeooo:paragraph-rsid="00871807" style:font-size-asian="16pt" style:font-size-complex="16pt"/>
    </style:style>
    <style:style style:name="P75" style:family="paragraph" style:parent-style-name="Standard">
      <style:text-properties fo:font-size="16pt" fo:language="es" fo:country="CO" officeooo:rsid="00878e57" officeooo:paragraph-rsid="00878e57" style:font-size-asian="16pt" style:font-size-complex="16pt"/>
    </style:style>
    <style:style style:name="P76" style:family="paragraph" style:parent-style-name="Standard">
      <style:text-properties fo:font-size="16pt" fo:language="es" fo:country="CO" officeooo:rsid="00675c95" officeooo:paragraph-rsid="00871807" style:font-size-asian="16pt" style:font-size-complex="16pt"/>
    </style:style>
    <style:style style:name="P77" style:family="paragraph" style:parent-style-name="Standard">
      <style:text-properties fo:font-size="16pt" fo:language="es" fo:country="CO" officeooo:rsid="008df61a" officeooo:paragraph-rsid="008df61a" style:font-size-asian="16pt" style:font-size-complex="16pt"/>
    </style:style>
    <style:style style:name="P78" style:family="paragraph" style:parent-style-name="Standard">
      <style:text-properties fo:font-size="16pt" fo:language="es" fo:country="CO" officeooo:rsid="008fa02d" officeooo:paragraph-rsid="008fa02d" style:font-size-asian="16pt" style:font-size-complex="16pt"/>
    </style:style>
    <style:style style:name="P79" style:family="paragraph" style:parent-style-name="Standard">
      <style:text-properties fo:font-size="16pt" fo:language="es" fo:country="CO" officeooo:rsid="0066e4a3" officeooo:paragraph-rsid="0066e4a3" style:font-size-asian="16pt" style:font-size-complex="16pt"/>
    </style:style>
    <style:style style:name="T1" style:family="text">
      <style:text-properties officeooo:rsid="00866cb8"/>
    </style:style>
    <style:style style:name="T2" style:family="text">
      <style:text-properties officeooo:rsid="001707de"/>
    </style:style>
    <style:style style:name="T3" style:family="text">
      <style:text-properties officeooo:rsid="001ffd4e"/>
    </style:style>
    <style:style style:name="T4" style:family="text">
      <style:text-properties officeooo:rsid="00273dbb"/>
    </style:style>
    <style:style style:name="T5" style:family="text">
      <style:text-properties officeooo:rsid="00174a52"/>
    </style:style>
    <style:style style:name="T6" style:family="text">
      <style:text-properties officeooo:rsid="001681be"/>
    </style:style>
    <style:style style:name="T7" style:family="text">
      <style:text-properties officeooo:rsid="003c7834"/>
    </style:style>
    <style:style style:name="T8" style:family="text">
      <style:text-properties officeooo:rsid="00426ae6"/>
    </style:style>
    <style:style style:name="T9" style:family="text">
      <style:text-properties officeooo:rsid="003e8ef8"/>
    </style:style>
    <style:style style:name="T10" style:family="text">
      <style:text-properties officeooo:rsid="0041290f"/>
    </style:style>
    <style:style style:name="T11" style:family="text">
      <style:text-properties officeooo:rsid="004365b0"/>
    </style:style>
    <style:style style:name="T12" style:family="text">
      <style:text-properties officeooo:rsid="004e4957"/>
    </style:style>
    <style:style style:name="T13" style:family="text">
      <style:text-properties officeooo:rsid="00488633"/>
    </style:style>
    <style:style style:name="T14" style:family="text">
      <style:text-properties officeooo:rsid="0058f830"/>
    </style:style>
    <style:style style:name="T15" style:family="text">
      <style:text-properties officeooo:rsid="0049a520"/>
    </style:style>
    <style:style style:name="T16" style:family="text">
      <style:text-properties officeooo:rsid="004cd2aa"/>
    </style:style>
    <style:style style:name="T17" style:family="text">
      <style:text-properties officeooo:rsid="004fce52"/>
    </style:style>
    <style:style style:name="T18" style:family="text">
      <style:text-properties officeooo:rsid="0052e481"/>
    </style:style>
    <style:style style:name="T19" style:family="text">
      <style:text-properties officeooo:rsid="00574fc9"/>
    </style:style>
    <style:style style:name="T20" style:family="text">
      <style:text-properties officeooo:rsid="00542485"/>
    </style:style>
    <style:style style:name="T21" style:family="text">
      <style:text-properties officeooo:rsid="00560de2"/>
    </style:style>
    <style:style style:name="T22" style:family="text">
      <style:text-properties officeooo:rsid="005c1d46"/>
    </style:style>
    <style:style style:name="T23" style:family="text">
      <style:text-properties officeooo:rsid="0061edc9"/>
    </style:style>
    <style:style style:name="T24" style:family="text">
      <style:text-properties fo:font-size="16pt" style:font-size-asian="16pt" style:font-size-complex="16pt"/>
    </style:style>
    <style:style style:name="T25" style:family="text">
      <style:text-properties officeooo:rsid="006400ee"/>
    </style:style>
    <style:style style:name="T26" style:family="text">
      <style:text-properties officeooo:rsid="00871807"/>
    </style:style>
    <style:style style:name="T27" style:family="text">
      <style:text-properties officeooo:rsid="008c60fd"/>
    </style:style>
    <style:style style:name="T28" style:family="text">
      <style:text-properties officeooo:rsid="008920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api</text:p>
      <text:p text:style-name="P1">pruebas unitarias </text:p>
      <text:p text:style-name="P1">esta funcionando mañl el inicio de sesion ya q<text:span text:style-name="T1">u</text:span>e le devyekve datos malos</text:p>
      <text:p text:style-name="P1"/>
      <text:p text:style-name="P1">Una API <text:s/>es un conjunto de definiciones y protocolos que se utiliza para desarrollar e integrar los sistemas de software de las aplicaciones. Suele considerarse como el contrato entre el usuario y el <text:s/>proveedor de información, en el cual se establece el contenido que se necesita por parte del consumidor (la llamada) y el que requiere el productor (la respuesta). Por ejemplo, el diseño de una API <text:s/>de servicio meteorológico podría requerir que el usuario escribiera un código postal <text:s/>y que el productor diera una respuesta en dos partes: la primera sería la temperatura máxima y la segunda sería la mínima. </text:p>
      <text:p text:style-name="P1"/>
      <text:p text:style-name="P1">REST</text:p>
      <text:p text:style-name="P1">REST no es un protocolo ni un estándar, sino más bien un conjunto de límites relacionados con la arquitectura. Los desarrolladores de las API pueden implementarlo de distintas maneras.</text:p>
      <text:p text:style-name="P1"/>
      <text:p text:style-name="P1">Cuando el cliente envía una solicitud a través de una API de RESTful, esta transfiere una representación del estado del recurso requerido a quien lo haya solicitado o al extremo. La información se entrega por medio de HTTP en uno de estos formatos: JSON (JavaScript Object Notation), HTML, XLT, Python, PHP o texto sin formato. JSON es el formato de archivo más conocido, ya que tanto las máquinas como las personas pueden comprenderlo, y no depende de ningún lenguaje, a pesar de que su nombre indique lo contrario. </text:p>
      <text:p text:style-name="P1"/>
      <text:p text:style-name="P1">Asimismo, es necesario tener en cuenta otro aspecto: los <text:s/>encabezados <text:s/>y los parámetros también son importantes en los <text:s/>métodos HTTP <text:s/>de la <text:s/>solicitud HTTP de la API de RESTful, ya que contienen información de <text:s/>identificación <text:s/>esencial sobre los metadatos, la autorización, el identificador uniforme de recursos (URI), el almacenamiento en caché, las cookies y otros elementos de la <text:s/>solicitud. Hay encabezados de <text:s/>solicitud y <text:s/>de <text:s/>respuesta, y cada uno tiene sus propios códigos de estado e información de conexión HTTP.</text:p>
      <text:p text:style-name="P1"><text:soft-page-break/></text:p>
      <text:p text:style-name="P1">Para que una API se considere de RESTful, debe tener:</text:p>
      <text:p text:style-name="P1"/>
      <text:p text:style-name="P1">Una arquitectura cliente-servidor compuesta de clientes, servidores y recursos, con la gestión de solicitudes a través de HTTP.</text:p>
      <text:p text:style-name="P1">Una comunicación entre el cliente y el servidor sin estado, lo cual implica que no se almacena la información del cliente entre las solicitudes GET y que cada una de ellas es independiente y está desconectada del resto.</text:p>
      <text:p text:style-name="P1">Datos que puedan almacenarse en caché y optimicen las interacciones entre el cliente y el servidor.</text:p>
      <text:p text:style-name="P1">Una interfaz uniforme entre elementos que permita que la información se transfiera de manera <text:s/>estándar, para lo cual:</text:p>
      <text:p text:style-name="P1">Los recursos solicitados deben ser identificables e independientes de las representaciones enviadas al cliente.</text:p>
      <text:p text:style-name="P1">El cliente debe poder manipular los recursos a través de la representación que recibe, ya que esta contiene suficiente información para ello.</text:p>
      <text:p text:style-name="P1">Los mensajes autodescriptivos que se envíen al cliente deben contener la información necesaria para describir la manera de procesarla.</text:p>
      <text:p text:style-name="P1">Debe contener hipertexto o hipermedios, lo cual significa que cuando el cliente <text:s/>acceda a algún recurso, tiene que poder utilizar hipervínculos para buscar las demás acciones que se encuentren disponibles en ese momento.</text:p>
      <text:p text:style-name="P1">Un sistema en capas que organiza en jerarquías invisibles <text:s/>para <text:s/>el cliente cada tipo de servidores (los encargados de la seguridad, del equilibrio de carga, etc.) que participan en la recuperación de la información solicitada.</text:p>
      <text:p text:style-name="P1">El código disponible según se solicite (opcional), es decir, la capacidad para enviar códigos ejecutables del servidor al cliente cuando se requiera, lo cual amplía las funciones del cliente. </text:p>
      <text:p text:style-name="P1"><text:s/></text:p>
      <text:p text:style-name="P1"><text:s/>Qué es Xano?</text:p>
      <text:p text:style-name="P1">Xano es una plataforma de desarrollo de backend sin código que ayuda a los usuarios a crear aplicaciones escalables y seguras sin escribir ningún código. Ofrece una solución completa de backend como servicio (BaaS), que incluye una base de datos flexible, un generador de API y herramientas de automatización.</text:p>
      <text:p text:style-name="P1"><text:soft-page-break/></text:p>
      <text:p text:style-name="P1">Con Xano, puede crear flujos de trabajo complejos, integrarse con servicios externos y administrar datos de manera eficiente. Es compatible con la implementación sin servidor, lo que garantiza un alto rendimiento y escalabilidad.</text:p>
      <text:p text:style-name="P1"/>
      <text:p text:style-name="P1">Diseñado para desarrolladores, startups y empresas, Xano simplifica el desarrollo de back-end, permitiendo a los usuarios centrarse en la construcción de sus aplicaciones sin preocuparse por la infraestructura. Es una poderosa alternativa a la codificación tradicional para el desarrollo de back-end.</text:p>
      <text:p text:style-name="P1"/>
      <text:p text:style-name="P1">Características clave de Xano</text:p>
      <text:p text:style-name="P1">Gestión de Bases de Datos Escalables – Almacene y administre sus datos con la base de datos PostgreSQL incorporada de Xanoana. Puede crear y modificar tablas, establecer relaciones y filtrar datos sin necesidad de servicios de bases de datos externas.</text:p>
      <text:p text:style-name="P1">API Escalables Generadas Automáticamente – Cada vez que creas una base de datos, Xano genera automáticamente API RESTful para ti. Estas API son totalmente escalables, lo que garantiza que su aplicación pueda manejar las crecientes demandas de los usuarios sin problemas de rendimiento.</text:p>
      <text:p text:style-name="P1">Lógica Empresarial con Funciones Sin Código – Puede automatizar los flujos de trabajo y aplicar reglas comerciales utilizando la pila de funciones de Xanoana. Le permite manipular datos, conectarse a servicios externos y procesar operaciones complejas visualmente.</text:p>
      <text:p text:style-name="P1">Integraciones de Terceros sin Costuras – Conéctese con API externas, pasarelas de pago, servicios de autenticación y más. Xano proporciona herramientas integradas para solicitudes de API, webhooks y sincronización de datos externos.</text:p>
      <text:p text:style-name="P1">Autenticación de Usuario y Seguridad – Asegure su backend con autenticación de usuario incorporada, acceso basado en roles y puntos finales de API cifrados. Puede administrar registros, inicios de sesión y permisos sin complementos adicionales.</text:p>
      <text:p text:style-name="P1">Alojamiento sin Servidor y Auto-Escala – No necesitas preocuparte por los servidores. Xano aloja su backend en una infraestructura escalable, ajustando automáticamente los recursos según la demanda para mantener su aplicación <text:soft-page-break/>funcionando sin problemas.</text:p>
      <text:p text:style-name="P1">Control de Versiones y Copias de Seguridad de Datos – Realice cambios con confianza con el control de versiones incorporado de Xanoana. Sus datos se respaldan automáticamente, por lo que puede restaurar versiones anteriores si es necesario.</text:p>
      <text:p text:style-name="P1">Creador de Consultas con Energía AI – Xano simplifica las consultas complejas con un constructor impulsado por IA que te ayuda a recuperar, filtrar y procesar datos de manera eficiente, sin escribir SQL.</text:p>
      <text:p text:style-name="P1">Despliegue Multiambiental – Prueba, organiza e implementa tu backend con diferentes entornos. Puede realizar actualizaciones de forma segura sin afectar su aplicación en vivo.</text:p>
      <text:p text:style-name="P1">Beneficios de Xano</text:p>
      <text:p text:style-name="P1">Desarrollo de Backend más rápido – Puede acelerar su proceso de desarrollo omitiendo la necesidad de codificar la lógica del backend o las API. Las herramientas de automatización y arrastrar y soltar de Xanoa le ayudan a iniciar el backend de sus aplicaciones rápidamente.</text:p>
      <text:p text:style-name="P1">Reduce el Esfuerzo de Mantenimiento – Con la infraestructura sin servidor, no tiene que administrar servidores, preocuparse por escalar o realizar actualizaciones manuales. Xano se encarga del mantenimiento del backend, por lo que puede concentrarse en construir su aplicación.</text:p>
      <text:p text:style-name="P1">Integración perfecta con Frontend Builders – Puedes conectar fácilmente Xano a herramientas frontend como Bubble, Webflow o Adalo. Actúa como un backend confiable, administrando sus datos y solicitudes de API mientras su frontend maneja las interacciones de los usuarios.</text:p>
      <text:p text:style-name="P1">Sin Bloqueo de Proveedores – A diferencia de otras plataformas sin código, Xano ofrece flexibilidad al permitirle exportar su lógica y datos de API. Esto garantiza que mantenga el control total sobre su backend si decide migrar más tarde.</text:p>
      <text:p text:style-name="P1">Mejora la Colaboración – Teams puede colaborar mejor administrando diferentes entornos (desarrollo, pruebas y producción) dentro de Xano, lo que facilita la implementación de cambios sin interrumpir la aplicación en vivo.</text:p>
      <text:p text:style-name="P1">Limitaciones de Xano</text:p>
      <text:p text:style-name="P1">Curva de Aprendizaje Empinada – Mientras Xano es una herramienta de backend sin código, comprender bases de datos, API y flujos lógicos aún puede ser un desafío para <text:soft-page-break/>los principiantes. Es posible que necesite algo de tiempo para sentirse cómodo con su interfaz y funcionalidades.</text:p>
      <text:p text:style-name="P1">Capacidades Limitadas de Frontend – Xano se enfoca solo en el desarrollo de backend, lo que significa que necesitarás una herramienta separada como Bubble, Webflow o FlutterFlow para construir la interfaz de usuario de tus aplicaciones.</text:p>
      <text:p text:style-name="P1">No hay Soporte de Aplicaciones Móviles Nativas – A diferencia de otras plataformas sin código, Xano no ofrece herramientas integradas para desarrollar aplicaciones móviles nativas. Debe conectarlo con creadores de aplicaciones externos para el desarrollo móvil.</text:p>
      <text:p text:style-name="P1">Falta de Plantillas Pre-Construidas – A diferencia de otras plataformas sin código, Xano no proporciona plantillas listas para usar para tipos de aplicaciones comunes. Debe construir todo desde cero, lo que puede ralentizar la configuración inicial.</text:p>
      <text:p text:style-name="P1">Características Limitadas en Tiempo Real – Xano no tiene actualizaciones integradas de bases de datos en tiempo real como Firebase. Si su aplicación requiere actualizaciones instantáneas (por ejemplo, chat en vivo o edición colaborativa), deberá integrar soluciones de terceros.</text:p>
      <text:p text:style-name="P1">Dependencias de Hosting Externo – Dado que Xano es una solución alojada, confía en sus servidores para el tiempo de actividad y el rendimiento. Si hay problemas de tiempo de inactividad o del servidor, el backend de sus aplicaciones puede verse afectado.</text:p>
      <text:p text:style-name="P1">Menos Recursos de Aprendizaje en comparación con los Competidores – Si bien Xano tiene documentación y tutoriales, tiene una comunidad más pequeña en comparación con plataformas como Firebase o Airtable, lo que dificulta la búsqueda de guías y soluciones generadas por los usuarios.</text:p>
      <text:p text:style-name="P1"/>
      <text:p text:style-name="P1">son pruebas oara ver como funciona el xcxidigonen ciertas sutuaciones</text:p>
      <text:p text:style-name="P1"/>
      <text:p text:style-name="P1">ademas que <text:s/>expect usted envio lo <text:tab/>ye quiere quye le apareazca cpomo respuesta quiere quye le apareazca cpomo respuesta</text:p>
      <text:p text:style-name="P1"/>
      <text:p text:style-name="P1"/>
      <text:p text:style-name="P1"/>
      <text:p text:style-name="P1"><text:soft-page-break/>diagrama flujo: es una manera de representar priceso o algortitmo a traves de una serie de psasos estructurados</text:p>
      <text:p text:style-name="P1">como vinculasos como un todo</text:p>
      <text:p text:style-name="P1"/>
      <text:p text:style-name="P1">estas utilizan una serie de forguras goeometricas degfinisas de ante mano ademas del camino del proceso y se usan los siguiemtes simbolos:Símbolos del diagrama de flujo</text:p>
      <text:p text:style-name="P1">Existen notaciones y elementos estándar que se utilizan en la mayoría de los flujogramas. Cada símbolo representa una acción o paso diferente dentro de una secuencia o proceso. A continuación destacamos los símbolos más comunes:</text:p>
      <text:p text:style-name="P1"/>
      <text:p text:style-name="P1">Óvalo</text:p>
      <text:p text:style-name="P1">Un elemento ovalado en un diagrama de flujo representa el terminal. En otras palabras, indica el inicio y la parada dentro de una secuencia.</text:p>
      <text:p text:style-name="P1"/>
      <text:p text:style-name="P1">Paralelogramos</text:p>
      <text:p text:style-name="P1">El paralelogramo indica una entrada o una salida.</text:p>
      <text:p text:style-name="P1"/>
      <text:p text:style-name="P1">Rectángulos</text:p>
      <text:p text:style-name="P1">Los rectángulos indican las acciones.</text:p>
      <text:p text:style-name="P1"/>
      <text:p text:style-name="P1">Diamantes</text:p>
      <text:p text:style-name="P1">Los diamantes indican las decisiones que hay que tomar. Suelen dar lugar a dos caminos alternativos en función de la decisión tomada.</text:p>
      <text:p text:style-name="P1"/>
      <text:p text:style-name="P1">Con la programaxion no hay limite </text:p>
      <text:p text:style-name="P1">puedes cponectar todo lo que quieras</text:p>
      <text:p text:style-name="P1">ademas puedes usar tu imaginacion</text:p>
      <text:p text:style-name="P1">en la mayoria de losa casos es cierto</text:p>
      <text:p text:style-name="P1">y programar es dar ordenes a una computadora que obedecera al pie de la letra</text:p>
      <text:p text:style-name="P1">el algiritmo es una serie de pasos para llegar a un bojetivo</text:p>
      <text:p text:style-name="P1">deben ser ordebados</text:p>
      <text:p text:style-name="P1">algoritmo es un serie de <text:s/>instrucciones escritos en un lenguaje de rogramacion que puede entender una computadora </text:p>
      <text:p text:style-name="P1">ejemplos: phyton, php</text:p>
      <text:p text:style-name="P1">php es muy demandado</text:p>
      <text:p text:style-name="P1">facil de entender</text:p>
      <text:p text:style-name="P1"><text:soft-page-break/>flexible</text:p>
      <text:p text:style-name="P1">php no esta muerto</text:p>
      <text:p text:style-name="P1"/>
      <text:p text:style-name="P1">php es un lengfiaje general del lado del proceso significa hypertext processor</text:p>
      <text:p text:style-name="P1"/>
      <text:p text:style-name="P1">html: hypertext marcart lenguage</text:p>
      <text:p text:style-name="P1"/>
      <text:p text:style-name="P1">pre processor de html</text:p>
      <text:p text:style-name="P1">html con esteroides</text:p>
      <text:p text:style-name="P1">es de ptoposito general</text:p>
      <text:p text:style-name="P1">tipado debil</text:p>
      <text:p text:style-name="P1">comados en la terminal</text:p>
      <text:p text:style-name="P1">de alto nivel es facil de comprebder</text:p>
      <text:p text:style-name="P1">de bajo bnivel es dificil e comprender</text:p>
      <text:p text:style-name="P1"><text:s/>puedes hacerlo con php pero no es obligatorio</text:p>
      <text:p text:style-name="P1">php no eta en ebn el 79% de <text:s/>mundo</text:p>
      <text:p text:style-name="P1">usan php el 53% version 7</text:p>
      <text:p text:style-name="P1">wordpress esta basado en pho</text:p>
      <text:p text:style-name="P1"/>
      <text:p text:style-name="P1">php en hack queesta en php ademas de javascript y node js</text:p>
      <text:p text:style-name="P1">react js surgio <text:s/>on php</text:p>
      <text:p text:style-name="P1">wikipedia</text:p>
      <text:p text:style-name="P1">usa phpslack usa php</text:p>
      <text:p text:style-name="P1">php es una herramienta no una reñiofion</text:p>
      <text:p text:style-name="P1">puede usarse para resolver problemas</text:p>
      <text:p text:style-name="P1">backend con pjina web backend</text:p>
      <text:p text:style-name="P1">esto se hace atraves de <text:s/>cliente servidores</text:p>
      <text:p text:style-name="P1">el <text:s/>servidor se divbido en servidor fisico y sevidor viruall fisico es donbde se gusarda los componentes del sevidor virtual el fisco esta 24/7 parta tu comodidad por que sioempre esta conectado a internet el servirdor virtual es un programa qie se encsrga dse gestionar las solicitiudes al servidor fisico</text:p>
      <text:p text:style-name="P1">los atraves de oeticiones que dan ciertas respuestas</text:p>
      <text:p text:style-name="P1">a traves del lenguaje elegido este procesa tu àjina hasta que devielve la infoormacion en <text:s/>el <text:s/>f4rontened <text:s/>y la solicotud se muestra en establece</text:p>
      <text:p text:style-name="P1">los terminos usados por el servidor son</text:p>
      <text:p text:style-name="P1">get</text:p>
      <text:p text:style-name="P1">pist put y delete peeo ysas un soft delete para borraelo en el cliente y no el sevidor </text:p>
      <text:p text:style-name="P1">estps metodps se lla,a http</text:p>
      <text:p text:style-name="P1"/>
      <text:p text:style-name="P1">phop en del lenguaje servoidor</text:p>
      <text:p text:style-name="P1"><text:soft-page-break/></text:p>
      <text:p text:style-name="P1">un uso general</text:p>
      <text:p text:style-name="P1"/>
      <text:p text:style-name="P1">shymphony y larabel</text:p>
      <text:p text:style-name="P1">en <text:s/>poara php</text:p>
      <text:p text:style-name="P1"/>
      <text:p text:style-name="P1">cliente vende y compra venta</text:p>
      <text:p text:style-name="P1">nektoba</text:p>
      <text:p text:style-name="P1">provedores cgrande</text:p>
      <text:p text:style-name="P1">stroke</text:p>
      <text:p text:style-name="P1">ventas</text:p>
      <text:p text:style-name="P1">lo manehjakmos nosotrs ayudakmos cion eso</text:p>
      <text:p text:style-name="P1">todos los productos enviados y algunos estan mal</text:p>
      <text:p text:style-name="P1">devolver i un endpoint no tiene nada qe ytenga quecver coj status </text:p>
      <text:p text:style-name="P1">se cambia el status+</text:p>
      <text:p text:style-name="P1">swtop and debug es para ver un valor en especificoi</text:p>
      <text:p text:style-name="P1">new corner flow</text:p>
      <text:p text:style-name="P1">cosas generales aaprender</text:p>
      <text:p text:style-name="P1"/>
      <text:p text:style-name="P1">se elimina rama si usted lo nbecesita</text:p>
      <text:p text:style-name="P1">puedo trabajar con varios compañeros</text:p>
      <text:p text:style-name="P1">ramas diferentes</text:p>
      <text:p text:style-name="P1">no tenerlas tan amotonadas</text:p>
      <text:p text:style-name="P1">intentar aprender mas de xano</text:p>
      <text:p text:style-name="P1"/>
      <text:p text:style-name="P1">mi puesto de trabajo adecuado</text:p>
      <text:p text:style-name="P1">soy un independiente</text:p>
      <text:p text:style-name="P1">recomendaciones</text:p>
      <text:p text:style-name="P1">cambios de posicion descansar cada 30minutos</text:p>
      <text:p text:style-name="P1">comunica</text:p>
      <text:p text:style-name="P2">poliza seguro por vda y normal</text:p>
      <text:p text:style-name="P2">ejemploe nfermo y necesito volver esta volvera</text:p>
      <text:p text:style-name="P2"/>
      <text:p text:style-name="P2">longevo</text:p>
      <text:p text:style-name="P2">nutricion, salud y mental</text:p>
      <text:p text:style-name="P2">seguros sura</text:p>
      <text:p text:style-name="P2"/>
      <text:p text:style-name="P2"/>
      <text:p text:style-name="P3">vivemax sin necesidad de esperar a cincaoacitarse**</text:p>
      <text:p text:style-name="P4">crome si se para jodidos</text:p>
      <text:p text:style-name="P4">middleweare</text:p>
      <text:p text:style-name="P4">crome propia tarea propgramada</text:p>
      <text:p text:style-name="P4">request history</text:p>
      <text:p text:style-name="P4">token para api de ellos</text:p>
      <text:p text:style-name="P4"><text:soft-page-break/>middleweare <text:s/>poara arreglar token malo</text:p>
      <text:p text:style-name="P4">no deberia responder</text:p>
      <text:p text:style-name="P5">trae <text:s/>el token luiego trae</text:p>
      <text:p text:style-name="P5">jo ser tan precos</text:p>
      <text:p text:style-name="P5"/>
      <text:p text:style-name="P6">mi pri8mera tarea crear un crud</text:p>
      <text:p text:style-name="P7">crud+logs</text:p>
      <text:p text:style-name="P7"/>
      <text:p text:style-name="P8">nombre identidad y modulo</text:p>
      <text:p text:style-name="P8"/>
      <text:p text:style-name="P8">campo sku columnas</text:p>
      <text:p text:style-name="P9">null</text:p>
      <text:p text:style-name="P9">valor por defecto no</text:p>
      <text:p text:style-name="P9">no se pyede cumplir condicion</text:p>
      <text:p text:style-name="P9">llvar cuentas del coluente</text:p>
      <text:p text:style-name="P9">quye es rentable</text:p>
      <text:p text:style-name="P10">en generate sample data edit <text:s/>según su catrateristicas</text:p>
      <text:p text:style-name="P11">malana contonuación</text:p>
      <text:p text:style-name="P8"/>
      <text:p text:style-name="P12"/>
      <text:p text:style-name="P13"/>
      <text:p text:style-name="P13">retroalimentación</text:p>
      <text:p text:style-name="P13"/>
      <text:p text:style-name="P13">lenguaje corporal y contexto</text:p>
      <text:p text:style-name="P13">revelante y adecuado</text:p>
      <text:p text:style-name="P14">motivacion y compromiso del equipo</text:p>
      <text:p text:style-name="P14">feedback</text:p>
      <text:p text:style-name="P14">tiempos de cambuio</text:p>
      <text:p text:style-name="P14">resilencia e creatividad</text:p>
      <text:p text:style-name="P15">charlie product oner</text:p>
      <text:p text:style-name="P15">desiciones tenicas juan y yo</text:p>
      <text:p text:style-name="P15">conmigo</text:p>
      <text:p text:style-name="P15">subirlo en un bucket</text:p>
      <text:p text:style-name="P15"/>
      <text:p text:style-name="P15">helper a c3</text:p>
      <text:p text:style-name="P15">desarrollo tablas en si tu quieras</text:p>
      <text:p text:style-name="P15">crear rama desde develo</text:p>
      <text:p text:style-name="P15"/>
      <text:p text:style-name="P16">to lower</text:p>
      <text:p text:style-name="P16">a minuscula<text:span text:style-name="T2">lower caxe minuscula </text:span></text:p>
      <text:p text:style-name="P17">hyper case: mayuscula</text:p>
      <text:p text:style-name="P17"/>
      <text:p text:style-name="P17">per_pafe y page es para pajomacion?</text:p>
      <text:p text:style-name="P18">S3 imagenes</text:p>
      <text:p text:style-name="P19">backup desactobar en merge</text:p>
      <text:p text:style-name="P19"><text:soft-page-break/>uoload_image amazon so3</text:p>
      <text:p text:style-name="P20">archivo temporal</text:p>
      <text:p text:style-name="P21">mañana reunuion carlo flaco y yo </text:p>
      <text:p text:style-name="P22">pridiuct one solo comunica con el ecluente </text:p>
      <text:p text:style-name="P22">back comunicarse c9on el getcliente </text:p>
      <text:p text:style-name="P22"/>
      <text:p text:style-name="P22">imagen opcional <text:span text:style-name="T3">ya</text:span></text:p>
      <text:p text:style-name="P22">alterar estado <text:span text:style-name="T3">ya</text:span></text:p>
      <text:p text:style-name="P22">rest api</text:p>
      <text:p text:style-name="P23">na es vacio</text:p>
      <text:p text:style-name="P22"><text:s/></text:p>
      <text:p text:style-name="P22">don carlos buenos días don carlos una duda con quien me puedo comunicar para lo de vusta de aplicacion para la vista de priductos?</text:p>
      <text:p text:style-name="P24"><text:s/>Comparaciones</text:p>
      <text:p text:style-name="P24"/>
      <text:p text:style-name="P25">precindicion = pensar antes de el</text:p>
      <text:p text:style-name="P25">mira si no se cumple el if bot&lt; el error</text:p>
      <text:p text:style-name="P26">una coprecondicion es algo que se debe cumplir antes de la ejecucion de una porcion de <text:s/>codigo como ekemplo si</text:p>
      <text:p text:style-name="P26">pes_liga != null</text:p>
      <text:p text:style-name="P26">se creara el elemento</text:p>
      <text:p text:style-name="P26">pes_liga == null</text:p>
      <text:p text:style-name="P26">se actualizara si existe este elemento</text:p>
      <text:p text:style-name="P27">osea pre signifca que si cumple una cinducion anbtes de comenzar lo hara</text:p>
      <text:p text:style-name="P26"/>
      <text:p text:style-name="P28">aws amazon web services</text:p>
      <text:p text:style-name="P28">es la nube mas completa del mundo es donde se ofrece mas de 200 servocios integrados a nivel mundial ayudando a clientes a tranakar mas rapido.</text:p>
      <text:p text:style-name="P28">Uj bucjet s3 es un contenedor donde se almacen objetos <text:s/>de amazon s3</text:p>
      <text:p text:style-name="P28">puede almacenar cualquier bucjet y se puede contener hasta 100 de estos</text:p>
      <text:p text:style-name="P28"><text:s/><text:span text:style-name="T4">url imagen</text:span></text:p>
      <text:p text:style-name="P28"/>
      <text:p text:style-name="P29">atributos casi todos objetos</text:p>
      <text:p text:style-name="P29"/>
      <text:p text:style-name="P29">en este caso imagen</text:p>
      <text:p text:style-name="P29">traer imagen</text:p>
      <text:p text:style-name="P29">debug amigos tiene razon</text:p>
      <text:p text:style-name="P30">imagen no</text:p>
      <text:p text:style-name="P30">to lower </text:p>
      <text:p text:style-name="P30">cinducion</text:p>
      <text:p text:style-name="P30"><text:soft-page-break/>patch</text:p>
      <text:p text:style-name="P30">delete </text:p>
      <text:p text:style-name="P30"/>
      <text:p text:style-name="P31">imagen es <text:s/>en el parametro basio o enviar url o verificar que en el ca,mpo de la imagen este vacio o no</text:p>
      <text:p text:style-name="P31">1. analir si la tabla tiene el dato atraves de un wghere mas and()</text:p>
      <text:p text:style-name="P31">posea tablsa y columna</text:p>
      <text:p text:style-name="P31"/>
      <text:p text:style-name="P32">rest no puedo mnipularlo</text:p>
      <text:p text:style-name="P32"/>
      <text:p text:style-name="P32"/>
      <text:p text:style-name="P32">set crea <text:s/>un nuevo objeto</text:p>
      <text:p text:style-name="P32"/>
      <text:p text:style-name="P33">get to lower</text:p>
      <text:p text:style-name="P33"><text:s/>delete don’t exist</text:p>
      <text:p text:style-name="P33">patch</text:p>
      <text:p text:style-name="P33"/>
      <text:p text:style-name="P32"/>
      <text:p text:style-name="P34">codewars </text:p>
      <text:p text:style-name="P34">hakcerrank</text:p>
      <text:p text:style-name="P35">tavbulacion <text:s/></text:p>
      <text:p text:style-name="P35">mirar bien de que trata el problkema</text:p>
      <text:p text:style-name="P35"/>
      <text:p text:style-name="P36">pokemon api documentación </text:p>
      <text:p text:style-name="P36">se cva hacer un buscadir en xano con filtro</text:p>
      <text:p text:style-name="P36">como usar api externa en xano</text:p>
      <text:p text:style-name="P37">desarrollo sin permisos y roles</text:p>
      <text:p text:style-name="P37">replicar en roles y permisos</text:p>
      <text:p text:style-name="P37">todo eso lo hecha 3l endpouint de user</text:p>
      <text:p text:style-name="P37">admin todo el permiso</text:p>
      <text:p text:style-name="P37">flaco sin permisos coner clow</text:p>
      <text:p text:style-name="P37">usuario oara los agentews</text:p>
      <text:p text:style-name="P37">log ahi que acabarlo</text:p>
      <text:p text:style-name="P38">oermisos y ordenes</text:p>
      <text:p text:style-name="P38"/>
      <text:p text:style-name="P39">apremder.</text:p>
      <text:p text:style-name="P39"/>
      <text:p text:style-name="P40">buscaador de pĺiculas por el titulo, año, plot </text:p>
      <text:p text:style-name="P40">tipo</text:p>
      <text:p text:style-name="P40">respu<text:span text:style-name="T5">e</text:span>sta json </text:p>
      <text:p text:style-name="P40">back</text:p>
      <text:p text:style-name="P40">response</text:p>
      <text:p text:style-name="P40">titulo, año genero, d<text:span text:style-name="T6">i</text:span>rector</text:p>
      <text:p text:style-name="P40"/>
      <text:p text:style-name="P41"><text:soft-page-break/>a<text:span text:style-name="T7">p</text:span>i not<text:span text:style-name="T7">i</text:span>cicias</text:p>
      <text:p text:style-name="P41"/>
      <text:p text:style-name="P41">tema</text:p>
      <text:p text:style-name="P41">from</text:p>
      <text:p text:style-name="P41">sortby</text:p>
      <text:p text:style-name="P41">ms 2 filtr <text:s/></text:p>
      <text:p text:style-name="P41">response</text:p>
      <text:p text:style-name="P41"/>
      <text:p text:style-name="P41">autor </text:p>
      <text:p text:style-name="P41">titulo <text:s/>y url</text:p>
      <text:p text:style-name="P41">y response en vez de art<text:span text:style-name="T7">ic</text:span>ulo n<text:span text:style-name="T7">o</text:span>ticias en ingles</text:p>
      <text:p text:style-name="P41">status y total de resultado</text:p>
      <text:p text:style-name="P41">ciclo for</text:p>
      <text:p text:style-name="P41">objeto</text:p>
      <text:p text:style-name="P41"/>
      <text:p text:style-name="P41"/>
      <text:p text:style-name="P41">logica nombrar cosas mal</text:p>
      <text:p text:style-name="P41"/>
      <text:p text:style-name="P41"/>
      <text:p text:style-name="P42">juego de la vida de conway</text:p>
      <text:p text:style-name="P42"><text:s/>este se juega en <text:span text:style-name="T8">que en</text:span> un tablero con casillas cuadradas estas se llaman células que pueden estar dispuestas en vivas y muertas, <text:s/>las células vivas se representa de un color ejemplo rojo <text:s/>y las muertas se representan con otro colo ejemplo negro <text:s/>ha esto se le llama disposición del juego osea ahí unas células que es<text:span text:style-name="T9">t</text:span>án <text:span text:style-name="T9">v</text:span>ivas <text:span text:style-name="T8">y</text:span> otras muertas disponib<text:span text:style-name="T9">l</text:span>es <text:span text:style-name="T9">y el tiempo comienza a funcionar sus reglas son 2</text:span></text:p>
      <text:p text:style-name="P43">si una célula quiere seguir viva debe de tener exactamente 2 o 3 veces vecinas morirá si ahí por la sobre población y si tiene meno<text:span text:style-name="T8">s</text:span> moriría por esta solitaria</text:p>
      <text:p text:style-name="P43"><text:s/></text:p>
      <text:p text:style-name="P43">cada <text:s/>célula que tenga a 3 vecinas vivas nacerá de forma inmediata</text:p>
      <text:p text:style-name="P44">2 <text:s/>periodos vuelve a su posición original</text:p>
      <text:p text:style-name="P44">esto demuestra un<text:span text:style-name="T10">a</text:span> capacidad expresiva como <text:span text:style-name="T10">la de </text:span>un ordenador</text:p>
      <text:p text:style-name="P44"/>
      <text:p text:style-name="P43"/>
      <text:p text:style-name="P45"><text:s/><text:span text:style-name="T10">esto pueden continuar como se indico indefinidamente creando gran variedad de patrones en <text:s/>esta caso osciladores osea que patrones que vuelven a u estando original después de numero finito <text:s/>de generaciones conocido como periodo no a través espaciales patrones que se desplazan a través de las cuadricula sin detenerse.</text:span></text:p>
      <text:p text:style-name="P46"><text:s/></text:p>
      <text:p text:style-name="P47"/>
      <text:p text:style-name="P42"/>
      <text:p text:style-name="P41"/>
      <text:p text:style-name="P41"><text:s text:c="4"/><text:span text:style-name="T11">algoritmo <text:s/>juego de la vida</text:span></text:p>
      <text:p text:style-name="P48">explicacion <text:s/></text:p>
      <text:p text:style-name="P49">1. inicio</text:p>
      <text:p text:style-name="P50">2. se definen los inputs celulas vivas y luego cellas muertas, <text:span text:style-name="T12">tabien partidas</text:span></text:p>
      <text:p text:style-name="P51"><text:soft-page-break/>2.1. <text:span text:style-name="T13">mostrar variable lifecells</text:span></text:p>
      <text:p text:style-name="P52">2.2. en esta se ingresara la <text:span text:style-name="T14">c</text:span>antidad de celulas vivas</text:p>
      <text:p text:style-name="P52">2.3. mostrar variable deathcels</text:p>
      <text:p text:style-name="P52">2.4. en esta se i<text:span text:style-name="T15">n</text:span>gresara la cantdad de celulas muertas</text:p>
      <text:p text:style-name="P53">3. .<text:span text:style-name="T16">se crea e arreglo gamel</text:span><text:span text:style-name="T17">i</text:span><text:span text:style-name="T16">fe</text:span></text:p>
      <text:p text:style-name="P52">3.1. <text:span text:style-name="T17">se cra el arreglo como vacio</text:span></text:p>
      <text:p text:style-name="P54">3.2. se inserta las variavbles lifecells <text:span text:style-name="T18">y deathcells</text:span></text:p>
      <text:p text:style-name="P55">4. <text:span text:style-name="T19">creación del tablero con <text:s/>for apartir las vivas y muertas <text:s/>de un arreglo</text:span><text:span text:style-name="T20">.</text:span></text:p>
      <text:p text:style-name="P56">4.1 <text:span text:style-name="T21">usamos el ciclo for.</text:span></text:p>
      <text:p text:style-name="P57">4.2. inicio ciclo for</text:p>
      <text:p text:style-name="P58">4.<text:span text:style-name="T19">3</text:span>.<text:span text:style-name="T19">se recorre el arreglo y se crea el tablero con nombre de tablelifegame.</text:span></text:p>
      <text:p text:style-name="P57">5. creamos <text:span text:style-name="T14">los valores de pluslive y plusdeath</text:span></text:p>
      <text:p text:style-name="P59">5.1. definimos los valores como vacio</text:p>
      <text:p text:style-name="P59">5.2. realizamos <text:s/>el aumento del if para in crementara el marcador según el tablero</text:p>
      <text:p text:style-name="P57">6. dentro del for se efectua el ciclo if.</text:p>
      <text:p text:style-name="P57">6.1. inicio</text:p>
      <text:p text:style-name="P57">6.2. si las vidas presentes de tablelifegame son mayores a las celulas muertas se</text:p>
      <text:p text:style-name="P57">incrementa <text:s/>el contador</text:p>
      <text:p text:style-name="P59">6.3. en caso <text:s/>ontraroio se incrementa el contador de muertas</text:p>
      <text:p text:style-name="P59">7. se termina el if</text:p>
      <text:p text:style-name="P59">8. finaliza el for</text:p>
      <text:p text:style-name="P59">9. imprimiomos el resultado</text:p>
      <text:p text:style-name="P60">10. <text:span text:style-name="T22">Se</text:span> vuelven a repetir los pasos del 3 al 10</text:p>
      <text:p text:style-name="P61">1<text:span text:style-name="T14">1</text:span>. fin .</text:p>
      <text:p text:style-name="P61"/>
      <text:p text:style-name="P62">El pseudocodigo es una descripvion <text:s/>de alto nivel <text:span text:style-name="T23">compaca e informal del principio operativo y que tamben utiliza las convebciones estructurales de un lenguaje de ñrogramacion real.</text:span></text:p>
      <text:p text:style-name="P61"/>
      <text:p text:style-name="P63">TAREA</text:p>
      <text:p text:style-name="P63"/>
      <text:p text:style-name="P63">front co web wiber</text:p>
      <text:p text:style-name="P63">academia de weweb.io</text:p>
      <text:p text:style-name="P64"><text:a xlink:type="simple" xlink:href="https://academy.weweb.io/" text:style-name="Internet_20_link" text:visited-style-name="Visited_20_Internet_20_Link"><text:span text:style-name="T24">https://academy.weweb.io/</text:span></text:a></text:p>
      <text:p text:style-name="P64"><text:a xlink:type="simple" xlink:href="https://academy.weweb.io/build-a-proof-of-concept/" office:target-frame-name="_blank" xlink:show="new" text:style-name="Internet_20_link" text:visited-style-name="Visited_20_Internet_20_Link"><text:span text:style-name="T24">https://academy.weweb.io/build-a-proof-of-concept/</text:span></text:a></text:p>
      <text:p text:style-name="P65"><text:a xlink:type="simple" xlink:href="https://academy.weweb.io/scale-your-web-app/" office:target-frame-name="_blank" xlink:show="new" text:style-name="Internet_20_link" text:visited-style-name="Visited_20_Internet_20_Link"><text:span text:style-name="T24">https://academy.weweb.io/scale-your-web-app/</text:span></text:a></text:p>
      <text:p text:style-name="P63"/>
      <text:p text:style-name="P64"><text:a xlink:type="simple" xlink:href="https://dashboard.weweb.io/sign-up" office:target-frame-name="_blank" xlink:show="new" text:style-name="Internet_20_link" text:visited-style-name="Visited_20_Internet_20_Link"><text:span text:style-name="T24">https://dashboard.weweb.io/sign-up</text:span></text:a></text:p>
      <text:p text:style-name="P63"/>
      <text:p text:style-name="P63"/>
      <text:p text:style-name="P66">tpp va conectado en la mano</text:p>
      <text:p text:style-name="P66"/>
      <text:p text:style-name="P66"><text:soft-page-break/>de que no haya ningun accidente</text:p>
      <text:p text:style-name="P66">oficios varios hscer pausas activas</text:p>
      <text:p text:style-name="P66">la postura se maneja con personas en computasor</text:p>
      <text:p text:style-name="P66">no cargaruna caja solo hacerlo según</text:p>
      <text:p text:style-name="P66">tus<text:span text:style-name="T25">compañerps </text:span></text:p>
      <text:p text:style-name="P67">si se hacen movimient9s con el diafragma</text:p>
      <text:p text:style-name="P67">ire dentro de los huoses</text:p>
      <text:p text:style-name="P67"/>
      <text:p text:style-name="P67"/>
      <text:p text:style-name="P67">hacen fleion</text:p>
      <text:p text:style-name="P67">extension anduccion</text:p>
      <text:p text:style-name="P67">ritacion </text:p>
      <text:p text:style-name="P68">empaticos en tema s de cambio de posiion</text:p>
      <text:p text:style-name="P68"/>
      <text:p text:style-name="P68">casa</text:p>
      <text:p text:style-name="P68">no abusar de pesos</text:p>
      <text:p text:style-name="P68"/>
      <text:p text:style-name="P69">algoritmo juego de la vida:</text:p>
      <text:p text:style-name="P69"/>
      <text:p text:style-name="P70">1. crear la funcion de nextturn</text:p>
      <text:p text:style-name="P70">funcion nexturn <text:s/>{</text:p>
      <text:p text:style-name="P71">se ingresan datos de la matrtiz</text:p>
      <text:p text:style-name="P72">se crea la matriz</text:p>
      <text:p text:style-name="P72">se insertan los valores</text:p>
      <text:p text:style-name="P73">2 .<text:span text:style-name="T26">definimos valores</text:span></text:p>
      <text:p text:style-name="P74">2.1. definimos a,b <text:s/>como entero</text:p>
      <text:p text:style-name="P74">2.2. defiinir lg como carácter</text:p>
      <text:p text:style-name="P74">dimensiones lg 6x6</text:p>
      <text:p text:style-name="P74">inicio para</text:p>
      <text:p text:style-name="P75">Para <text:span text:style-name="T27">a</text:span>&lt;-0 Hasta 2 Con Paso 1 Hacer</text:p>
      <text:p text:style-name="P75"><text:s text:c="4"/>Para <text:span text:style-name="T27">b</text:span>&lt;-0 Hasta 2 Con Paso 1 Hacer</text:p>
      <text:p text:style-name="P75">escribir el usuario debe ingresar los valores para la posiciobn [“, <text:span text:style-name="T28">a,</text:span>”,<text:span text:style-name="T28">”,b,”</text:span>]</text:p>
      <text:p text:style-name="P75"><text:s text:c="6"/><text:span text:style-name="T28">se </text:span>debera leer l</text:p>
      <text:p text:style-name="P75"><text:s text:c="4"/>Fin Para</text:p>
      <text:p text:style-name="P75">Fin Para</text:p>
      <text:p text:style-name="P75">Para <text:span text:style-name="T27">a</text:span>&lt;-0 Hasta 2 Con Paso 1 Hacer</text:p>
      <text:p text:style-name="P75"><text:s text:c="4"/>Para <text:span text:style-name="T27">b</text:span>&lt;-1 Hasta 2 Con Paso 1 Hacer</text:p>
      <text:p text:style-name="P75"><text:s text:c="7"/>Escribir Sin Saltar " " lg[<text:span text:style-name="T28">a</text:span>,<text:span text:style-name="T28">b</text:span>];</text:p>
      <text:p text:style-name="P75"><text:s text:c="4"/>Fin Para</text:p>
      <text:p text:style-name="P75"><text:soft-page-break/>Escribir " "</text:p>
      <text:p text:style-name="P75">Fin Para</text:p>
      <text:p text:style-name="P76">fin funcion</text:p>
      <text:p text:style-name="P70"><text:s/></text:p>
      <text:p text:style-name="P77">se envia documentos a </text:p>
      <text:p text:style-name="P77"/>
      <text:p text:style-name="P77">coordinacion</text:p>
      <text:p text:style-name="P78">reunir documeos</text:p>
      <text:p text:style-name="P69"/>
      <text:p text:style-name="P79"/>
      <text:p text:style-name="P79"/>
      <text:p text:style-name="P79"/>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06T11:16:33.498900200</dc:date>
    <meta:editing-duration>P1DT23H2M33S</meta:editing-duration>
    <meta:editing-cycles>54</meta:editing-cycles>
    <meta:generator>LibreOffice/25.2.5.2$Windows_X86_64 LibreOffice_project/03d19516eb2e1dd5d4ccd751a0d6f35f35e08022</meta:generator>
    <meta:document-statistic meta:table-count="0" meta:image-count="0" meta:object-count="0" meta:page-count="15" meta:paragraph-count="340" meta:word-count="3223" meta:character-count="20076" meta:non-whitespace-character-count="17038"/>
  </office:meta>
</office:document-meta>
</file>