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909ec" officeooo:paragraph-rsid="001909ec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909ec" officeooo:paragraph-rsid="001909ec" style:font-size-asian="18pt" style:font-size-complex="18pt"/>
    </style:style>
    <style:style style:name="T1" style:family="text">
      <style:text-properties fo:language="es" fo:country="CO" officeooo:rsid="0019f721"/>
    </style:style>
    <style:style style:name="T2" style:family="text">
      <style:text-properties fo:language="es" fo:country="CO"/>
    </style:style>
    <style:style style:name="T3" style:family="text">
      <style:text-properties fo:language="es" fo:country="CO" officeooo:rsid="001ca170"/>
    </style:style>
    <style:style style:name="T4" style:family="text">
      <style:text-properties fo:language="es" fo:country="CO" officeooo:rsid="001ba6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iliana una chica genial</text:p>
      <text:p text:style-name="P1"/>
      <text:p text:style-name="P2">Lili aunque nos conocemos desde hace tiempo aun así no deja de sorprenderme tu resiliencia, bondad y carisma; siempre has dado le mejor de ti y por eso estas donde estas ahora, sigue as<text:span text:style-name="T1">í</text:span> no olvides quien eres;<text:span text:style-name="T2"> </text:span><text:span text:style-name="T3">los</text:span><text:span text:style-name="T2"> </text:span>sueños<text:span text:style-name="T2"> </text:span><text:span text:style-name="T3">que tengas</text:span><text:span text:style-name="T4"> </text:span>se seguirán <text:span text:style-name="T2">cumplie</text:span><text:span text:style-name="T1">n</text:span><text:span text:style-name="T2">do</text:span>.</text:p>
      <text:p text:style-name="P2"/>
      <text:p text:style-name="P2">Te quiero mucho.</text:p>
      <text:p text:style-name="P2"/>
      <text:p text:style-name="P2">con amor Santiago.</text:p>
      <text:p text:style-name="P2"/>
      <text:p text:style-name="P2"/>
      <text:p text:style-name="P2"/>
      <text:p text:style-name="P2"/>
      <text:p text:style-name="P2"/>
      <text:p text:style-name="P2"><text:span text:style-name="T2">S</text:span>antiago Rojas Rod<text:span text:style-name="T2">ríguez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6T18:23:28.822447700</meta:creation-date>
    <dc:date>2025-05-06T18:35:46.917907300</dc:date>
    <meta:editing-duration>PT12M17S</meta:editing-duration>
    <meta:editing-cycles>4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5" meta:word-count="58" meta:character-count="337" meta:non-whitespace-character-count="284"/>
  </office:meta>
</office:document-meta>
</file>