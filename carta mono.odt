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2000001728D66CAB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text-properties fo:font-size="18pt" officeooo:rsid="00128532" officeooo:paragraph-rsid="00128532" style:font-size-asian="15.75pt" style:font-size-complex="18pt"/>
    </style:style>
    <style:style style:name="P3" style:family="paragraph" style:parent-style-name="Standard">
      <style:text-properties fo:font-size="18pt" fo:language="es" fo:country="CO" officeooo:rsid="00128532" officeooo:paragraph-rsid="00128532" style:font-size-asian="15.75pt" style:font-size-complex="18pt"/>
    </style:style>
    <style:style style:name="T1" style:family="text">
      <style:text-properties fo:language="es" fo:country="CO" officeooo:rsid="00128532"/>
    </style:style>
    <style:style style:name="T2" style:family="text">
      <style:text-properties fo:language="es" fo:country="CO" officeooo:rsid="00150033"/>
    </style:style>
    <style:style style:name="T3" style:family="text">
      <style:text-properties officeooo:rsid="00128532"/>
    </style:style>
    <style:style style:name="T4" style:family="text">
      <style:text-properties fo:language="es" fo:country="C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">Carta a </text:span><text:span text:style-name="T2">A</text:span><text:span text:style-name="T1">nderson</text:span><text:span text:style-name="T3">:</text:span></text:p>
      <text:p text:style-name="P1"/>
      <text:p text:style-name="P2">hoy te <text:span text:style-name="T4">escribo</text:span> en este <text:span text:style-name="T4">día</text:span> para decirte que te quiero mucho, <text:span text:style-name="T4">la vida te ha dado desafios algunos desagradables, otros interesantes y algunos divertidos,aun así siempre luchaste con todo y nunca desfalleciste, esto provoco que tu presencia sea un suave lirio lleno de luz en el lago de la oscuridad; no importa tu edad tu siempre seras joven mientras no dejes de seguir soñando.</text:span></text:p>
      <text:p text:style-name="P3"/>
      <text:p text:style-name="P3">Díos esta contigo, te quiero mucho hermanito.</text:p>
      <text:p text:style-name="P3"><draw:frame draw:style-name="fr1" draw:name="Imagen1" text:anchor-type="char" svg:x="0.254cm" svg:y="0.058cm" svg:width="8.872cm" svg:height="4.87cm" draw:z-index="0"><draw:image xlink:href="Pictures/10000001000002A2000001728D66CAB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con cariño: Santiago Rojas tu hermano pequeño.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3T18:21:20.694708200</meta:creation-date>
    <dc:date>2025-07-25T13:58:34.434049000</dc:date>
    <meta:editing-duration>PT14M49S</meta:editing-duration>
    <meta:editing-cycles>5</meta:editing-cycles>
    <meta:generator>LibreOffice/25.2.4.3$Windows_X86_64 LibreOffice_project/33e196637044ead23f5c3226cde09b47731f7e27</meta:generator>
    <meta:document-statistic meta:table-count="0" meta:image-count="1" meta:object-count="0" meta:page-count="1" meta:paragraph-count="4" meta:word-count="82" meta:character-count="486" meta:non-whitespace-character-count="407"/>
  </office:meta>
</office:document-meta>
</file>