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b77a" officeooo:paragraph-rsid="0010b77a"/>
    </style:style>
    <style:style style:name="P2" style:family="paragraph" style:parent-style-name="Standard">
      <style:text-properties officeooo:rsid="00113f6a" officeooo:paragraph-rsid="00113f6a"/>
    </style:style>
    <style:style style:name="P3" style:family="paragraph" style:parent-style-name="Standard">
      <style:text-properties officeooo:rsid="00115c3f" officeooo:paragraph-rsid="00115c3f"/>
    </style:style>
    <style:style style:name="P4" style:family="paragraph" style:parent-style-name="Standard">
      <style:text-properties officeooo:rsid="0012a692" officeooo:paragraph-rsid="0012a692"/>
    </style:style>
    <style:style style:name="P5" style:family="paragraph" style:parent-style-name="Standard">
      <style:text-properties officeooo:rsid="001306b5" officeooo:paragraph-rsid="001306b5"/>
    </style:style>
    <style:style style:name="P6" style:family="paragraph" style:parent-style-name="Standard">
      <style:text-properties officeooo:rsid="001306b5" officeooo:paragraph-rsid="00113f6a"/>
    </style:style>
    <style:style style:name="T1" style:family="text">
      <style:text-properties officeooo:rsid="001681be"/>
    </style:style>
    <style:style style:name="T2" style:family="text">
      <style:text-properties officeooo:rsid="00174a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macion sena</text:p>
      <text:p text:style-name="P1">querer hacer</text:p>
      <text:p text:style-name="P1">apritud como stacar las cosas</text:p>
      <text:p text:style-name="P1">tener buwna logica</text:p>
      <text:p text:style-name="P1">uresolver un problema</text:p>
      <text:p text:style-name="P2">no reslver problema con chatpgpt</text:p>
      <text:p text:style-name="P2">cuanto</text:p>
      <text:p text:style-name="P2">no se si no guiarse</text:p>
      <text:p text:style-name="P3">no modioficar</text:p>
      <text:p text:style-name="P3"/>
      <text:p text:style-name="P4">vector </text:p>
      <text:p text:style-name="P6"/>
      <text:p text:style-name="P5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13:33:50.729620303</meta:creation-date>
    <dc:date>2025-03-31T16:48:33.488012187</dc:date>
    <meta:editing-duration>PT5H24M12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10" meta:word-count="29" meta:character-count="171" meta:non-whitespace-character-count="151"/>
  </office:meta>
</office:document-meta>
</file>