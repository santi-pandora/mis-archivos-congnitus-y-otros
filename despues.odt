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30000064039048CC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7.976cm" svg:height="21.87cm" draw:z-index="0"><draw:image xlink:href="Pictures/10000000000005230000064039048CC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8:19:27.391616400</meta:creation-date>
    <dc:date>2026-02-09T18:35:18.955083600</dc:date>
    <meta:editing-duration>PT5M12S</meta:editing-duration>
    <meta:editing-cycles>2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