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549" officeooo:paragraph-rsid="0011e549"/>
    </style:style>
    <style:style style:name="P2" style:family="paragraph" style:parent-style-name="Standard">
      <style:text-properties officeooo:rsid="001429d1" officeooo:paragraph-rsid="001429d1"/>
    </style:style>
    <style:style style:name="P3" style:family="paragraph" style:parent-style-name="Standard">
      <style:text-properties officeooo:rsid="001610d3" officeooo:paragraph-rsid="001610d3"/>
    </style:style>
    <style:style style:name="P4" style:family="paragraph" style:parent-style-name="Standard">
      <style:text-properties officeooo:rsid="0016ed6a" officeooo:paragraph-rsid="0016ed6a"/>
    </style:style>
    <style:style style:name="P5" style:family="paragraph" style:parent-style-name="Standard">
      <style:text-properties officeooo:rsid="001a9dda" officeooo:paragraph-rsid="001a9dda"/>
    </style:style>
    <style:style style:name="P6" style:family="paragraph" style:parent-style-name="Standard">
      <style:text-properties officeooo:rsid="001badcb" officeooo:paragraph-rsid="001badcb"/>
    </style:style>
    <style:style style:name="T1" style:family="text">
      <style:text-properties officeooo:rsid="00150c35"/>
    </style:style>
    <style:style style:name="T2" style:family="text">
      <style:text-properties officeooo:rsid="0016e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luisa </text:p>
      <text:p text:style-name="P1">primera v<text:span text:style-name="T1">i</text:span>sita </text:p>
      <text:p text:style-name="P1">funciones</text:p>
      <text:p text:style-name="P1">y <text:span text:style-name="T1">b</text:span>itácoras</text:p>
      <text:p text:style-name="P1">calculo <text:span text:style-name="T1">b</text:span>it<text:span text:style-name="T1">ác</text:span>oras salen automáticas</text:p>
      <text:p text:style-name="P1"/>
      <text:p text:style-name="P1">formato bitácora</text:p>
      <text:p text:style-name="P1"/>
      <text:p text:style-name="P2">próxima visita viernes 8 de ago<text:span text:style-name="T1">s</text:span>to a las 10 de la mañana</text:p>
      <text:p text:style-name="P3">reunión hoy</text:p>
      <text:p text:style-name="P3">se me evaluaron factores técnicos como :</text:p>
      <text:p text:style-name="P3">transferencia de conocimiento y oportunidades de mejora; entre otros.</text:p>
      <text:p text:style-name="P3">Así como factores comp<text:span text:style-name="T2">o</text:span>rta mentales:</text:p>
      <text:p text:style-name="P4">como relaciones interpersonales y cumplimiento, entre otros. </text:p>
      <text:p text:style-name="P3">corregir bitácoras las que me indiquen y enviar formato seguimiento</text:p>
      <text:p text:style-name="P3"/>
      <text:p text:style-name="P3"/>
      <text:p text:style-name="P3"/>
      <text:p text:style-name="P3"/>
      <text:p text:style-name="P5">error es detengago detenga el flujo on error</text:p>
      <text:p text:style-name="P5">validaciones se hacen aparte en el flujo esperado</text:p>
      <text:p text:style-name="P5"/>
      <text:p text:style-name="P6">s</text:p>
      <text:p text:style-name="P6">se te asina algo debes revsar continuamente el flujo opara buscaf posobles errores y demas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10:12:25.696558863</meta:creation-date>
    <dc:date>2025-09-22T17:47:05.117003100</dc:date>
    <meta:editing-duration>PT6H19M24S</meta:editing-duration>
    <meta:editing-cycles>7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7" meta:word-count="97" meta:character-count="624" meta:non-whitespace-character-count="541"/>
  </office:meta>
</office:document-meta>
</file>