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6e3" officeooo:paragraph-rsid="001186e3"/>
    </style:style>
    <style:style style:name="P2" style:family="paragraph" style:parent-style-name="Standard">
      <style:text-properties fo:font-size="18pt" officeooo:rsid="001186e3" officeooo:paragraph-rsid="001186e3" style:font-size-asian="18pt" style:font-size-complex="18pt"/>
    </style:style>
    <style:style style:name="P3" style:family="paragraph" style:parent-style-name="Standard">
      <style:text-properties style:font-name="Arial" fo:font-size="18pt" officeooo:rsid="001186e3" officeooo:paragraph-rsid="001186e3" style:font-size-asian="18pt" style:font-size-complex="18pt"/>
    </style:style>
    <style:style style:name="P4" style:family="paragraph" style:parent-style-name="Standard">
      <style:text-properties style:font-name="Arial" fo:font-size="18pt" officeooo:rsid="0014cc4f" officeooo:paragraph-rsid="0014cc4f" style:font-size-asian="18pt" style:font-size-complex="18pt"/>
    </style:style>
    <style:style style:name="T1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¡Nuestra madre una persona excepcional!</text:p>
      <text:p text:style-name="P3"/>
      <text:p text:style-name="P3"/>
      <text:p text:style-name="P3">Una persona se define por varias cosas increíbles, como la humildad, pasión y compromiso ; estas 3 palabras definen a soledad Rodríguez Díaz nuestra madre, una persona que dio lo mejor de si misma par sacar a su familia adelante, por eso queremos decir en este día gracias mama por tu generosidad y amabilidad también por ser nuestra fuente de inspiración y por siempre motivarnos a mejorar y dar lo mejor de nosotros mismos.</text:p>
      <text:p text:style-name="P3"/>
      <text:p text:style-name="P3">Feliz Día Mama </text:p>
      <text:p text:style-name="P3"/>
      <text:p text:style-name="P3">con cariño</text:p>
      <text:p text:style-name="P3"/>
      <text:p text:style-name="P3">Julián Alberto Rojas Rodríguez, Anderson Rojas Rodríguez, Yollian Andrey Rojas Rodríguez y Santiago Rojas Rodríguez <text:s/>tus amados hijos.</text:p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07:47:42.454390393</meta:creation-date>
    <dc:date>2025-05-22T08:03:16.200270591</dc:date>
    <meta:editing-duration>PT3M5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5" meta:word-count="102" meta:character-count="623" meta:non-whitespace-character-count="524"/>
  </office:meta>
</office:document-meta>
</file>