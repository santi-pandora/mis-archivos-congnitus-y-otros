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8EDDAB93.png" manifest:media-type="image/png"/>
  <manifest:file-entry manifest:full-path="Pictures/10000001000005570000029A01778A15.png" manifest:media-type="image/png"/>
  <manifest:file-entry manifest:full-path="Pictures/10000001000005570000029AB6BBE9B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0.837cm" svg:height="19.189cm" draw:z-index="2"><draw:image xlink:href="Pictures/1000000100000200000002008EDDAB9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17.59cm" svg:height="21.264cm" draw:z-index="1"><draw:image xlink:href="Pictures/10000001000005570000029A01778A15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1" text:anchor-type="char" svg:width="17.59cm" svg:height="20.6cm" draw:z-index="0"><draw:image xlink:href="Pictures/10000001000005570000029AB6BBE9B5.png" xlink:type="simple" xlink:show="embed" xlink:actuate="onLoad" draw:mime-type="image/png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10:50:46.224040900</meta:creation-date>
    <dc:date>2025-12-02T10:55:43.301664700</dc:date>
    <meta:editing-duration>PT5M1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25.2.7.2$Windows_X86_64 LibreOffice_project/5cbfd1ab6520636bb5f7b99185aa69bd7456825d</meta:generator>
  </office:meta>
</office:document-meta>
</file>