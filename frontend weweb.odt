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600000224E8AEE970.png" manifest:media-type="image/png"/>
  <manifest:file-entry manifest:full-path="Pictures/10000001000004AB000002A2489B7B84.png" manifest:media-type="image/png"/>
  <manifest:file-entry manifest:full-path="Pictures/10000001000004AB000002A2889610E7.png" manifest:media-type="image/png"/>
  <manifest:file-entry manifest:full-path="Pictures/10000001000001E00000010E8705C338.png" manifest:media-type="image/png"/>
  <manifest:file-entry manifest:full-path="Pictures/10000001000001E00000010EB9A0EE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63f37" officeooo:paragraph-rsid="00063f37" style:font-size-asian="16pt" style:font-size-complex="16pt"/>
    </style:style>
    <style:style style:name="P2" style:family="paragraph" style:parent-style-name="Standard">
      <style:text-properties fo:font-size="16pt" officeooo:rsid="00083276" officeooo:paragraph-rsid="00083276" style:font-size-asian="16pt" style:font-size-complex="16pt"/>
    </style:style>
    <style:style style:name="P3" style:family="paragraph" style:parent-style-name="Standard">
      <style:text-properties fo:font-size="16pt" officeooo:rsid="00097431" officeooo:paragraph-rsid="00097431" style:font-size-asian="16pt" style:font-size-complex="16pt"/>
    </style:style>
    <style:style style:name="P4" style:family="paragraph" style:parent-style-name="Standard">
      <style:text-properties fo:font-size="16pt" officeooo:rsid="000b241d" officeooo:paragraph-rsid="000b241d" style:font-size-asian="16pt" style:font-size-complex="16pt"/>
    </style:style>
    <style:style style:name="P5" style:family="paragraph" style:parent-style-name="Standard">
      <style:text-properties fo:font-size="16pt" officeooo:rsid="000be320" officeooo:paragraph-rsid="000be320" style:font-size-asian="16pt" style:font-size-complex="16pt"/>
    </style:style>
    <style:style style:name="P6" style:family="paragraph" style:parent-style-name="Standard">
      <style:text-properties fo:font-size="16pt" officeooo:rsid="000c7b07" officeooo:paragraph-rsid="000c7b07" style:font-size-asian="16pt" style:font-size-complex="16pt"/>
    </style:style>
    <style:style style:name="P7" style:family="paragraph" style:parent-style-name="Standard">
      <style:text-properties fo:font-size="16pt" officeooo:rsid="000db336" officeooo:paragraph-rsid="000db336" style:font-size-asian="16pt" style:font-size-complex="16pt"/>
    </style:style>
    <style:style style:name="P8" style:family="paragraph" style:parent-style-name="Standard">
      <style:text-properties fo:font-size="16pt" officeooo:rsid="000ecbd6" officeooo:paragraph-rsid="000ecbd6" style:font-size-asian="16pt" style:font-size-complex="16pt"/>
    </style:style>
    <style:style style:name="P9" style:family="paragraph" style:parent-style-name="Standard">
      <style:text-properties fo:font-size="16pt" officeooo:rsid="000f625b" officeooo:paragraph-rsid="000f625b" style:font-size-asian="16pt" style:font-size-complex="16pt"/>
    </style:style>
    <style:style style:name="P10" style:family="paragraph" style:parent-style-name="Standard">
      <style:text-properties fo:font-size="16pt" officeooo:rsid="00112806" officeooo:paragraph-rsid="00112806" style:font-size-asian="16pt" style:font-size-complex="16pt"/>
    </style:style>
    <style:style style:name="P11" style:family="paragraph" style:parent-style-name="Standard">
      <style:text-properties fo:font-size="16pt" officeooo:rsid="00113d9c" officeooo:paragraph-rsid="00113d9c" style:font-size-asian="16pt" style:font-size-complex="16pt"/>
    </style:style>
    <style:style style:name="P12" style:family="paragraph" style:parent-style-name="Standard">
      <style:text-properties fo:font-size="16pt" officeooo:rsid="00124945" officeooo:paragraph-rsid="00124945" style:font-size-asian="16pt" style:font-size-complex="16pt"/>
    </style:style>
    <style:style style:name="P13" style:family="paragraph" style:parent-style-name="Standard">
      <style:text-properties fo:font-size="16pt" officeooo:rsid="001381de" officeooo:paragraph-rsid="001381de" style:font-size-asian="16pt" style:font-size-complex="16pt"/>
    </style:style>
    <style:style style:name="P14" style:family="paragraph" style:parent-style-name="Standard">
      <style:text-properties fo:font-size="16pt" officeooo:rsid="00151208" officeooo:paragraph-rsid="00151208" style:font-size-asian="16pt" style:font-size-complex="16pt"/>
    </style:style>
    <style:style style:name="P15" style:family="paragraph" style:parent-style-name="Standard">
      <style:paragraph-properties fo:margin-left="0in" fo:margin-right="0in" fo:text-indent="0in" style:auto-text-indent="false"/>
      <style:text-properties fo:font-size="16pt" style:font-size-asian="16pt" style:font-size-complex="16pt"/>
    </style:style>
    <style:style style:name="P16" style:family="paragraph" style:parent-style-name="Standard">
      <style:text-properties fo:font-size="16pt" officeooo:rsid="001575f0" officeooo:paragraph-rsid="001575f0" style:font-size-asian="16pt" style:font-size-complex="16pt"/>
    </style:style>
    <style:style style:name="P17" style:family="paragraph" style:parent-style-name="Standard">
      <style:text-properties fo:font-size="16pt" officeooo:rsid="00159d88" officeooo:paragraph-rsid="00159d88" style:font-size-asian="16pt" style:font-size-complex="16pt"/>
    </style:style>
    <style:style style:name="P18" style:family="paragraph" style:parent-style-name="Standard">
      <style:text-properties fo:font-size="16pt" officeooo:rsid="00177180" officeooo:paragraph-rsid="00177180" style:font-size-asian="16pt" style:font-size-complex="16pt"/>
    </style:style>
    <style:style style:name="P19" style:family="paragraph" style:parent-style-name="Standard">
      <style:text-properties fo:font-size="16pt" officeooo:rsid="00188484" officeooo:paragraph-rsid="00188484" style:font-size-asian="16pt" style:font-size-complex="16pt"/>
    </style:style>
    <style:style style:name="P20" style:family="paragraph" style:parent-style-name="Standard">
      <style:text-properties fo:font-size="16pt" officeooo:rsid="0018e2fd" officeooo:paragraph-rsid="0018e2fd" style:font-size-asian="16pt" style:font-size-complex="16pt"/>
    </style:style>
    <style:style style:name="P21" style:family="paragraph" style:parent-style-name="Standard">
      <style:text-properties fo:font-size="16pt" officeooo:rsid="0018e2fd" officeooo:paragraph-rsid="0018f27b" style:font-size-asian="16pt" style:font-size-complex="16pt"/>
    </style:style>
    <style:style style:name="P22" style:family="paragraph" style:parent-style-name="Standard">
      <style:text-properties fo:font-size="16pt" officeooo:rsid="0018f27b" officeooo:paragraph-rsid="0018f27b" style:font-size-asian="16pt" style:font-size-complex="16pt"/>
    </style:style>
    <style:style style:name="P23" style:family="paragraph" style:parent-style-name="Standard">
      <style:text-properties fo:font-size="16pt" officeooo:rsid="0019f02c" officeooo:paragraph-rsid="0019f02c" style:font-size-asian="16pt" style:font-size-complex="16pt"/>
    </style:style>
    <style:style style:name="P24" style:family="paragraph" style:parent-style-name="Standard">
      <style:text-properties fo:font-size="16pt" officeooo:rsid="001d09d6" officeooo:paragraph-rsid="001d09d6" style:font-size-asian="16pt" style:font-size-complex="16pt"/>
    </style:style>
    <style:style style:name="P25" style:family="paragraph" style:parent-style-name="Standard">
      <style:text-properties fo:font-size="16pt" officeooo:rsid="002281cf" officeooo:paragraph-rsid="002281cf" style:font-size-asian="16pt" style:font-size-complex="16pt"/>
    </style:style>
    <style:style style:name="P26" style:family="paragraph" style:parent-style-name="Standard">
      <style:text-properties fo:font-size="16pt" officeooo:rsid="002281cf" officeooo:paragraph-rsid="00257b94" style:font-size-asian="16pt" style:font-size-complex="16pt"/>
    </style:style>
    <style:style style:name="P27" style:family="paragraph" style:parent-style-name="Standard">
      <style:text-properties fo:font-size="16pt" officeooo:rsid="0023d4da" officeooo:paragraph-rsid="0023d4da" style:font-size-asian="16pt" style:font-size-complex="16pt"/>
    </style:style>
    <style:style style:name="P28" style:family="paragraph" style:parent-style-name="Standard">
      <style:text-properties fo:font-size="16pt" officeooo:rsid="0028f782" officeooo:paragraph-rsid="002ad433" style:font-size-asian="16pt" style:font-size-complex="16pt"/>
    </style:style>
    <style:style style:name="P29" style:family="paragraph" style:parent-style-name="Standard">
      <style:text-properties fo:font-size="16pt" officeooo:rsid="00321ece" officeooo:paragraph-rsid="00321ece" style:font-size-asian="16pt" style:font-size-complex="16pt"/>
    </style:style>
    <style:style style:name="P30" style:family="paragraph" style:parent-style-name="Standard">
      <style:text-properties fo:font-size="16pt" officeooo:rsid="0035a6b0" officeooo:paragraph-rsid="0035a6b0" style:font-size-asian="16pt" style:font-size-complex="16pt"/>
    </style:style>
    <style:style style:name="P31" style:family="paragraph" style:parent-style-name="Standard">
      <style:text-properties fo:font-size="16pt" officeooo:rsid="0038bfd9" officeooo:paragraph-rsid="0038bfd9" style:font-size-asian="16pt" style:font-size-complex="16pt"/>
    </style:style>
    <style:style style:name="P32" style:family="paragraph" style:parent-style-name="Standard">
      <style:text-properties fo:font-size="16pt" officeooo:rsid="00394945" officeooo:paragraph-rsid="00394945" style:font-size-asian="16pt" style:font-size-complex="16pt"/>
    </style:style>
    <style:style style:name="P33" style:family="paragraph" style:parent-style-name="Standard">
      <style:text-properties fo:font-size="16pt" officeooo:rsid="003b0b57" officeooo:paragraph-rsid="003b0b57" style:font-size-asian="16pt" style:font-size-complex="16pt"/>
    </style:style>
    <style:style style:name="P34" style:family="paragraph" style:parent-style-name="Standard">
      <style:text-properties fo:font-size="16pt" officeooo:rsid="003b2ab1" officeooo:paragraph-rsid="003b2ab1" style:font-size-asian="16pt" style:font-size-complex="16pt"/>
    </style:style>
    <style:style style:name="P35" style:family="paragraph" style:parent-style-name="Standard">
      <style:text-properties fo:font-size="16pt" officeooo:rsid="003e4f55" officeooo:paragraph-rsid="003e4f55" style:font-size-asian="16pt" style:font-size-complex="16pt"/>
    </style:style>
    <style:style style:name="P36" style:family="paragraph" style:parent-style-name="Standard">
      <style:text-properties fo:font-size="16pt" officeooo:rsid="006449ca" officeooo:paragraph-rsid="004009af" style:font-size-asian="16pt" style:font-size-complex="16pt"/>
    </style:style>
    <style:style style:name="P37" style:family="paragraph" style:parent-style-name="Standard">
      <style:text-properties fo:font-size="16pt" officeooo:rsid="004009af" officeooo:paragraph-rsid="004009af" style:font-size-asian="16pt" style:font-size-complex="16pt"/>
    </style:style>
    <style:style style:name="P38" style:family="paragraph" style:parent-style-name="Standard">
      <style:text-properties fo:font-size="16pt" officeooo:rsid="004139d3" officeooo:paragraph-rsid="004139d3" style:font-size-asian="16pt" style:font-size-complex="16pt"/>
    </style:style>
    <style:style style:name="P39" style:family="paragraph" style:parent-style-name="Standard">
      <style:text-properties fo:font-size="16pt" officeooo:rsid="0043d1d3" officeooo:paragraph-rsid="0043d1d3" style:font-size-asian="16pt" style:font-size-complex="16pt"/>
    </style:style>
    <style:style style:name="P40" style:family="paragraph" style:parent-style-name="Standard">
      <style:text-properties fo:font-size="16pt" officeooo:rsid="004579cf" officeooo:paragraph-rsid="004579cf" style:font-size-asian="16pt" style:font-size-complex="16pt"/>
    </style:style>
    <style:style style:name="P41" style:family="paragraph" style:parent-style-name="Standard">
      <style:text-properties fo:font-size="16pt" officeooo:rsid="004649d5" officeooo:paragraph-rsid="004649d5" style:font-size-asian="16pt" style:font-size-complex="16pt"/>
    </style:style>
    <style:style style:name="P42" style:family="paragraph" style:parent-style-name="Standard">
      <style:text-properties fo:font-size="16pt" officeooo:rsid="0048e853" officeooo:paragraph-rsid="0048e853" style:font-size-asian="16pt" style:font-size-complex="16pt"/>
    </style:style>
    <style:style style:name="P43" style:family="paragraph" style:parent-style-name="Standard">
      <style:text-properties fo:font-size="16pt" officeooo:rsid="004dd9d2" officeooo:paragraph-rsid="004dd9d2" style:font-size-asian="16pt" style:font-size-complex="16pt"/>
    </style:style>
    <style:style style:name="P44" style:family="paragraph" style:parent-style-name="Standard">
      <style:text-properties fo:font-size="16pt" officeooo:rsid="00515337" officeooo:paragraph-rsid="00515337" style:font-size-asian="16pt" style:font-size-complex="16pt"/>
    </style:style>
    <style:style style:name="P45" style:family="paragraph" style:parent-style-name="Standard">
      <style:text-properties fo:font-size="16pt" officeooo:rsid="00525bba" officeooo:paragraph-rsid="00525bba" style:font-size-asian="16pt" style:font-size-complex="16pt"/>
    </style:style>
    <style:style style:name="P46" style:family="paragraph" style:parent-style-name="Standard">
      <style:text-properties fo:font-size="16pt" officeooo:rsid="005347f0" officeooo:paragraph-rsid="005347f0" style:font-size-asian="16pt" style:font-size-complex="16pt"/>
    </style:style>
    <style:style style:name="P47" style:family="paragraph" style:parent-style-name="Standard">
      <style:text-properties fo:font-size="16pt" officeooo:rsid="00549430" officeooo:paragraph-rsid="00549430" style:font-size-asian="16pt" style:font-size-complex="16pt"/>
    </style:style>
    <style:style style:name="P48" style:family="paragraph" style:parent-style-name="Standard">
      <style:text-properties fo:font-size="16pt" officeooo:rsid="00566f03" officeooo:paragraph-rsid="00566f03" style:font-size-asian="16pt" style:font-size-complex="16pt"/>
    </style:style>
    <style:style style:name="P49" style:family="paragraph" style:parent-style-name="Standard">
      <style:text-properties fo:font-size="16pt" officeooo:rsid="00582a7b" officeooo:paragraph-rsid="00582a7b" style:font-size-asian="16pt" style:font-size-complex="16pt"/>
    </style:style>
    <style:style style:name="P50" style:family="paragraph" style:parent-style-name="Standard">
      <style:text-properties fo:font-size="16pt" officeooo:rsid="0059cc0e" officeooo:paragraph-rsid="0059cc0e" style:font-size-asian="16pt" style:font-size-complex="16pt"/>
    </style:style>
    <style:style style:name="P51" style:family="paragraph" style:parent-style-name="Standard">
      <style:text-properties fo:font-size="16pt" officeooo:rsid="005a52a9" officeooo:paragraph-rsid="005a52a9" style:font-size-asian="16pt" style:font-size-complex="16pt"/>
    </style:style>
    <style:style style:name="P52" style:family="paragraph" style:parent-style-name="Standard">
      <style:text-properties fo:font-size="16pt" officeooo:rsid="005aae16" officeooo:paragraph-rsid="005aae16" style:font-size-asian="16pt" style:font-size-complex="16pt"/>
    </style:style>
    <style:style style:name="P53" style:family="paragraph" style:parent-style-name="Standard">
      <style:text-properties fo:font-size="16pt" officeooo:rsid="005c2f9f" officeooo:paragraph-rsid="005c2f9f" style:font-size-asian="16pt" style:font-size-complex="16pt"/>
    </style:style>
    <style:style style:name="P54" style:family="paragraph" style:parent-style-name="Standard">
      <style:text-properties fo:font-size="16pt" officeooo:rsid="005d880a" officeooo:paragraph-rsid="005d880a" style:font-size-asian="16pt" style:font-size-complex="16pt"/>
    </style:style>
    <style:style style:name="P55" style:family="paragraph" style:parent-style-name="Standard">
      <style:text-properties fo:font-size="16pt" officeooo:rsid="005f7906" officeooo:paragraph-rsid="005f7906" style:font-size-asian="16pt" style:font-size-complex="16pt"/>
    </style:style>
    <style:style style:name="P56" style:family="paragraph" style:parent-style-name="Standard">
      <style:text-properties fo:font-size="16pt" officeooo:rsid="006135b8" officeooo:paragraph-rsid="006135b8" style:font-size-asian="16pt" style:font-size-complex="16pt"/>
    </style:style>
    <style:style style:name="P57" style:family="paragraph" style:parent-style-name="Standard">
      <style:text-properties fo:font-size="16pt" officeooo:rsid="00637b6a" officeooo:paragraph-rsid="00637b6a" style:font-size-asian="16pt" style:font-size-complex="16pt"/>
    </style:style>
    <style:style style:name="P58" style:family="paragraph" style:parent-style-name="Standard">
      <style:text-properties fo:font-size="16pt" officeooo:rsid="00649652" officeooo:paragraph-rsid="00649652" style:font-size-asian="16pt" style:font-size-complex="16pt"/>
    </style:style>
    <style:style style:name="P59" style:family="paragraph" style:parent-style-name="Standard">
      <style:text-properties fo:font-size="16pt" officeooo:rsid="0066099a" officeooo:paragraph-rsid="0066099a" style:font-size-asian="16pt" style:font-size-complex="16pt"/>
    </style:style>
    <style:style style:name="P60" style:family="paragraph" style:parent-style-name="Standard">
      <style:text-properties fo:font-size="16pt" officeooo:rsid="006688b2" officeooo:paragraph-rsid="006688b2" style:font-size-asian="16pt" style:font-size-complex="16pt"/>
    </style:style>
    <style:style style:name="P61" style:family="paragraph" style:parent-style-name="Standard">
      <style:text-properties fo:font-size="16pt" officeooo:rsid="00676704" officeooo:paragraph-rsid="00676704" style:font-size-asian="16pt" style:font-size-complex="16pt"/>
    </style:style>
    <style:style style:name="P62" style:family="paragraph" style:parent-style-name="Standard">
      <style:text-properties fo:font-size="16pt" officeooo:rsid="00686718" officeooo:paragraph-rsid="00686718" style:font-size-asian="16pt" style:font-size-complex="16pt"/>
    </style:style>
    <style:style style:name="P63" style:family="paragraph" style:parent-style-name="Standard">
      <style:text-properties fo:font-size="16pt" officeooo:rsid="006a4de8" officeooo:paragraph-rsid="006a4de8" style:font-size-asian="16pt" style:font-size-complex="16pt"/>
    </style:style>
    <style:style style:name="P64" style:family="paragraph" style:parent-style-name="Standard">
      <style:text-properties fo:font-size="16pt" officeooo:rsid="006c51d6" officeooo:paragraph-rsid="006c51d6" style:font-size-asian="16pt" style:font-size-complex="16pt"/>
    </style:style>
    <style:style style:name="P65" style:family="paragraph" style:parent-style-name="Standard">
      <style:text-properties fo:font-size="16pt" officeooo:rsid="006ce4c3" officeooo:paragraph-rsid="006ce4c3" style:font-size-asian="16pt" style:font-size-complex="16pt"/>
    </style:style>
    <style:style style:name="P66" style:family="paragraph" style:parent-style-name="Standard">
      <style:text-properties fo:font-size="16pt" officeooo:rsid="006e5774" officeooo:paragraph-rsid="006e5774" style:font-size-asian="16pt" style:font-size-complex="16pt"/>
    </style:style>
    <style:style style:name="P67" style:family="paragraph" style:parent-style-name="Standard">
      <style:text-properties fo:font-size="16pt" officeooo:rsid="006f7388" officeooo:paragraph-rsid="006f7388" style:font-size-asian="16pt" style:font-size-complex="16pt"/>
    </style:style>
    <style:style style:name="P68" style:family="paragraph" style:parent-style-name="Standard">
      <style:text-properties fo:font-size="16pt" officeooo:rsid="007033db" officeooo:paragraph-rsid="007033db" style:font-size-asian="16pt" style:font-size-complex="16pt"/>
    </style:style>
    <style:style style:name="P69" style:family="paragraph" style:parent-style-name="Standard">
      <style:text-properties fo:font-size="16pt" officeooo:rsid="0070f967" officeooo:paragraph-rsid="0070f967" style:font-size-asian="16pt" style:font-size-complex="16pt"/>
    </style:style>
    <style:style style:name="P70" style:family="paragraph" style:parent-style-name="Standard">
      <style:text-properties fo:font-size="16pt" officeooo:rsid="0071607d" officeooo:paragraph-rsid="0071607d" style:font-size-asian="16pt" style:font-size-complex="16pt"/>
    </style:style>
    <style:style style:name="P71" style:family="paragraph" style:parent-style-name="Standard">
      <style:text-properties fo:font-size="16pt" officeooo:rsid="00728a94" officeooo:paragraph-rsid="00728a94" style:font-size-asian="16pt" style:font-size-complex="16pt"/>
    </style:style>
    <style:style style:name="P72" style:family="paragraph" style:parent-style-name="Standard">
      <style:text-properties fo:font-size="16pt" officeooo:rsid="0073bbf3" officeooo:paragraph-rsid="0073bbf3" style:font-size-asian="16pt" style:font-size-complex="16pt"/>
    </style:style>
    <style:style style:name="P73" style:family="paragraph" style:parent-style-name="Standard">
      <style:text-properties fo:font-size="16pt" officeooo:rsid="0073ef79" officeooo:paragraph-rsid="0073ef79" style:font-size-asian="16pt" style:font-size-complex="16pt"/>
    </style:style>
    <style:style style:name="P74" style:family="paragraph" style:parent-style-name="Standard">
      <style:text-properties fo:font-size="16pt" officeooo:rsid="00758500" officeooo:paragraph-rsid="00758500" style:font-size-asian="16pt" style:font-size-complex="16pt"/>
    </style:style>
    <style:style style:name="P75" style:family="paragraph" style:parent-style-name="Standard">
      <style:text-properties fo:font-size="16pt" officeooo:rsid="00760d59" officeooo:paragraph-rsid="00760d59" style:font-size-asian="16pt" style:font-size-complex="16pt"/>
    </style:style>
    <style:style style:name="P76" style:family="paragraph" style:parent-style-name="Standard">
      <style:text-properties fo:font-size="16pt" officeooo:rsid="007611da" officeooo:paragraph-rsid="007611da" style:font-size-asian="16pt" style:font-size-complex="16pt"/>
    </style:style>
    <style:style style:name="P77" style:family="paragraph" style:parent-style-name="Standard">
      <style:text-properties fo:font-size="16pt" officeooo:rsid="00783271" officeooo:paragraph-rsid="00783271" style:font-size-asian="16pt" style:font-size-complex="16pt"/>
    </style:style>
    <style:style style:name="P78" style:family="paragraph" style:parent-style-name="Standard">
      <style:text-properties fo:font-size="16pt" officeooo:rsid="00797bea" officeooo:paragraph-rsid="00797bea" style:font-size-asian="16pt" style:font-size-complex="16pt"/>
    </style:style>
    <style:style style:name="P79" style:family="paragraph" style:parent-style-name="Standard">
      <style:text-properties fo:font-size="16pt" officeooo:rsid="007a4408" officeooo:paragraph-rsid="007a4408" style:font-size-asian="16pt" style:font-size-complex="16pt"/>
    </style:style>
    <style:style style:name="P80" style:family="paragraph" style:parent-style-name="Standard">
      <style:text-properties fo:font-size="16pt" officeooo:rsid="007a6636" officeooo:paragraph-rsid="007a6636" style:font-size-asian="16pt" style:font-size-complex="16pt"/>
    </style:style>
    <style:style style:name="P81" style:family="paragraph" style:parent-style-name="Standard">
      <style:text-properties fo:font-size="16pt" officeooo:rsid="007b8aa8" officeooo:paragraph-rsid="007b8aa8" style:font-size-asian="16pt" style:font-size-complex="16pt"/>
    </style:style>
    <style:style style:name="P82" style:family="paragraph" style:parent-style-name="Standard">
      <style:text-properties fo:font-size="16pt" officeooo:rsid="00773f8b" officeooo:paragraph-rsid="00773f8b" style:font-size-asian="16pt" style:font-size-complex="16pt"/>
    </style:style>
    <style:style style:name="P83" style:family="paragraph" style:parent-style-name="Standard">
      <style:text-properties fo:font-size="16pt" officeooo:rsid="007c30c9" officeooo:paragraph-rsid="007c30c9" style:font-size-asian="16pt" style:font-size-complex="16pt"/>
    </style:style>
    <style:style style:name="P84" style:family="paragraph" style:parent-style-name="Standard">
      <style:text-properties fo:font-size="16pt" officeooo:rsid="007efb5c" officeooo:paragraph-rsid="007efb5c" style:font-size-asian="16pt" style:font-size-complex="16pt"/>
    </style:style>
    <style:style style:name="P85" style:family="paragraph" style:parent-style-name="Standard">
      <style:text-properties fo:font-size="16pt" officeooo:rsid="00815990" officeooo:paragraph-rsid="00815990" style:font-size-asian="16pt" style:font-size-complex="16pt"/>
    </style:style>
    <style:style style:name="P86" style:family="paragraph" style:parent-style-name="Standard">
      <style:text-properties fo:font-size="16pt" officeooo:rsid="00831b1a" officeooo:paragraph-rsid="00831b1a" style:font-size-asian="16pt" style:font-size-complex="16pt"/>
    </style:style>
    <style:style style:name="P87" style:family="paragraph" style:parent-style-name="Standard">
      <style:text-properties fo:font-size="16pt" officeooo:rsid="0083f791" officeooo:paragraph-rsid="0083f791" style:font-size-asian="16pt" style:font-size-complex="16pt"/>
    </style:style>
    <style:style style:name="P88" style:family="paragraph" style:parent-style-name="Standard">
      <style:text-properties fo:font-size="16pt" officeooo:rsid="00867866" officeooo:paragraph-rsid="00867866" style:font-size-asian="16pt" style:font-size-complex="16pt"/>
    </style:style>
    <style:style style:name="P89" style:family="paragraph" style:parent-style-name="Standard">
      <style:text-properties fo:font-size="16pt" officeooo:rsid="00884472" officeooo:paragraph-rsid="00884472" style:font-size-asian="16pt" style:font-size-complex="16pt"/>
    </style:style>
    <style:style style:name="P90" style:family="paragraph" style:parent-style-name="Standard">
      <style:text-properties fo:font-size="16pt" officeooo:rsid="00899290" officeooo:paragraph-rsid="00899290" style:font-size-asian="16pt" style:font-size-complex="16pt"/>
    </style:style>
    <style:style style:name="P91" style:family="paragraph" style:parent-style-name="Standard">
      <style:text-properties fo:font-size="16pt" officeooo:rsid="008c55c6" officeooo:paragraph-rsid="008c55c6" style:font-size-asian="16pt" style:font-size-complex="16pt"/>
    </style:style>
    <style:style style:name="P92" style:family="paragraph" style:parent-style-name="Standard">
      <style:text-properties fo:font-size="16pt" officeooo:rsid="008c801b" officeooo:paragraph-rsid="008c801b" style:font-size-asian="16pt" style:font-size-complex="16pt"/>
    </style:style>
    <style:style style:name="P93" style:family="paragraph" style:parent-style-name="Standard">
      <style:text-properties fo:font-size="16pt" officeooo:rsid="008cd952" officeooo:paragraph-rsid="008cd952" style:font-size-asian="16pt" style:font-size-complex="16pt"/>
    </style:style>
    <style:style style:name="P94" style:family="paragraph" style:parent-style-name="Standard">
      <style:text-properties fo:font-size="16pt" officeooo:rsid="008ed909" officeooo:paragraph-rsid="008ed909" style:font-size-asian="16pt" style:font-size-complex="16pt"/>
    </style:style>
    <style:style style:name="P95" style:family="paragraph" style:parent-style-name="Standard">
      <style:text-properties fo:font-size="16pt" officeooo:rsid="00905acf" officeooo:paragraph-rsid="00905acf" style:font-size-asian="16pt" style:font-size-complex="16pt"/>
    </style:style>
    <style:style style:name="P96" style:family="paragraph" style:parent-style-name="Standard">
      <style:text-properties fo:font-size="16pt" officeooo:rsid="0093ba97" officeooo:paragraph-rsid="0093ba97" style:font-size-asian="16pt" style:font-size-complex="16pt"/>
    </style:style>
    <style:style style:name="P97" style:family="paragraph" style:parent-style-name="Standard">
      <style:text-properties fo:font-size="16pt" officeooo:rsid="0093ba97" officeooo:paragraph-rsid="00988db1" style:font-size-asian="16pt" style:font-size-complex="16pt"/>
    </style:style>
    <style:style style:name="P98" style:family="paragraph" style:parent-style-name="Standard">
      <style:text-properties fo:font-size="16pt" officeooo:rsid="00988db1" officeooo:paragraph-rsid="00988db1" style:font-size-asian="16pt" style:font-size-complex="16pt"/>
    </style:style>
    <style:style style:name="P99" style:family="paragraph" style:parent-style-name="Standard">
      <style:text-properties fo:font-size="16pt" officeooo:rsid="009a783a" officeooo:paragraph-rsid="009a783a" style:font-size-asian="16pt" style:font-size-complex="16pt"/>
    </style:style>
    <style:style style:name="P100" style:family="paragraph" style:parent-style-name="Standard">
      <style:text-properties fo:font-size="16pt" officeooo:rsid="009a9507" officeooo:paragraph-rsid="009a9507" style:font-size-asian="16pt" style:font-size-complex="16pt"/>
    </style:style>
    <style:style style:name="P101" style:family="paragraph" style:parent-style-name="Standard">
      <style:text-properties fo:font-size="16pt" officeooo:rsid="009aeacc" officeooo:paragraph-rsid="009aeacc" style:font-size-asian="16pt" style:font-size-complex="16pt"/>
    </style:style>
    <style:style style:name="P102" style:family="paragraph" style:parent-style-name="Standard">
      <style:text-properties fo:font-size="16pt" officeooo:rsid="009cd948" officeooo:paragraph-rsid="009cd948" style:font-size-asian="16pt" style:font-size-complex="16pt"/>
    </style:style>
    <style:style style:name="P103" style:family="paragraph" style:parent-style-name="Standard">
      <style:text-properties fo:font-size="16pt" officeooo:rsid="009cd948" officeooo:paragraph-rsid="009e0f54" style:font-size-asian="16pt" style:font-size-complex="16pt"/>
    </style:style>
    <style:style style:name="P104" style:family="paragraph" style:parent-style-name="Standard">
      <style:text-properties fo:font-size="16pt" officeooo:rsid="009e0f54" officeooo:paragraph-rsid="009e0f54" style:font-size-asian="16pt" style:font-size-complex="16pt"/>
    </style:style>
    <style:style style:name="P105" style:family="paragraph" style:parent-style-name="Standard">
      <style:text-properties fo:font-size="16pt" officeooo:rsid="009f8d7e" officeooo:paragraph-rsid="009f8d7e" style:font-size-asian="16pt" style:font-size-complex="16pt"/>
    </style:style>
    <style:style style:name="P106" style:family="paragraph" style:parent-style-name="Standard">
      <style:text-properties fo:font-size="16pt" officeooo:rsid="00a0a7ea" officeooo:paragraph-rsid="00a0a7ea" style:font-size-asian="16pt" style:font-size-complex="16pt"/>
    </style:style>
    <style:style style:name="P107" style:family="paragraph" style:parent-style-name="Standard">
      <style:text-properties fo:font-size="16pt" officeooo:rsid="00a115cf" officeooo:paragraph-rsid="00a115cf" style:font-size-asian="16pt" style:font-size-complex="16pt"/>
    </style:style>
    <style:style style:name="P108" style:family="paragraph" style:parent-style-name="Standard">
      <style:text-properties fo:font-size="16pt" officeooo:rsid="00a1eede" officeooo:paragraph-rsid="00a1eede" style:font-size-asian="16pt" style:font-size-complex="16pt"/>
    </style:style>
    <style:style style:name="P109" style:family="paragraph" style:parent-style-name="Standard">
      <style:text-properties fo:font-size="16pt" officeooo:rsid="00a1eede" officeooo:paragraph-rsid="00a22515" style:font-size-asian="16pt" style:font-size-complex="16pt"/>
    </style:style>
    <style:style style:name="P110" style:family="paragraph" style:parent-style-name="Standard">
      <style:text-properties fo:font-size="16pt" officeooo:rsid="00a22515" officeooo:paragraph-rsid="00a22515" style:font-size-asian="16pt" style:font-size-complex="16pt"/>
    </style:style>
    <style:style style:name="P111" style:family="paragraph" style:parent-style-name="Standard">
      <style:text-properties fo:font-size="16pt" officeooo:rsid="00a31f2a" officeooo:paragraph-rsid="00a31f2a" style:font-size-asian="16pt" style:font-size-complex="16pt"/>
    </style:style>
    <style:style style:name="P112" style:family="paragraph" style:parent-style-name="Standard">
      <style:text-properties fo:font-size="16pt" officeooo:rsid="00a45f9c" officeooo:paragraph-rsid="00a45f9c" style:font-size-asian="16pt" style:font-size-complex="16pt"/>
    </style:style>
    <style:style style:name="P113" style:family="paragraph" style:parent-style-name="Standard">
      <style:text-properties fo:font-size="16pt" officeooo:rsid="00a45f9c" officeooo:paragraph-rsid="00a745de" style:font-size-asian="16pt" style:font-size-complex="16pt"/>
    </style:style>
    <style:style style:name="P114" style:family="paragraph" style:parent-style-name="Standard">
      <style:text-properties fo:font-size="16pt" officeooo:rsid="00a5facb" officeooo:paragraph-rsid="00a5facb" style:font-size-asian="16pt" style:font-size-complex="16pt"/>
    </style:style>
    <style:style style:name="P115" style:family="paragraph" style:parent-style-name="Standard">
      <style:text-properties fo:font-size="16pt" officeooo:rsid="00a745de" officeooo:paragraph-rsid="00a745de" style:font-size-asian="16pt" style:font-size-complex="16pt"/>
    </style:style>
    <style:style style:name="P116" style:family="paragraph" style:parent-style-name="Standard">
      <style:text-properties fo:font-size="16pt" officeooo:rsid="00a93034" officeooo:paragraph-rsid="00a93034" style:font-size-asian="16pt" style:font-size-complex="16pt"/>
    </style:style>
    <style:style style:name="P117" style:family="paragraph" style:parent-style-name="Standard">
      <style:text-properties fo:font-size="16pt" officeooo:rsid="00aa1568" officeooo:paragraph-rsid="00aa1568" style:font-size-asian="16pt" style:font-size-complex="16pt"/>
    </style:style>
    <style:style style:name="P118" style:family="paragraph" style:parent-style-name="Standard">
      <style:text-properties fo:font-size="16pt" officeooo:rsid="00ab7d4d" officeooo:paragraph-rsid="00ab7d4d" style:font-size-asian="16pt" style:font-size-complex="16pt"/>
    </style:style>
    <style:style style:name="P119" style:family="paragraph" style:parent-style-name="Standard">
      <style:text-properties fo:font-size="16pt" officeooo:rsid="00acaea3" officeooo:paragraph-rsid="00acaea3" style:font-size-asian="16pt" style:font-size-complex="16pt"/>
    </style:style>
    <style:style style:name="P120" style:family="paragraph" style:parent-style-name="Standard">
      <style:text-properties fo:font-size="16pt" officeooo:rsid="00b3b071" officeooo:paragraph-rsid="00b3b071" style:font-size-asian="16pt" style:font-size-complex="16pt"/>
    </style:style>
    <style:style style:name="P121" style:family="paragraph" style:parent-style-name="Standard">
      <style:text-properties fo:font-size="16pt" officeooo:rsid="00b8108e" officeooo:paragraph-rsid="00b8108e" style:font-size-asian="16pt" style:font-size-complex="16pt"/>
    </style:style>
    <style:style style:name="P122" style:family="paragraph" style:parent-style-name="Standard">
      <style:text-properties fo:font-size="16pt" officeooo:rsid="00b831d0" officeooo:paragraph-rsid="00b831d0" style:font-size-asian="16pt" style:font-size-complex="16pt"/>
    </style:style>
    <style:style style:name="T1" style:family="text">
      <style:text-properties officeooo:rsid="00083276"/>
    </style:style>
    <style:style style:name="T2" style:family="text">
      <style:text-properties officeooo:rsid="000be320"/>
    </style:style>
    <style:style style:name="T3" style:family="text">
      <style:text-properties officeooo:rsid="000ecbd6"/>
    </style:style>
    <style:style style:name="T4" style:family="text">
      <style:text-properties officeooo:rsid="00113d9c"/>
    </style:style>
    <style:style style:name="T5" style:family="text">
      <style:text-properties officeooo:rsid="00177180"/>
    </style:style>
    <style:style style:name="T6" style:family="text">
      <style:text-properties officeooo:rsid="0017fa2d"/>
    </style:style>
    <style:style style:name="T7" style:family="text">
      <style:text-properties officeooo:rsid="00188484"/>
    </style:style>
    <style:style style:name="T8" style:family="text">
      <style:text-properties officeooo:rsid="0018e2fd"/>
    </style:style>
    <style:style style:name="T9" style:family="text">
      <style:text-properties officeooo:rsid="0018f27b"/>
    </style:style>
    <style:style style:name="T10" style:family="text">
      <style:text-properties officeooo:rsid="001b92f6"/>
    </style:style>
    <style:style style:name="T11" style:family="text">
      <style:text-properties officeooo:rsid="001ea853"/>
    </style:style>
    <style:style style:name="T12" style:family="text">
      <style:text-properties officeooo:rsid="002083bb"/>
    </style:style>
    <style:style style:name="T13" style:family="text">
      <style:text-properties officeooo:rsid="0023d4da"/>
    </style:style>
    <style:style style:name="T14" style:family="text">
      <style:text-properties officeooo:rsid="00241228"/>
    </style:style>
    <style:style style:name="T15" style:family="text">
      <style:text-properties officeooo:rsid="00257b94"/>
    </style:style>
    <style:style style:name="T16" style:family="text">
      <style:text-properties officeooo:rsid="00275b57"/>
    </style:style>
    <style:style style:name="T17" style:family="text">
      <style:text-properties officeooo:rsid="002ad433"/>
    </style:style>
    <style:style style:name="T18" style:family="text">
      <style:text-properties officeooo:rsid="002b8697"/>
    </style:style>
    <style:style style:name="T19" style:family="text">
      <style:text-properties officeooo:rsid="00308b80"/>
    </style:style>
    <style:style style:name="T20" style:family="text">
      <style:text-properties officeooo:rsid="0032b64a"/>
    </style:style>
    <style:style style:name="T21" style:family="text">
      <style:text-properties officeooo:rsid="00394945"/>
    </style:style>
    <style:style style:name="T22" style:family="text">
      <style:text-properties officeooo:rsid="003b0b57"/>
    </style:style>
    <style:style style:name="T23" style:family="text">
      <style:text-properties officeooo:rsid="003b2ab1"/>
    </style:style>
    <style:style style:name="T24" style:family="text">
      <style:text-properties officeooo:rsid="003e4f55"/>
    </style:style>
    <style:style style:name="T25" style:family="text">
      <style:text-properties officeooo:rsid="003fb6ca"/>
    </style:style>
    <style:style style:name="T26" style:family="text">
      <style:text-properties officeooo:rsid="004139d3"/>
    </style:style>
    <style:style style:name="T27" style:family="text">
      <style:text-properties officeooo:rsid="0042010d"/>
    </style:style>
    <style:style style:name="T28" style:family="text">
      <style:text-properties officeooo:rsid="0043d1d3"/>
    </style:style>
    <style:style style:name="T29" style:family="text">
      <style:text-properties officeooo:rsid="0048e853"/>
    </style:style>
    <style:style style:name="T30" style:family="text">
      <style:text-properties officeooo:rsid="004a850f"/>
    </style:style>
    <style:style style:name="T31" style:family="text">
      <style:text-properties officeooo:rsid="004be872"/>
    </style:style>
    <style:style style:name="T32" style:family="text">
      <style:text-properties officeooo:rsid="004cfa04"/>
    </style:style>
    <style:style style:name="T33" style:family="text">
      <style:text-properties officeooo:rsid="004e4587"/>
    </style:style>
    <style:style style:name="T34" style:family="text">
      <style:text-properties officeooo:rsid="00525bba"/>
    </style:style>
    <style:style style:name="T35" style:family="text">
      <style:text-properties officeooo:rsid="005347f0"/>
    </style:style>
    <style:style style:name="T36" style:family="text">
      <style:text-properties officeooo:rsid="005405f5"/>
    </style:style>
    <style:style style:name="T37" style:family="text">
      <style:text-properties officeooo:rsid="00549430"/>
    </style:style>
    <style:style style:name="T38" style:family="text">
      <style:text-properties officeooo:rsid="00566f03"/>
    </style:style>
    <style:style style:name="T39" style:family="text">
      <style:text-properties officeooo:rsid="005c2f9f"/>
    </style:style>
    <style:style style:name="T40" style:family="text">
      <style:text-properties officeooo:rsid="005d880a"/>
    </style:style>
    <style:style style:name="T41" style:family="text">
      <style:text-properties officeooo:rsid="005f7906"/>
    </style:style>
    <style:style style:name="T42" style:family="text">
      <style:text-properties officeooo:rsid="006135b8"/>
    </style:style>
    <style:style style:name="T43" style:family="text">
      <style:text-properties officeooo:rsid="0062aa6d"/>
    </style:style>
    <style:style style:name="T44" style:family="text">
      <style:text-properties officeooo:rsid="00631d76"/>
    </style:style>
    <style:style style:name="T45" style:family="text">
      <style:text-properties officeooo:rsid="00637b6a"/>
    </style:style>
    <style:style style:name="T46" style:family="text">
      <style:text-properties officeooo:rsid="00649652"/>
    </style:style>
    <style:style style:name="T47" style:family="text">
      <style:text-properties officeooo:rsid="0066099a"/>
    </style:style>
    <style:style style:name="T48" style:family="text">
      <style:text-properties officeooo:rsid="006ac255"/>
    </style:style>
    <style:style style:name="T49" style:family="text">
      <style:text-properties officeooo:rsid="006c51d6"/>
    </style:style>
    <style:style style:name="T50" style:family="text">
      <style:text-properties officeooo:rsid="00736e85"/>
    </style:style>
    <style:style style:name="T51" style:family="text">
      <style:text-properties officeooo:rsid="00773f8b"/>
    </style:style>
    <style:style style:name="T52" style:family="text">
      <style:text-properties officeooo:rsid="00783271"/>
    </style:style>
    <style:style style:name="T53" style:family="text">
      <style:text-properties officeooo:rsid="0078557f"/>
    </style:style>
    <style:style style:name="T54" style:family="text">
      <style:text-properties officeooo:rsid="0078f1da"/>
    </style:style>
    <style:style style:name="T55" style:family="text">
      <style:text-properties officeooo:rsid="007a4408"/>
    </style:style>
    <style:style style:name="T56" style:family="text">
      <style:text-properties officeooo:rsid="007b8aa8"/>
    </style:style>
    <style:style style:name="T57" style:family="text">
      <style:text-properties officeooo:rsid="007efb5c"/>
    </style:style>
    <style:style style:name="T58" style:family="text">
      <style:text-properties officeooo:rsid="007fb7b1"/>
    </style:style>
    <style:style style:name="T59" style:family="text">
      <style:text-properties officeooo:rsid="008cd952"/>
    </style:style>
    <style:style style:name="T60" style:family="text">
      <style:text-properties officeooo:rsid="008ed909"/>
    </style:style>
    <style:style style:name="T61" style:family="text">
      <style:text-properties officeooo:rsid="009a783a"/>
    </style:style>
    <style:style style:name="T62" style:family="text">
      <style:text-properties officeooo:rsid="009a9507"/>
    </style:style>
    <style:style style:name="T63" style:family="text">
      <style:text-properties officeooo:rsid="009cd948"/>
    </style:style>
    <style:style style:name="T64" style:family="text">
      <style:text-properties officeooo:rsid="009f8d7e"/>
    </style:style>
    <style:style style:name="T65" style:family="text">
      <style:text-properties officeooo:rsid="00a115cf"/>
    </style:style>
    <style:style style:name="T66" style:family="text">
      <style:text-properties officeooo:rsid="00a22515"/>
    </style:style>
    <style:style style:name="T67" style:family="text">
      <style:text-properties officeooo:rsid="00a31f2a"/>
    </style:style>
    <style:style style:name="T68" style:family="text">
      <style:text-properties officeooo:rsid="00a45f9c"/>
    </style:style>
    <style:style style:name="T69" style:family="text">
      <style:text-properties officeooo:rsid="00a5facb"/>
    </style:style>
    <style:style style:name="T70" style:family="text">
      <style:text-properties officeooo:rsid="00a745de"/>
    </style:style>
    <style:style style:name="T71" style:family="text">
      <style:text-properties officeooo:rsid="00a93034"/>
    </style:style>
    <style:style style:name="T72" style:family="text">
      <style:text-properties officeooo:rsid="00aa1568"/>
    </style:style>
    <style:style style:name="T73" style:family="text">
      <style:text-properties officeooo:rsid="00ab7d4d"/>
    </style:style>
    <style:style style:name="T74" style:family="text">
      <style:text-properties officeooo:rsid="00acaea3"/>
    </style:style>
    <style:style style:name="T75" style:family="text">
      <style:text-properties officeooo:rsid="00acd819"/>
    </style:style>
    <style:style style:name="T76" style:family="text">
      <style:text-properties officeooo:rsid="00acfd2d"/>
    </style:style>
    <style:style style:name="T77" style:family="text">
      <style:text-properties officeooo:rsid="00ada6ec"/>
    </style:style>
    <style:style style:name="T78" style:family="text">
      <style:text-properties officeooo:rsid="00af957e"/>
    </style:style>
    <style:style style:name="T79" style:family="text">
      <style:text-properties officeooo:rsid="00b02ca3"/>
    </style:style>
    <style:style style:name="T80" style:family="text">
      <style:text-properties officeooo:rsid="00b1475a"/>
    </style:style>
    <style:style style:name="T81" style:family="text">
      <style:text-properties officeooo:rsid="00b2501b"/>
    </style:style>
    <style:style style:name="T82" style:family="text">
      <style:text-properties officeooo:rsid="00b38aed"/>
    </style:style>
    <style:style style:name="T83" style:family="text">
      <style:text-properties officeooo:rsid="00b3b071"/>
    </style:style>
    <style:style style:name="T84" style:family="text">
      <style:text-properties officeooo:rsid="00b4999f"/>
    </style:style>
    <style:style style:name="T85" style:family="text">
      <style:text-properties officeooo:rsid="00b5ce2d"/>
    </style:style>
    <style:style style:name="T86" style:family="text">
      <style:text-properties officeooo:rsid="00b6c93a"/>
    </style:style>
    <style:style style:name="T87" style:family="text">
      <style:text-properties officeooo:rsid="00b9467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weweb academy:</text:p>
      <text:p text:style-name="P1"/>
      <text:p text:style-name="P1">que es weweb</text:p>
      <text:p text:style-name="P1">q<text:span text:style-name="T77">u</text:span>e puedes construir con el</text:p>
      <text:p text:style-name="P1">y lo <text:span text:style-name="T77">qu</text:span>e puedes hacer al final de ese curso</text:p>
      <text:p text:style-name="P1">weweb es una herramienta sin código o<text:span text:style-name="T77">s</text:span>ea construir una interfaz de usuario para t<text:span text:style-name="T77">u</text:span>s productos web pero necesitas un backend externo y un sistema de autent<text:span text:style-name="T77">i</text:span>cación <text:s/>completo a una aplicación web completa, esto es por diseño por que es el tecnología mas moderna y la mejor practica en el desarrollo actual tener el fr<text:span text:style-name="T77">o</text:span>ntend y backend desacoplado entonces weweb se encarga de la parte lógic<text:span text:style-name="T77">a</text:span> y de la interfaz de usuario en el fronte<text:span text:style-name="T77">n</text:span>d</text:p>
      <text:p text:style-name="P1">y el backend tendrá bse de datos y s<text:span text:style-name="T77">i</text:span>stem<text:span text:style-name="T77">a</text:span> de autenticación <text:s/>y se p<text:span text:style-name="T77">i</text:span>de integrar con la base de datos de ui <text:span text:style-name="T1">entonces en este curso aprenderemos como: </text:span></text:p>
      <text:p text:style-name="P2">*tomar un diseño de figman ye integrarlo a weweb</text:p>
      <text:p text:style-name="P2"/>
      <text:p text:style-name="P2">* conectar múltiples fuentes de datos a un solo proyecto weweb</text:p>
      <text:p text:style-name="P2">* agregar lógica del frontend para mostrar y filtrar datos y permitir que los us<text:span text:style-name="T78">u</text:span>arios actualicen sus base de datos a través de l<text:span text:style-name="T77">a</text:span>s interfaz de usu<text:span text:style-name="T78">a</text:span>rio diseñada en weweb</text:p>
      <text:p text:style-name="P2">agregar un sistema de autenticación para que los usuarios puedan iniciar sesión para ver ciertos tipos de contenido </text:p>
      <text:p text:style-name="P3">aquí en este curso aprenderemos el mvp para q<text:span text:style-name="T78">u</text:span>e escale en el futuro</text:p>
      <text:p text:style-name="P4">para agregar <text:s/>una nueva pagina</text:p>
      <text:p text:style-name="P4">pude ser de home <text:s/>pue<text:span text:style-name="T78">d</text:span>es crear otra con home add new page y la crea ya sea va<text:span text:style-name="T2">cía</text:span> o como una copia <text:span text:style-name="T2">de una anterior</text:span> </text:p>
      <text:p text:style-name="P4"/>
      <text:p text:style-name="P5">después en <text:span text:style-name="T78">l</text:span>a esquina izquierda superior <text:s/>puedes ir a add para añadir los componentes de su pagina web</text:p>
      <text:p text:style-name="P6">para añadir una ca<text:span text:style-name="T78">rd</text:span> puedes añadir un div <text:s/>luego adentro de este añadir todo lo que necesites le undes en el mismo add y añades texto o imágenes</text:p>
      <text:p text:style-name="P7">topografía esta disponible <text:span text:style-name="T78">e</text:span>n la pestaña libraries</text:p>
      <text:p text:style-name="P7"/>
      <text:p text:style-name="P7"><text:span text:style-name="T3">el dinamismo en las paginas web osea tener el frontend y backend separados </text:span><text:s/><text:span text:style-name="T3">e integrarlos correctamente, <text:s/>se efectúa con <text:s/>esto a través de plugins con base de datos para acceder <text:s/>a estos según se necesite, estos plugins tienen una un menú básico aunque se puede a</text:span><text:span text:style-name="T78">ñ</text:span><text:span text:style-name="T3">adir mas según la necesidad</text:span></text:p>
      <text:p text:style-name="P8"/>
      <text:p text:style-name="P9"><text:soft-page-break/>antes de editar aspectos de los datos asegurarnos de que est<text:span text:style-name="T78">o</text:span>s entren de forma adecuada a la frontend</text:p>
      <text:p text:style-name="P2"/>
      <text:p text:style-name="P10">para usar topograf<text:span text:style-name="T4">í</text:span>a debes de usar library luego añadir ya e añade ala <text:span text:style-name="T78">bi</text:span>blioteca personal para usar</text:p>
      <text:p text:style-name="P10">luego cando tengas ya vinculado el enlace de la pagina web se debe de vincular al conten<text:span text:style-name="T78">edo</text:span>r grande accediendo ala data de ña aplicación y en l<text:span text:style-name="T78">a</text:span>s <text:span text:style-name="T78">sub</text:span>contendedores que se vayan a usar según se requiera</text:p>
      <text:p text:style-name="P10">y <text:span text:style-name="T78">a</text:span>rrastrar <text:s/>los elementos al contenedor creado para que sean visibles</text:p>
      <text:p text:style-name="P10"/>
      <text:p text:style-name="P11">para autentica ve a auth le das clic ah<text:span text:style-name="T78">í</text:span> ves los u<text:span text:style-name="T78">su</text:span>ar<text:span text:style-name="T78">i</text:span>os y grupos de usuarios disponibles</text:p>
      <text:p text:style-name="P11"/>
      <text:p text:style-name="P11"/>
      <text:p text:style-name="P11">primero configurar como administrar tu entrada para la autenticación</text:p>
      <text:p text:style-name="P12">luego le undes mange user para manejar los d<text:span text:style-name="T78">a</text:span>t<text:span text:style-name="T78">o</text:span>s de a<text:span text:style-name="T78">u</text:span>thenticat<text:span text:style-name="T78">i</text:span>on osea crear los roles </text:p>
      <text:p text:style-name="P12">después <text:s/>configuras esa parte de <text:span text:style-name="T78">l</text:span>a p<text:span text:style-name="T78">a</text:span>gina web para no darle acceso a los usuarios a ea parte de <text:span text:style-name="T78">l</text:span>a pagina web al menos de que pertenezcan al grupo de usuario cread<text:span text:style-name="T78">o</text:span>s por anterioridad.</text:p>
      <text:p text:style-name="P12"/>
      <text:p text:style-name="P13">Plug<text:span text:style-name="T78">i</text:span>n de xano solo me funciona con esto</text:p>
      <text:p text:style-name="P13"/>
      <text:p text:style-name="P13">unas cosas co<text:span text:style-name="T79">l</text:span>ecciones</text:p>
      <text:p text:style-name="P13">no se <text:span text:style-name="T79">actualizan por el </text:span>put</text:p>
      <text:p text:style-name="P13"/>
      <text:p text:style-name="P14">xano</text:p>
      <text:p text:style-name="P14"/>
      <text:p text:style-name="P14">restapi</text:p>
      <text:p text:style-name="P14"/>
      <text:p text:style-name="P14">GET-Collection</text:p>
      <text:p text:style-name="P15">Workflows: Create Update Delete</text:p>
      <text:p text:style-name="P14"/>
      <text:p text:style-name="P14"/>
      <text:p text:style-name="P16">en figma podremos asegurar<text:span text:style-name="T79">nos</text:span> de q<text:span text:style-name="T79">u</text:span>e el usuario llegue a tener una coherencia de usuario satisfactoria</text:p>
      <text:p text:style-name="P16">al revisar como nos deben de quedar el diseño de nuestras pagina<text:span text:style-name="T79">s</text:span> web o de aplicaciones</text:p>
      <text:p text:style-name="P16"/>
      <text:p text:style-name="P16"><text:soft-page-break/>para hacer esto se deben analizar las dimensiones <text:s/>del modelo qu nos dia el diseñador <text:span text:style-name="T13">q</text:span>ue este no da</text:p>
      <text:p text:style-name="P17">si se en<text:span text:style-name="T13">c</text:span>uentra un espacio que no debe estar ahí en el diseño fi<text:span text:style-name="T13">n</text:span>al <text:s/>a la hora que los c<text:span text:style-name="T11">o</text:span>nsumidores finales , por ejemplo <text:s/>se analiza u cuadro de información grande junto con un espacio vació lo que se podría hacer <text:s/>es no trat<text:span text:style-name="T11">a</text:span>r est<text:span text:style-name="T13">o</text:span>s espacios <text:s/>adecuadamente la primera idea <text:s/>es agregar margenes en pixeles esto es mala idea debido a que podría <text:span text:style-name="T80">causar</text:span> problemas de vista en pantallas grandes como en el caso de las tablets por esto esta opción rara, <text:span text:style-name="T5">pue</text:span><text:span text:style-name="T13">s</text:span><text:span text:style-name="T5">to que al poner margenes de 5 px qse desequilibra nuestro trabajo ademas que hay demasiado espacio entre columnas y el diseño se ve plano la otra opción es relleno pero tendremos un problema similar en pantallas mas grandes se vera desequilibrio.</text:span></text:p>
      <text:p text:style-name="P18">Lo que podemos hacer es agregar un ancho máximo a cada sección <text:s/>y agregar relleno en sus elementos para que en pantallas pequeñas así el contenido tendrá como respirar en el ejemplo se agrego un ancho máximo de 1300px de manera <text:span text:style-name="T80">pr</text:span>edeterminada de fra predeterminada así cuando agrega una sección en blanco tendrá un máximo completo, <text:s/>esto tendrá un máximo completo y puede <text:span text:style-name="T6">ver que aquí es solo rellenos y de lo que hablamos de que no se ve bien por lo tanto la encajonaremos para que no se desequilibre la </text:span><text:span text:style-name="T7">información que tenemos depende de que lo mue</text:span><text:span text:style-name="T80">v</text:span><text:span text:style-name="T7">as u <text:s/>poco he experimentes con el según sea tu caso</text:span></text:p>
      <text:p text:style-name="P18"><text:s/><text:span text:style-name="T7">con el ancho máximo te ag</text:span><text:span text:style-name="T13">r</text:span><text:span text:style-name="T7">u</text:span><text:span text:style-name="T13">p</text:span><text:span text:style-name="T7">as que <text:s/>el diseño se vea bien en pantallas grandes esto gracias al ancho máximo y en small creen <text:s/>con el relleno osea paddding</text:span></text:p>
      <text:p text:style-name="P18"/>
      <text:p text:style-name="P19">al volver al bloque se ve u<text:span text:style-name="T80">n</text:span> gran bloque de navegación, para entrenar nuestros ojos en visualizar diferentes bloques de la pagina un método es <text:s/>empezar desde la izquierda en la parte superior hasta la derecha luego de arriba a abajo, si se sigue el diseño así se podrán entrenar los ojos,si lo vemos de<text:span text:style-name="T80">s</text:span>de la parte superior izquierda necesitamos diseñar desde derecha a izquierda, obvio puedes efectuarlo oh no después de tus necesidades un e<text:span text:style-name="T80">j</text:span>emplo de la eficacia es q<text:span text:style-name="T80">u</text:span>e en el ejemplo la chica pudo identificar un bloque de contenido extra como un calendario y otras fechas mirando de izquierda a derecha <text:span text:style-name="T8">de arriba a abajo ahí 2 bloques <text:s/>2 column 1 y c</text:span><text:span text:style-name="T80">o</text:span><text:span text:style-name="T8">lumn 2</text:span>.</text:p>
      <text:p text:style-name="P20">en estas a<text:span text:style-name="T80">rc</text:span>hivos subbloques como el header, overview, history links y card</text:p>
      <text:p text:style-name="P20">la idea de esto es entrenar a tu <text:s/>ojos para detectar espacios e<text:span text:style-name="T80">j</text:span>emplo entre 2 textos .</text:p>
      <text:p text:style-name="P20"><text:soft-page-break/>La observar el header se ve que ahí <text:s/>2 elementos vertical anteriormente se estableci<text:span text:style-name="T80">do</text:span> un cuadro a la derech<text:span text:style-name="T80">a</text:span> y otro la izquierda en el hader <text:s/>esta noción ves importante ya que al usar weweb usaremo<text:span text:style-name="T80">s</text:span> flexbos <text:s/>con una dirección horizontal o vertical osea elementos uno al lado del otro</text:p>
      <text:p text:style-name="P21">o eleme<text:span text:style-name="T80">n</text:span>tos uno sobre el otro toca seguir analizando los otros <text:span text:style-name="T9">elementos ya que en algun</text:span><text:span text:style-name="T80">o</text:span><text:span text:style-name="T9">s se pueden repet</text:span><text:span text:style-name="T80">i</text:span><text:span text:style-name="T9">r cosas se analizo un figma y se integro esto a weweb </text:span></text:p>
      <text:p text:style-name="P21"><text:span text:style-name="T9">debes de </text:span><text:span text:style-name="T80">e</text:span><text:span text:style-name="T9">ditar <text:s/>l tamaño de las cosas en p</text:span><text:span text:style-name="T80">a</text:span><text:span text:style-name="T9">ntalla para u o se d</text:span><text:span text:style-name="T80">e</text:span><text:span text:style-name="T9">sborden ejemplo una imagen en p</text:span><text:span text:style-name="T80">n</text:span><text:span text:style-name="T9">g etc</text:span>.</text:p>
      <text:p text:style-name="P20"/>
      <text:p text:style-name="P22">en ospay desactivamos <text:s/>el elemento al usar dis<text:span text:style-name="T80">p</text:span>layof <text:s/>lo desactivaremos y ocultaremos seg<text:span text:style-name="T80">ú</text:span>n la vista que estemos haciendo</text:p>
      <text:p text:style-name="P24">se hará una practica <text:s/>con figma <text:span text:style-name="T12">se va revisando </text:span></text:p>
      <text:p text:style-name="P23">se deben a acomodar los elementos según el dispositiv<text:span text:style-name="T80">o</text:span> para lograr un buen v<text:span text:style-name="T80">i</text:span>s<text:span text:style-name="T80">u</text:span>alización de los elementos sin importar <text:s/>la pantalla esto debido a los desb<text:span text:style-name="T10">o</text:span>rdes que se pueden presentar en las diferentes pantallas.</text:p>
      <text:p text:style-name="P23"/>
      <text:p text:style-name="P25">Cambien se hozo responsiva de esta pagina</text:p>
      <text:p text:style-name="P26">el o<text:span text:style-name="T80">l</text:span>der de la single page aplication es que l<text:span text:style-name="T80">a</text:span>s secciones y el contenido que se usaron no se carga una segunda vez esto es <text:span text:style-name="T15">ex</text:span>ce<text:span text:style-name="T15">l</text:span>ente ya que el u<text:span text:style-name="T80">su</text:span>ario no <text:span text:style-name="T80">p</text:span>ermita parpadeos y acelera el proceso de carga <text:s/>una cosa a tene<text:span text:style-name="T80">r</text:span> <text:span text:style-name="T80">pac</text:span>ien<text:span text:style-name="T80">ci</text:span>a es q<text:span text:style-name="T80">u</text:span>e cada <text:span text:style-name="T80">pa</text:span>gin<text:span text:style-name="T80">a</text:span> tena un objetivo</text:p>
      <text:p text:style-name="P25"><text:s/>esto <text:span text:style-name="T80">s</text:span>ignifica que puedes usar las mu</text:p>
      <text:p text:style-name="P25">abres <text:s/>la el botón de add <text:span text:style-name="T13">usas el multiplica sections y <text:s/>agregas lo que quieres</text:span></text:p>
      <text:p text:style-name="P27">usar en u otra pagina</text:p>
      <text:p text:style-name="P27"/>
      <text:p text:style-name="P27">para mostrar datos se usa el <text:span text:style-name="T14">apirest </text:span>y con el candado salio la inform<text:span text:style-name="T14">ación</text:span> <text:span text:style-name="T16">que necesites</text:span></text:p>
      <text:p text:style-name="P28">lista de ítems <text:s/>de una colecciona <text:span text:style-name="T17">osea una data para usarlos en weweb</text:span></text:p>
      <text:p text:style-name="P28"><text:span text:style-name="T17">añadimos la colección rest_api desde plugins </text:span><text:span text:style-name="T18">api_ rest y <text:s/>para agregar una tabla vamos add y la agregamos <text:s/></text:span><text:span text:style-name="T19">usamos</text:span></text:p>
      <text:p text:style-name="P29">si quieres concatenar algo agregas concat y paréntesis adentro elemento q<text:span text:style-name="T80">u</text:span>e llamaste al agregar el texto</text:p>
      <text:p text:style-name="P29"><text:s/><text:span text:style-name="T20">para colo</text:span><text:span text:style-name="T80">c</text:span><text:span text:style-name="T20">ar date debemos agregarlo con add y quitarlo según corresponda en el elementos</text:span></text:p>
      <text:p text:style-name="P30">ahora esta dice la cantidad de elementos</text:p>
      <text:p text:style-name="P30">con el paginar puedes agregarlo para navegar por distintos elementos uy dec<text:span text:style-name="T80">i</text:span>rle que colección de datos utilizar</text:p>
      <text:p text:style-name="P30"><text:soft-page-break/></text:p>
      <text:p text:style-name="P31"><text:span text:style-name="T21">1. </text:span>puedes vincular cualquier colección al <text:span text:style-name="T80">c</text:span>ontenedor que desee.</text:p>
      <text:p text:style-name="P32">2. cu<text:span text:style-name="T80">an</text:span>do vinculas una colección a un contenedor <text:s/>el primer elemento de ese contender secundario se va a repetir tantas veces, <text:span text:style-name="T80">por</text:span> lo tanto debe asegura<text:span text:style-name="T22">rse</text:span> de tener t<text:span text:style-name="T22">o</text:span>da la información; <text:span text:style-name="T22">debe de hac</text:span><text:span text:style-name="T80">e</text:span><text:span text:style-name="T22">r formulas importantes </text:span><text:span text:style-name="T80">pa</text:span><text:span text:style-name="T22">ra eso</text:span></text:p>
      <text:p text:style-name="P33">3. puedes usar formu<text:span text:style-name="T23">l</text:span>a sin có<text:span text:style-name="T23">d</text:span>igo para jugar con los elementos e<text:span text:style-name="T23">n</text:span> p<text:span text:style-name="T24">a</text:span>ntalla</text:p>
      <text:p text:style-name="P34">4. si no hay pa<text:span text:style-name="T80">g</text:span>inación el navega<text:span text:style-name="T80">dor</text:span> se ralentiza hasta para<text:span text:style-name="T24">rs</text:span>e.</text:p>
      <text:p text:style-name="P34"/>
      <text:p text:style-name="P35">Se filtra un lista <text:s/>con elementos seleccionados a tra<text:span text:style-name="T80">v</text:span>és de la forma de función filter o también si <text:span text:style-name="T80">f</text:span>iltramos por condiciones ejemplo mayor a x <text:span text:style-name="T25">elementos <text:s/></text:span></text:p>
      <text:p text:style-name="P36">creamos el input para filtrar osea añadido <text:span text:style-name="T80">l</text:span>uego lo bajas y ponemos en</text:p>
      <text:p text:style-name="P36">también podemos filtrar por formulas</text:p>
      <text:p text:style-name="P37">creamo<text:span text:style-name="T80">s</text:span> una variable co<text:span text:style-name="T80">n</text:span> el nombre de la búsqueda</text:p>
      <text:p text:style-name="P37"/>
      <text:p text:style-name="P37">a través de <text:s/>un workflo<text:span text:style-name="T80">w</text:span> se añade</text:p>
      <text:p text:style-name="P37"/>
      <text:p text:style-name="P37">le undímos <text:s/><text:span text:style-name="T26">add </text:span><text:span text:style-name="T80">se</text:span><text:span text:style-name="T26">ction change value y ponemos el valor de a variable a cambiar</text:span></text:p>
      <text:p text:style-name="P38">añadimos la variable </text:p>
      <text:p text:style-name="P38">editamos la formula </text:p>
      <text:p text:style-name="P38">event value</text:p>
      <text:p text:style-name="P38"/>
      <text:p text:style-name="P38">volvemos al filtro concreto y editamos <text:span text:style-name="T80">f</text:span>ilter osea su formula</text:p>
      <text:p text:style-name="P38">esto provoca <text:span text:style-name="T80">que cu</text:span>ando gu<text:span text:style-name="T80">ar</text:span>damos la variable que el u<text:span text:style-name="T27">su</text:span>ario mete un dato en el filtro este lo busque automáticamente <text:span text:style-name="T80">lo que</text:span><text:span text:style-name="T27"> tenemos que desactivar la opcion </text:span><text:span text:style-name="T80">a</text:span><text:span text:style-name="T27">dvanced place folder</text:span></text:p>
      <text:p text:style-name="P38"><text:s/><text:span text:style-name="T27">y activar deboun</text:span><text:span text:style-name="T28">ce</text:span><text:span text:style-name="T27"> osea el retraso y dejarlo de 2 segundos</text:span></text:p>
      <text:p text:style-name="P39">antes se crea u where donde se agregue la formula creada a partir de la agregación de la var<text:span text:style-name="T80">i</text:span>able creada anteriormente para mostrar los ítems osea el where es </text:p>
      <text:p text:style-name="P39">where call<text:span text:style-name="T80">i</text:span>to cotains edit formula</text:p>
      <text:p text:style-name="P39"/>
      <text:p text:style-name="P38"/>
      <text:p text:style-name="P38"/>
      <text:p text:style-name="P40">formulas</text:p>
      <text:p text:style-name="P40">call con roblup</text:p>
      <text:p text:style-name="P40"/>
      <text:p text:style-name="P35"><text:soft-page-break/></text:p>
      <text:p text:style-name="P35"/>
      <text:p text:style-name="P41">usando text on entramos a eso y e<text:span text:style-name="T80">n</text:span> la parte de <text:span text:style-name="T29">f</text:span>ormu<text:span text:style-name="T80">l</text:span>as <text:s/><text:span text:style-name="T29">buscar array y lu</text:span><text:span text:style-name="T80">e</text:span><text:span text:style-name="T29">go</text:span></text:p>
      <text:p text:style-name="P42">bootup <text:span text:style-name="T30">esta </text:span><text:span text:style-name="T80">su</text:span><text:span text:style-name="T30">ma nuestra matriz y ice que clave valor neces</text:span><text:span text:style-name="T32">i</text:span><text:span text:style-name="T30">ta </text:span><text:span text:style-name="T31">desde la matriz osea el arreglo la column</text:span><text:span text:style-name="T32">a</text:span><text:span text:style-name="T31"> que n</text:span><text:span text:style-name="T32">e</text:span><text:span text:style-name="T31">cesita, </text:span><text:span text:style-name="T80">t</text:span><text:span text:style-name="T32">ambié</text:span><text:span text:style-name="T80">n</text:span><text:span text:style-name="T32"> puede envolver sen una formula sum</text:span><text:span text:style-name="T80">a</text:span><text:span text:style-name="T32"> y redondear lo al res</text:span><text:span text:style-name="T80">u</text:span><text:span text:style-name="T32">ltado que se necesites as como round que toma un valor y o redondea hacia arriba y c</text:span><text:span text:style-name="T81">o</text:span><text:span text:style-name="T32">ncatenadole lo que se necesita dec</text:span><text:span text:style-name="T80">i</text:span><text:span text:style-name="T32">r</text:span></text:p>
      <text:p text:style-name="P42"/>
      <text:p text:style-name="P43">para apuntar la barra de progreso a<text:span text:style-name="T81">l</text:span> valor que necesitemos crear una va<text:span text:style-name="T81">ri</text:span>ab<text:span text:style-name="T81">l</text:span>e vcpm el va<text:span text:style-name="T81">lore</text:span>s predeterminado, puedes ver ls variables de su <text:span text:style-name="T81">pr</text:span>oyecto </text:p>
      <text:p text:style-name="P43">se busca en formulas la variable creada concadenada <text:s/>junto co<text:span text:style-name="T81">n</text:span> una barra invertida y después de <text:span text:style-name="T81">l</text:span>a var<text:span text:style-name="T81">i</text:span>ab<text:span text:style-name="T81">l</text:span>e o que queremos que salga ahora <text:span text:style-name="T81">pa</text:span>ra vincularlo a la barra de progreso es añadir la f<text:span text:style-name="T81">o</text:span>rmula creada con anterioridad add formula se unde add formula y se añade según corresponda a{adims <text:span text:style-name="T81">l</text:span>a formula creada al <text:s/>progres<text:span text:style-name="T81">s</text:span> bar y la dividimos con la variable <text:span text:style-name="T33">*100 para cambar el numero se va ah a editar en text en se agrega la formu</text:span><text:span text:style-name="T81">l</text:span><text:span text:style-name="T33">a obvio se </text:span><text:span text:style-name="T81">u</text:span><text:span text:style-name="T33">nde al valor a cambiar y de nuev</text:span><text:span text:style-name="T81">o</text:span><text:span text:style-name="T33"> se hace la operación de a</text:span><text:span text:style-name="T81">n</text:span><text:span text:style-name="T33">tes <text:s/>para el color usamos progress color bar editamos formula <text:s/>primero creamos la formula de porcentaje valor uno() /valor dos *100 lu</text:span><text:span text:style-name="T81">e</text:span><text:span text:style-name="T33">go usa</text:span><text:span text:style-name="T81">m</text:span><text:span text:style-name="T33">os un if en <text:s/>la formula de porcentaje añadido al estilo de pr</text:span><text:span text:style-name="T81">o</text:span><text:span text:style-name="T33">gress bar d</text:span><text:span text:style-name="T81">o</text:span><text:span text:style-name="T33">nde nos indique </text:span><text:span text:style-name="T81">q</text:span><text:span text:style-name="T33">ue &gt;100 “rojo”, “azul” si no llega al 100%</text:span></text:p>
      <text:p text:style-name="P42"/>
      <text:p text:style-name="P44">data para contacto </text:p>
      <text:p text:style-name="P44"/>
      <text:p text:style-name="P44">1. se crea una nueva pagina</text:p>
      <text:p text:style-name="P44">2. <text:span text:style-name="T34">se a</text:span><text:span text:style-name="T81">ñ</text:span><text:span text:style-name="T34">ade los elem</text:span><text:span text:style-name="T81">e</text:span><text:span text:style-name="T34">n</text:span><text:span text:style-name="T81">t</text:span><text:span text:style-name="T34">os a reutilizar</text:span></text:p>
      <text:p text:style-name="P45">3. se añade formulario.</text:p>
      <text:p text:style-name="P45">4. modificar f<text:span text:style-name="T35">o</text:span>rmulario según conv<text:span text:style-name="T35">e</text:span>niencia</text:p>
      <text:p text:style-name="P46">5. e<text:span text:style-name="T81">n</text:span> categór<text:span text:style-name="T37">i</text:span>ca colocamos <text:span text:style-name="T36">las q</text:span><text:span text:style-name="T37">u </text:span><text:span text:style-name="T36">e vamos a usar como q</text:span><text:span text:style-name="T37">u</text:span><text:span text:style-name="T36">eja reclam</text:span><text:span text:style-name="T37">o</text:span><text:span text:style-name="T36"> etc.</text:span></text:p>
      <text:p text:style-name="P47">6. edita lo q<text:span text:style-name="T81">u</text:span>e necesites editar</text:p>
      <text:p text:style-name="P48">7. asegurarse de hacer e flujo de trabajo de forma correcta por que si no no se podrán validar los datos</text:p>
      <text:p text:style-name="P49">8. creamos un flujo de trabajo esto desde el contenedor principal</text:p>
      <text:p text:style-name="P49">9. el contenedor de trabajo en est<text:span text:style-name="T81">e</text:span> agrega una nueva función solicit<text:span text:style-name="T81">o </text:span>a una api,luego escogeremos el método y la url indica</text:p>
      <text:p text:style-name="P49"><text:soft-page-break/>10 pasamos los parámetros de a api a parsec información debemos asignar los valores a las llaves </text:p>
      <text:p text:style-name="P49">11. también la <text:span text:style-name="T81">pu</text:span>edes hacer directamente <text:s/>a la api de xano o la cual tu trabajes</text:p>
      <text:p text:style-name="P50">12. parara conectar una sección de a página web a otra pagina vamos a la sección a conectar, undimos en workflow buscamos <text:span text:style-name="T81">l</text:span>a funcion change page liego cambiamos el nombre de este workflow,<text:span text:style-name="T38"> </text:span>le undimos en page y ya nos <text:s/>muestra la pagina web de nuestra preferencia según nuestra configuración.</text:p>
      <text:p text:style-name="P51">13. se agrega un <text:span text:style-name="T81">flecha</text:span> al cursor.</text:p>
      <text:p text:style-name="P51">14. se pueden hacer según <text:s/>los plug<text:span text:style-name="T81">i</text:span>ns instalados.</text:p>
      <text:p text:style-name="P51">15. y también <text:s/>el lenguaje nativo de estos mimos.</text:p>
      <text:p text:style-name="P51">16. ver las opciones de weweb e<text:span text:style-name="T81">n</text:span> la api y revisar documentación especifica añadir user au<text:span text:style-name="T81">t</text:span>h y <text:span text:style-name="T81">p</text:span>a<text:span text:style-name="T81">g</text:span>e content esto lo puedes hacer co<text:span text:style-name="T81">n</text:span> diferentes plugins como la autentificación por token <text:span text:style-name="T81">o</text:span>sea llave de autentificación</text:p>
      <text:p text:style-name="P51">con weweb auth </text:p>
      <text:p text:style-name="P51">s<text:span text:style-name="T81">e</text:span> agrega el Plugin <text:s/>luego en define url creamos una pagina web nueva llamada login</text:p>
      <text:p text:style-name="P51">se pude revisar manage user ma<text:span text:style-name="T81">n</text:span>age role</text:p>
      <text:p text:style-name="P51"><text:s/>y paginas de acces<text:span text:style-name="T81">o</text:span> pr<text:span text:style-name="T81">i</text:span>vado.</text:p>
      <text:p text:style-name="P51"/>
      <text:p text:style-name="P52">se añade usuario y se crea contraseña se envía a correo registrado</text:p>
      <text:p text:style-name="P52"><text:s/>puedes importar o exportar u<text:span text:style-name="T81">s</text:span>uarios en cv</text:p>
      <text:p text:style-name="P52"/>
      <text:p text:style-name="P52">si queremos que los usuarios se regosten crea<text:span text:style-name="T81">m</text:span>os la pagina de reg<text:span text:style-name="T81">i</text:span>stro</text:p>
      <text:p text:style-name="P52">creamos un form y lo <text:span text:style-name="T39">org</text:span>a<text:span text:style-name="T39">niza</text:span>mos según nuestra necesidad.</text:p>
      <text:p text:style-name="P52">Al usar signup weweb obvio accediendo por <text:s/>workflow.</text:p>
      <text:p text:style-name="P52">Si estamos usando la opción registrarse <text:s/>y con esa vinculamos los campos de entrada de los formulario que tenemos en la pagina <text:s/><text:span text:style-name="T39">decimos que cada uno de los campos esta como variable de este mismo campo, esto esta configurado para asegurarse que el correo no exista.</text:span></text:p>
      <text:p text:style-name="P52"/>
      <text:p text:style-name="P53">Se redirige una a la pagina de login <text:s/>ademas esto se busca en weweb auth este login tiene verificación de que el usuario existe, y <text:s/>ui del usuario <text:span text:style-name="T81">u</text:span>na vez inic<text:span text:style-name="T81">i</text:span>ad<text:span text:style-name="T81">o</text:span> se re<text:span text:style-name="T81">d</text:span>igira al us<text:span text:style-name="T81">u</text:span>ario a la pagina web de nuestra elección </text:p>
      <text:p text:style-name="P53">con esto creamos paginas web de autentificación con los usuarios <text:s/>y flujo de trabajo para ellos según <text:span text:style-name="T40">l</text:span>a neces<text:span text:style-name="T40">i</text:span>dad a la pagina web ac<text:span text:style-name="T81">c</text:span>e<text:span text:style-name="T81">s</text:span>ada <text:soft-page-break/>anteriorment<text:span text:style-name="T40">e</text:span> deb<text:span text:style-name="T40">em</text:span>os restringir el <text:span text:style-name="T40">a</text:span>cceso a esta. <text:span text:style-name="T40">En <text:s/>otr</text:span><text:span text:style-name="T82">a</text:span><text:span text:style-name="T40">s lecciones se mostrara como configurar el flujo de contraseña olvidada</text:span></text:p>
      <text:p text:style-name="P52"/>
      <text:p text:style-name="P54">manejo de errores en sig<text:span text:style-name="T82">n</text:span>-up y si<text:span text:style-name="T82">gn</text:span>-in</text:p>
      <text:p text:style-name="P54">si necesitamos un error que interrumpa el workflow, por lo cual vamos a este y observamos el <text:s/>flujo de trabajo cuando este se interrumpe en este caso en sign-up o sign-in se mostrara <text:s/>e el flujo del error de repetido si existe un usuario repetido</text:p>
      <text:p text:style-name="P51"/>
      <text:p text:style-name="P54">por lo cual insertamos un elemento texto y para que no se nos muestre de forma predeterminada se hace lo siguiente</text:p>
      <text:p text:style-name="P54">1. c<text:span text:style-name="T82">r</text:span>eamos una <text:span text:style-name="T82">v</text:span>ariable <text:s/>llamada d<text:span text:style-name="T82">i</text:span>s<text:span text:style-name="T82">p</text:span>lay error</text:p>
      <text:p text:style-name="P54">2. <text:span text:style-name="T82">d</text:span>efinimos booleano y por defecto mostramos falso guardamos</text:p>
      <text:p text:style-name="P54">3. vinculamos display a display error</text:p>
      <text:p text:style-name="P54">4. esta se mostrara no en defecto al usar false</text:p>
      <text:p text:style-name="P54">5. vamos al workflow <text:s/>y la pestaña error</text:p>
      <text:p text:style-name="P54">6. añadimos la acción de <text:span text:style-name="T82">ch</text:span>an<text:span text:style-name="T82">g</text:span>e value variable de display error y la agregamos q<text:span text:style-name="T82">u</text:span>e cambie por true</text:p>
      <text:p text:style-name="P54">7. <text:span text:style-name="T41">agregamos otra variable change value y cambios por upload error message.</text:span></text:p>
      <text:p text:style-name="P55">8. configuramos el mensaje de error</text:p>
      <text:p text:style-name="P55">9.en value agregamos formula y <text:s/>buscamos el mensaje que se mostrara y lo agregamos en la formula</text:p>
      <text:p text:style-name="P55">10. si no se activa dará un <text:s/>error de vació y eso confundirá al usuario</text:p>
      <text:p text:style-name="P54"><text:span text:style-name="T41">11. vincular el mensaje dentro de la variable en la </text:span><text:span text:style-name="T82">p</text:span><text:span text:style-name="T41">estaña de variables esto se hace seleccionado el error </text:span><text:span text:style-name="T42">y <text:s/>mostrándolo en </text:span><text:span text:style-name="T82">l</text:span><text:span text:style-name="T42">a barra de formulas, ant</text:span><text:span text:style-name="T82">e</text:span><text:span text:style-name="T42">s debes de escoger el texto de error.</text:span></text:p>
      <text:p text:style-name="P54"/>
      <text:p text:style-name="P56">Flujo de olv<text:span text:style-name="T82">i</text:span>de contraseña</text:p>
      <text:p text:style-name="P56"/>
      <text:p text:style-name="P56">puedes usar el elemento auth forget password arrastrándolo y soltándolo en el espacio que necesites esa en </text:p>
      <text:p text:style-name="P54"/>
      <text:p text:style-name="P56">1. crear nueva pagina para el usuario que olvido contraseña</text:p>
      <text:p text:style-name="P56">2. vincular en login forget password <text:s/>a un página y seleccionar la pagina de olvido contraseña</text:p>
      <text:p text:style-name="P56"/>
      <text:p text:style-name="P56">3. agregamos a forget pass<text:span text:style-name="T82">w</text:span>ord el formulario de resert pas<text:span text:style-name="T82">s</text:span>word</text:p>
      <text:p text:style-name="P56"><text:soft-page-break/>4.en este flujo de trabajo <text:s/><text:span text:style-name="T43">se enviara al correo ingresado <text:s/>reg</text:span><text:span text:style-name="T44">i</text:span><text:span text:style-name="T43">strado un en</text:span><text:span text:style-name="T82">la</text:span><text:span text:style-name="T43">ce para restablecer la contraseña en el flujo de trabajo forget password se mostrara una vez se haya mandado el mensaje al correo registrado a través de un código de verificación este mostrara el formulario para cambiar contraseña si se te olvida en el fuljo de trabajo se usa la opción confirm password y esta vinculado a </text:span><text:span text:style-name="T44">la variable de entrada de ahí, si lo pruebo obtendré una nueva contraseña puedes escoger <text:s/>un mensaje de restablecimiento de contraseña exitoso</text:span></text:p>
      <text:p text:style-name="P56"><text:s/><text:span text:style-name="T44">y un boto para ir a inicio </text:span><text:span text:style-name="T45">de sesión</text:span><text:span text:style-name="T44"> o la otra es <text:s/>change <text:s/>page a login page</text:span></text:p>
      <text:p text:style-name="P56"/>
      <text:p text:style-name="P57">para configurar el proyecto antes de subirlo sigue estos consejos</text:p>
      <text:p text:style-name="P57">1. estar satisfecho con tu pagina de home.</text:p>
      <text:p text:style-name="P57"/>
      <text:p text:style-name="P57">2. en caso de que lo necesite usar show data.</text:p>
      <text:p text:style-name="P57"/>
      <text:p text:style-name="P57">3. elegiremos mostrar data o cualquiera sea la de inicio.</text:p>
      <text:p text:style-name="P57"><text:s/></text:p>
      <text:p text:style-name="P57">4. editamos la meta data de nuestra pagina según lo que necesitemos incluidos las imágenes, también aplica esto ciando compartamos esto a las redes sociales.</text:p>
      <text:p text:style-name="P57"/>
      <text:p text:style-name="P57">5. debemos asegurar que las paginas que queremos proteger lo estén vamos a la pagina a proteger en configuración y configuramos private access para restringir el acceso a esta pagina en especifico.</text:p>
      <text:p text:style-name="P57"/>
      <text:p text:style-name="P58">6. si el proyecto posee re direcciones <text:s/>configuran re direcciones <text:s/>y se agregan las re direcciones que se necesiten.</text:p>
      <text:p text:style-name="P58">Un ejemplo product/funciona se mueve a la pagina data en weweb</text:p>
      <text:p text:style-name="P58"/>
      <text:p text:style-name="P58">esto creara un dominio que se creara cuando agreguemos un dominio personalizado.</text:p>
      <text:p text:style-name="P58"/>
      <text:p text:style-name="P58">La url creada redirigir a la pagina data.</text:p>
      <text:p text:style-name="P58"/>
      <text:p text:style-name="P58">Añadir un dominio propio con una re dirección </text:p>
      <text:p text:style-name="P58"/>
      <text:p text:style-name="P58">weweb admite dominios raíz debe elegirse un subdominio como www.app.academy</text:p>
      <text:p text:style-name="P57"><text:s/></text:p>
      <text:p text:style-name="P58"><text:soft-page-break/>puedes tener un dominio <text:s text:c="2"/>como previw domain pero si lo quieres cambiar</text:p>
      <text:p text:style-name="P57"><text:s/><text:span text:style-name="T46">debes de hacer lo siguiente aun si lo tiene oh no creado con anterioridad</text:span></text:p>
      <text:p text:style-name="P58">ve a espacio de trabajo</text:p>
      <text:p text:style-name="P57"><text:s/><text:span text:style-name="T46">o custom domains configuración luego a dom</text:span><text:span text:style-name="T82">a</text:span><text:span text:style-name="T46">in y ag</text:span><text:span text:style-name="T47">r</text:span><text:span text:style-name="T46">egarlo obvio co</text:span><text:span text:style-name="T47">n</text:span><text:span text:style-name="T46"> el subdomi</text:span><text:span text:style-name="T47">n</text:span><text:span text:style-name="T46">io ya que es obligatorio</text:span></text:p>
      <text:p text:style-name="P59">esta ultima parte debes de tener dinero</text:p>
      <text:p text:style-name="P59"/>
      <text:p text:style-name="P59">se debe configurar el name</text:p>
      <text:p text:style-name="P59">entre otras cosas pero se necesita hacer pagos</text:p>
      <text:p text:style-name="P59"/>
      <text:p text:style-name="P57"/>
      <text:p text:style-name="P56"/>
      <text:p text:style-name="P60">nivel 1 terminado </text:p>
      <text:p text:style-name="P60"/>
      <text:p text:style-name="P60">nivel 2</text:p>
      <text:p text:style-name="P61">aplicación weweb que se escala j<text:span text:style-name="T82">u</text:span>nto al frontend y backend</text:p>
      <text:p text:style-name="P61">osea crear una aplicación segura que se escalaría con backend y frontend</text:p>
      <text:p text:style-name="P62">de su elección</text:p>
      <text:p text:style-name="P63">diseño pages(frontend<text:span text:style-name="T48">) una pagina donde podrá crear tickets</text:span></text:p>
      <text:p text:style-name="P63"><text:s/><text:span text:style-name="T49">asi como intercambiar rol eh información de los usuarios</text:span></text:p>
      <text:p text:style-name="P63"/>
      <text:p text:style-name="P63"/>
      <text:p text:style-name="P64">se deben analizar las <text:span text:style-name="T82">pag</text:span>inas necesarias</text:p>
      <text:p text:style-name="P64"/>
      <text:p text:style-name="P65">tambié<text:span text:style-name="T82">n</text:span> se cr<text:span text:style-name="T82">e</text:span>a u<text:span text:style-name="T82">n</text:span> ma<text:span text:style-name="T82">n</text:span>ual del curso para ayudarte a retener información importante</text:p>
      <text:p text:style-name="P66">es una aplicación frontend de tíquetes</text:p>
      <text:p text:style-name="P66"><text:s text:c="2"/></text:p>
      <text:p text:style-name="P67">ano fragmentos y puntos finales</text:p>
      <text:p text:style-name="P67"/>
      <text:p text:style-name="P67">se creara nuestra propia versión</text:p>
      <text:p text:style-name="P68">se mir en figma tenemos una lista de diseño, colores topografías que s usara en a aplicación así como pantallas</text:p>
      <text:p text:style-name="P68">el diseño de figma al ser usado bien nos ayuda a estructurar nuestra base de dato</text:p>
      <text:p text:style-name="P68">ademas figma nos ayuda a ver que paginas va<text:span text:style-name="T83">m</text:span>os a usar en el frontend</text:p>
      <text:p text:style-name="P68"/>
      <text:p text:style-name="P68">se comienza por enumer<text:span text:style-name="T83">ación</text:span> las p<text:span text:style-name="T83">a</text:span>ginas </text:p>
      <text:p text:style-name="P68">se crea el ticket</text:p>
      <text:p text:style-name="P68"><text:soft-page-break/>user tickets</text:p>
      <text:p text:style-name="P68">pag<text:span text:style-name="T83">e</text:span> new t<text:span text:style-name="T52">ick</text:span>et </text:p>
      <text:p text:style-name="P68">all tickets</text:p>
      <text:p text:style-name="P69">administradores</text:p>
      <text:p text:style-name="P68">permisos</text:p>
      <text:p text:style-name="P68"/>
      <text:p text:style-name="P69">se dio el acceso al las paginas web que necesitaban ser pr<text:span text:style-name="T83">i</text:span>vadas y las que no sea se decidió cuales se<text:span text:style-name="T83">r</text:span>án privadas y cuales no</text:p>
      <text:p text:style-name="P69"/>
      <text:p text:style-name="P70">tambié<text:span text:style-name="T83">n</text:span> podremos mirar que <text:span text:style-name="T83">in</text:span>formació<text:span text:style-name="T83">n</text:span> necesitamos ejemplo l nombre, edad,skiills, etc</text:p>
      <text:p text:style-name="P120"/>
      <text:p text:style-name="P62"/>
      <text:p text:style-name="P71">definir lo que debe y ni debe mostrarse <text:span text:style-name="T50">osea lo que verán y no <text:s text:c="2"/>usuarios</text:span></text:p>
      <text:p text:style-name="P71"/>
      <text:p text:style-name="P72">para crear un t<text:span text:style-name="T53">i</text:span>cket se necesita nombre y email </text:p>
      <text:p text:style-name="P73">si se genera la esca labilidad es crear diferentes tablas con la información</text:p>
      <text:p text:style-name="P61"/>
      <text:p text:style-name="P73">se usa el get,put,post, delete </text:p>
      <text:p text:style-name="P77">al crear diferentes tablas <text:s/>esto se volvería un<text:span text:style-name="T53">a</text:span> b<text:span text:style-name="T53">ue</text:span>na pract<text:span text:style-name="T53">i</text:span>ca puest<text:span text:style-name="T53">o</text:span> <text:s/><text:span text:style-name="T53">q</text:span>ue <text:span text:style-name="T53">nos permitirá organizar la i</text:span><text:span text:style-name="T83">n</text:span><text:span text:style-name="T53">formación correctamente c</text:span><text:span text:style-name="T83">u</text:span><text:span text:style-name="T53">a</text:span><text:span text:style-name="T83">n</text:span><text:span text:style-name="T53">do se tate de temas separados </text:span><text:span text:style-name="T54">y vincular usando campos de referencia para vin</text:span><text:span text:style-name="T55">cular</text:span><text:span text:style-name="T54"> varias tablas, </text:span><text:span text:style-name="T83">ej</text:span><text:span text:style-name="T55">emplo user coments para saber a que usuario perte</text:span><text:span text:style-name="T83">n</text:span><text:span text:style-name="T55">ece ese comentario </text:span></text:p>
      <text:p text:style-name="P79">solo el propietario de <text:span text:style-name="T83">l</text:span>a <text:s/>información y un administrador podrá actualizarla</text:p>
      <text:p text:style-name="P79"/>
      <text:p text:style-name="P78">una vez sabiendo lo que se necesita el frontend y el backe<text:span text:style-name="T83">n</text:span>d</text:p>
      <text:p text:style-name="P77"/>
      <text:p text:style-name="P73">para insertar lo necesario</text:p>
      <text:p text:style-name="P73"/>
      <text:p text:style-name="P73">en el filtro agregar la categoría p<text:span text:style-name="T83">o</text:span>r si los administradores qu<text:span text:style-name="T83">i</text:span>eren filtrar por categorías</text:p>
      <text:p text:style-name="P73"/>
      <text:p text:style-name="P73">se debe asegurar de no dejar que usuarios no administradores eliminen la información</text:p>
      <text:p text:style-name="P75">las funciones de xano se realizaran en otro momento</text:p>
      <text:p text:style-name="P74">se debe de pensa<text:span text:style-name="T83">r</text:span> <text:span text:style-name="T83">ta</text:span>mbién lo que necesita su aplicación </text:p>
      <text:p text:style-name="P75">en esta otra <text:span text:style-name="T83">a</text:span>cción se integrara el paquete </text:p>
      <text:p text:style-name="P80"><text:soft-page-break/>se crea un solo punto para hacer un endpoint se<text:span text:style-name="T56">r</text:span>ia complicarnos mas la vida</text:p>
      <text:p text:style-name="P75"/>
      <text:p text:style-name="P75">analiza el tipo de encabezado según <text:s/>la necesidad de tu c<text:span text:style-name="T56">l</text:span>iente</text:p>
      <text:p text:style-name="P75"/>
      <text:p text:style-name="P75">se crea la tipografía partir de</text:p>
      <text:p text:style-name="P75">create new t<text:span text:style-name="T83">o</text:span>pog<text:span text:style-name="T83">r</text:span>aphy</text:p>
      <text:p text:style-name="P75">se debe analizar cada paso de la topografía presentada en figma</text:p>
      <text:p text:style-name="P75">luego le damas n no<text:span text:style-name="T83">mb</text:span>re al arc<text:span text:style-name="T83">h</text:span>ivo y una carpeta donde u<text:span text:style-name="T83">s</text:span>arlo ed<text:span text:style-name="T83">i</text:span>tamos según ses necesario</text:p>
      <text:p text:style-name="P75">dedicar tiempo a tu proyecto ahora para no dejar nada sin respuesta en el futuro en co<text:span text:style-name="T51">nfiguración</text:span> <text:s/><text:span text:style-name="T51">para el</text:span> color y agregamos el color indicado</text:p>
      <text:p text:style-name="P76">en el color theme creation puedes trabajar en el esquema de c<text:span text:style-name="T58">o</text:span>lores según sea el caso</text:p>
      <text:p text:style-name="P76"><text:s/>a tr<text:span text:style-name="T51">a</text:span>vés de estos podr<text:span text:style-name="T51">á</text:span>s editar <text:span text:style-name="T51">s</text:span>egún sea conveniente</text:p>
      <text:p text:style-name="P81">la entrada de los comentarios deben ser estos</text:p>
      <text:p text:style-name="P81"><text:s/>los a<text:span text:style-name="T57">d</text:span>ministradores puedes cambiar correo nombre y rol del us<text:span text:style-name="T83">u</text:span>ario</text:p>
      <text:p text:style-name="P84">y al pensar e<text:span text:style-name="T83">n</text:span> <text:s/>como debe ser el diseños y funciones de su pagina web o aplicación en su interfaz de usuario y usando como ayuda un diseño gráfico obvio sin interacciones reales puedes ver que necesita tu pagina web o cualquier otra aplicaciones, en el backend y frontend que llamados necesita hacer, como proteger los datos importantes, como filtrar los datos para rendimiento, esas preguntas e comienzan para planificar su proyecto y todo lo que se necesito esto se debe hacer antes de codificar oh no codificar con distintas herramientas.</text:p>
      <text:p text:style-name="P82"/>
      <text:p text:style-name="P83">si piensas con anterioridad</text:p>
      <text:p text:style-name="P82">se efectuó practica</text:p>
      <text:p text:style-name="P82"/>
      <text:p text:style-name="P85">para rehusar elementos css</text:p>
      <text:p text:style-name="P85">crea un subclase con el css a usar</text:p>
      <text:p text:style-name="P85"/>
      <text:p text:style-name="P42"><text:s/></text:p>
      <text:p text:style-name="P42"/>
      <text:p text:style-name="P35"/>
      <text:p text:style-name="P32"/>
      <text:p text:style-name="P86">las <text:span text:style-name="T83">pag</text:span>inas necesarias son:</text:p>
      <text:p text:style-name="P86">logn</text:p>
      <text:p text:style-name="P86">my tickets </text:p>
      <text:p text:style-name="P86"><text:soft-page-break/>ticket (edición(id))</text:p>
      <text:p text:style-name="P86">create ticket</text:p>
      <text:p text:style-name="P87">all tickets</text:p>
      <text:p text:style-name="P87">permissions</text:p>
      <text:p text:style-name="P87"/>
      <text:p text:style-name="P88">para borrar comenta<text:span text:style-name="T83">ri</text:span>os el admin necesita el id de comentarios</text:p>
      <text:p text:style-name="P88">para reutilizar <text:span text:style-name="T83">u</text:span>n elemento o section se unde en crear nueva clase obvio tienes q<text:span text:style-name="T83">u</text:span>e editar los otros primeros</text:p>
      <text:p text:style-name="P89">se edita según necesites</text:p>
      <text:p text:style-name="P89"/>
      <text:p text:style-name="P89">se realizo practica para d<text:span text:style-name="T83">i</text:span>señ<text:span text:style-name="T83">a</text:span>r de elemento en una función y el usuario pueda oh <text:s/>haya interactuado con el</text:p>
      <text:p text:style-name="P87"/>
      <text:p text:style-name="P89">en inspeccionar un elemento verifica <text:s/>en inspeccionar y vera las propiedades de ese elemento e<text:span text:style-name="T83">n</text:span> figma</text:p>
      <text:p text:style-name="P89"/>
      <text:p text:style-name="P89"/>
      <text:p text:style-name="P90">pro ux </text:p>
      <text:p text:style-name="P90">se pude hacer un select y editas según tu necesidades</text:p>
      <text:p text:style-name="P91">para restablecer los valores de fabrica p<text:span text:style-name="T83">o</text:span>r asi dec<text:span text:style-name="T83">i</text:span>rlo simplemente definelo como una acción para res<text:span text:style-name="T83">t</text:span>ab<text:span text:style-name="T83">lec</text:span>er los otros valores con el q<text:span text:style-name="T84">u</text:span>e el usuario no interactuó con esto se res<text:span text:style-name="T84">t</text:span>ab<text:span text:style-name="T84">l</text:span>ecerá el valor de las otras casillas cuando las seleccionemos mientras no se seleccione otro valor</text:p>
      <text:p text:style-name="P91"/>
      <text:p text:style-name="P92">la primera parte e advanced statemts se hace solo con xano <text:s/><text:span text:style-name="T59">y una condicional switch para ver </text:span><text:span text:style-name="T60">q</text:span><text:span text:style-name="T59">ue los valores coinciden</text:span></text:p>
      <text:p text:style-name="P93">de la colección</text:p>
      <text:p text:style-name="P31"><text:s/></text:p>
      <text:p text:style-name="P94">mirar bien q<text:span text:style-name="T84">u</text:span>e ponemos en la colección a la hora de crear la lista</text:p>
      <text:p text:style-name="P94"/>
      <text:p text:style-name="P94">para poder extraer los datos correctamente ejemplo si no aparecen los dat<text:span text:style-name="T84">o</text:span>s del ti</text:p>
      <text:p text:style-name="P94">se debe repetir cuantas veces grupos hatacket en media debemos <text:span text:style-name="T84">e</text:span>ncontrarlos en otra zona</text:p>
      <text:p text:style-name="P94">se debe tener el navegador en zonas diferentes</text:p>
      <text:p text:style-name="P94">también crear los d<text:span text:style-name="T84">i</text:span>ferent<text:span text:style-name="T84">e</text:span>s filtros ara una búsqueda mas precisa</text:p>
      <text:p text:style-name="P95">para obtener comentarios debemos usar e et con el id del ticket</text:p>
      <text:p text:style-name="P95"/>
      <text:p text:style-name="P95">entrar esta información del componente 9 para ser usada en esa patina</text:p>
      <text:p text:style-name="P95"><text:soft-page-break/>usamos <text:span text:style-name="T85">l</text:span>a url pat<text:span text:style-name="T85">h</text:span>s para hacer dinámic<text:span text:style-name="T85">a</text:span> la var<text:span text:style-name="T85">i</text:span>ab<text:span text:style-name="T85">l</text:span>e</text:p>
      <text:p text:style-name="P95">para que busqu<text:span text:style-name="T85">e</text:span> el mismo la información</text:p>
      <text:p text:style-name="P95">mediante css o precondición que nos dice q<text:span text:style-name="T78">u</text:span> a<text:span text:style-name="T78">hí</text:span> u<text:span text:style-name="T78">n</text:span> elem<text:span text:style-name="T78">e</text:span>n<text:span text:style-name="T78">t</text:span>o <text:span text:style-name="T85">random</text:span> fue sel<text:span text:style-name="T78">e</text:span>ccionado renderizce parte de ese elemento si no no</text:p>
      <text:p text:style-name="P95">esto se hace para que el navegador renderizce objetos <text:s/>según ciertos condiciones</text:p>
      <text:p text:style-name="P95"/>
      <text:p text:style-name="P96"><text:span text:style-name="T78">b</text:span>ackend fi<text:span text:style-name="T85">l</text:span>ters</text:p>
      <text:p text:style-name="P96">esto es <text:span text:style-name="T85">p</text:span>ara la seguridad y esca labilidad esto funciona para no mostrar información <text:s/>importante en el frontend osea importante y confidencial </text:p>
      <text:p text:style-name="P98">osea filtrar dese el backend a <text:span text:style-name="T85">p</text:span>ar<text:span text:style-name="T85">t</text:span>ir de datos <text:span text:style-name="T85">enco</text:span>n<text:span text:style-name="T85">tr</text:span>ados en el frontend <text:s/>por el usuario</text:p>
      <text:p text:style-name="P98"/>
      <text:p text:style-name="P98">se miran en todos los filtr<text:span text:style-name="T78">o</text:span>s creados y se <text:s/>revisan con el frontend para entender lo q<text:span text:style-name="T78">u</text:span>e se debe hacer</text:p>
      <text:p text:style-name="P98"/>
      <text:p text:style-name="P98">ejemplo text q<text:span text:style-name="T78">ue</text:span> en el backend <text:s/>dev<text:span text:style-name="T78">u</text:span>elve una lista con los valores datos</text:p>
      <text:p text:style-name="P98">y depende de como este el backend de xano</text:p>
      <text:p text:style-name="P98">ejemplo para obtener l<text:span text:style-name="T78">o</text:span>s t<text:span text:style-name="T78">ickets</text:span> nuevos de bac<text:span text:style-name="T78">k</text:span>end debes hacer un cost<text:span text:style-name="T78">u</text:span>me query y que los términ<text:span text:style-name="T78">o</text:span>s estén relacionados con search</text:p>
      <text:p text:style-name="P99">el <text:span text:style-name="T78">b</text:span>ackend y frontend deben co<text:span text:style-name="T78">m</text:span>unicarse correctamente</text:p>
      <text:p text:style-name="P99">si seleccionas asi sea un elemento estará en la lista</text:p>
      <text:p text:style-name="P99">una llamada de ve ser al valor especifico ejemplo info_ requerid</text:p>
      <text:p text:style-name="P99">que nuestros valore<text:span text:style-name="T85">s</text:span> del backend una vez c<text:span text:style-name="T85">o</text:span>rregido se puede agregar al frontend</text:p>
      <text:p text:style-name="P99">usamos get ou<text:span text:style-name="T85">t</text:span> otro y sa<text:span text:style-name="T85">ca</text:span>mos la url base mas <text:s/>el parámetro a poner </text:p>
      <text:p text:style-name="P98"><text:s text:c="2"/><text:span text:style-name="T61">obvio debes agregar un encabezado de au</text:span><text:span text:style-name="T85">t</text:span><text:span text:style-name="T61">e</text:span><text:span text:style-name="T85">n</text:span><text:span text:style-name="T61">ticación y a</text:span><text:span text:style-name="T85">gre</text:span><text:span text:style-name="T61">gamos los </text:span><text:span text:style-name="T85">f</text:span><text:span text:style-name="T61">iltr</text:span><text:span text:style-name="T85">o</text:span><text:span text:style-name="T61">s de búsqueda en el frontend</text:span></text:p>
      <text:p text:style-name="P99">asi no obtenemos todos los artículo<text:span text:style-name="T85">s</text:span> es buena señal ya que nos llega <text:span text:style-name="T85">l</text:span>a información endpo<text:span text:style-name="T85">i</text:span>nt se inserta desde addcollections. se debe c<text:span text:style-name="T85">al</text:span>cular <text:span text:style-name="T85">l</text:span>a colección correctamente <text:span text:style-name="T62">ejemplo se cambia ad</text:span><text:span text:style-name="T85">m</text:span><text:span text:style-name="T62">in t</text:span><text:span text:style-name="T85">i</text:span><text:span text:style-name="T62">ckets una vez se crea la colecciona</text:span></text:p>
      <text:p text:style-name="P99"/>
      <text:p text:style-name="P100">en los filtros se agrega un <text:span text:style-name="T85">w</text:span>or<text:span text:style-name="T85">kflo</text:span>w para hacer el cambio de la colección como el t<text:span text:style-name="T78">i</text:span>po o estatus</text:p>
      <text:p text:style-name="P100"/>
      <text:p text:style-name="P100">se debe <text:span text:style-name="T85">h</text:span>acer un <text:span text:style-name="T85">if</text:span> de select status value + ll, “”, <text:span text:style-name="T78">s</text:span>elect estatus <text:span text:style-name="T85">v</text:span>alue para que muestre toda la información rela<text:span text:style-name="T78">ciona</text:span>da par dinam<text:span text:style-name="T78">iz</text:span>ar la can<text:span text:style-name="T78">t</text:span>idad <text:span text:style-name="T78">d</text:span>e tickets seg<text:span text:style-name="T78">ú</text:span>n el resultado</text:p>
      <text:p text:style-name="P100"><text:soft-page-break/></text:p>
      <text:p text:style-name="P100"><draw:frame draw:style-name="fr4" draw:name="Imagen1" text:anchor-type="char" svg:width="5in" svg:height="2.8126in" draw:z-index="0"><draw:image xlink:href="Pictures/10000001000001E00000010EB9A0EE47.png" xlink:type="simple" xlink:show="embed" xlink:actuate="onLoad" draw:mime-type="image/png"/></draw:frame></text:p>
      <text:p text:style-name="P100"/>
      <text:p text:style-name="P99"/>
      <text:p text:style-name="P99"/>
      <text:p text:style-name="P97"><text:s/></text:p>
      <text:p text:style-name="P97"/>
      <text:p text:style-name="P97"/>
      <text:p text:style-name="P97"/>
      <text:p text:style-name="P97"/>
      <text:p text:style-name="P97"/>
      <text:p text:style-name="P97"/>
      <text:p text:style-name="P97"/>
      <text:p text:style-name="P97"/>
      <text:p text:style-name="P100">agregamos un loader para mostrar la velocidad de carga debido hacer una ap externa</text:p>
      <text:p text:style-name="P101">agregamos una condición de if colection is fetching</text:p>
      <text:p text:style-name="P101"/>
      <text:p text:style-name="P101">la forma como configures el back<text:span text:style-name="T85">end</text:span> <text:span text:style-name="T77">de</text:span>terminara como llamaras los filtros</text:p>
      <text:p text:style-name="P101">la llamada deberá i<text:span text:style-name="T77">n</text:span>cluir los valore que quieres que sean correos para que el back<text:span text:style-name="T85">end</text:span> pueda <text:span text:style-name="T77">e</text:span>ntender lo que quiere el frontend</text:p>
      <text:p text:style-name="P101"/>
      <text:p text:style-name="P101">para paginar solo a<text:span text:style-name="T77">g</text:span>regas el <text:span text:style-name="T77">p</text:span>aginador y usas a colección <text:s/>que qu<text:span text:style-name="T85">i</text:span>eras paginar en el frontend</text:p>
      <text:p text:style-name="P101">si no se paginea el navegador consumirá muchos rec<text:span text:style-name="T77">u</text:span>rs<text:span text:style-name="T77">o</text:span>s extra a a ho<text:span text:style-name="T77">r</text:span>a de r<text:span text:style-name="T77">e</text:span>nde rizar</text:p>
      <text:p text:style-name="P101">vincular su paginación su colección con toda la meta data</text:p>
      <text:p text:style-name="P101">si se vincula <text:span text:style-name="T77">l</text:span>a data el pagi<text:span text:style-name="T77">n</text:span>ador o hará una correcta ci<text:span text:style-name="T77">r</text:span>culación </text:p>
      <text:p text:style-name="P101"/>
      <text:p text:style-name="P101"><text:span text:style-name="T76">e</text:span>n xa<text:span text:style-name="T77">n</text:span>o si ten<text:span text:style-name="T76">e</text:span>mos var<text:span text:style-name="T77">i</text:span>os ele<text:span text:style-name="T76">me</text:span>ntos <text:span text:style-name="T76">u</text:span>samos paginación con <text:s/>page and next page <text:span text:style-name="T63">pero debes ser muy especifico se</text:span><text:span text:style-name="T76">g</text:span><text:span text:style-name="T63">ún el backend que estés </text:span><text:span text:style-name="T76">u</text:span><text:span text:style-name="T63">sand</text:span><text:span text:style-name="T76">o</text:span></text:p>
      <text:p text:style-name="P101"/>
      <text:p text:style-name="P102">también es im<text:span text:style-name="T76">p</text:span>ortante saber como nos desplazamos</text:p>
      <text:p text:style-name="P102">sei colocamos la <text:span text:style-name="T76">pagi</text:span>na fi<text:span text:style-name="T76">n</text:span>al <text:span text:style-name="T76">n</text:span>os dará elementos el final de la lista </text:p>
      <text:p text:style-name="P102"/>
      <text:p text:style-name="P102">en weweb si colocamos el valor de ua pagina diferente n<text:span text:style-name="T77">o</text:span>s dará el valor de esa <text:s/>caden<text:span text:style-name="T76">a</text:span>s</text:p>
      <text:p text:style-name="P102"/>
      <text:p text:style-name="P102"><text:soft-page-break/>el off<text:span text:style-name="T77">set</text:span> nos permita ver el desplazamiento por la pagina de los 25 elementos mas fácilment<text:span text:style-name="T77">e</text:span> obvio ti<text:span text:style-name="T77">e</text:span>ne la <text:s/>i<text:span text:style-name="T77">n</text:span>for<text:span text:style-name="T77">m</text:span>ación de xano</text:p>
      <text:p text:style-name="P102"/>
      <text:p text:style-name="P102">se crea a variable paginador</text:p>
      <text:p text:style-name="P102"/>
      <text:p text:style-name="P102"/>
      <text:p text:style-name="P103">en default value se crea <text:s/>p<text:span text:style-name="T85">e</text:span></text:p>
      <text:p text:style-name="P103">age uno y offset desde o</text:p>
      <text:p text:style-name="P102">sin preservar nada</text:p>
      <text:p text:style-name="P104">e<text:span text:style-name="T77">l </text:span>backen<text:span text:style-name="T77">d</text:span> <text:s/>necesita la cantidad de elem<text:span text:style-name="T77">e</text:span>nto indicada buscar la in<text:span text:style-name="T77">f</text:span>ormación si no le da buscar mas inform<text:span text:style-name="T77">a</text:span>ción</text:p>
      <text:p text:style-name="P104">íte<text:span text:style-name="T77">m</text:span>s por pagina según lo que necesitemos para dinámico</text:p>
      <text:p text:style-name="P104"/>
      <text:p text:style-name="P104">para desplazamiento usamos esya formula </text:p>
      <text:p text:style-name="P104"><draw:frame draw:style-name="fr3" draw:name="Imagen2" text:anchor-type="char" svg:width="5in" svg:height="2.8126in" draw:z-index="1"><draw:image xlink:href="Pictures/10000001000001E00000010E8705C338.png" xlink:type="simple" xlink:show="embed" xlink:actuate="onLoad" draw:mime-type="image/png"/></draw:frame></text:p>
      <text:p text:style-name="P97"/>
      <text:p text:style-name="P97"/>
      <text:p text:style-name="P97"/>
      <text:p text:style-name="P97"><text:s text:c="3"/></text:p>
      <text:p text:style-name="P97"/>
      <text:p text:style-name="P97"/>
      <text:p text:style-name="P97"/>
      <text:p text:style-name="P97"/>
      <text:p text:style-name="P97"/>
      <text:p text:style-name="P97"/>
      <text:p text:style-name="P97"/>
      <text:p text:style-name="P104">para que comience a contar los indi<text:span text:style-name="T85">c</text:span>es a partir del 25 en la siguiente <text:span text:style-name="T85">p</text:span>agina</text:p>
      <text:p text:style-name="P104"/>
      <text:p text:style-name="P104">en workflow c<text:span text:style-name="T85">ambia</text:span>mos la variable pag<text:span text:style-name="T85">i</text:span>nator en el valor <text:s/>envent chan<text:span text:style-name="T85">g</text:span>e</text:p>
      <text:p text:style-name="P104"/>
      <text:p text:style-name="P104">y u<text:span text:style-name="T85">s</text:span>amos fetch colection pa<text:span text:style-name="T85">r</text:span>a cambiar el valor de nuestro admin ticket <text:s/>paginated</text:p>
      <text:p text:style-name="P104">y se vincula a la colección correctamente</text:p>
      <text:p text:style-name="P104"><text:s/>en el get llamas a la var<text:span text:style-name="T85">iab</text:span>le <text:span text:style-name="T85">p</text:span>agi<text:span text:style-name="T85">n</text:span>ator variable en despla<text:span text:style-name="T85">za</text:span>mient<text:span text:style-name="T85">o</text:span></text:p>
      <text:p text:style-name="P104"/>
      <text:p text:style-name="P104">la paginación en el frontend es suficiente si no tiene grandes datos si no debe trabajar con el backend tamb<text:span text:style-name="T85">ié</text:span>n</text:p>
      <text:p text:style-name="P104"/>
      <text:p text:style-name="P104"><text:soft-page-break/>para devolver la información correcta</text:p>
      <text:p text:style-name="P104"><text:s/><text:span text:style-name="T64">ob</text:span><text:span text:style-name="T85">v</text:span><text:span text:style-name="T64">io cambia dependiendo de el backend usad</text:span><text:span text:style-name="T86">o</text:span></text:p>
      <text:p text:style-name="P104"/>
      <text:p text:style-name="P105">se nec<text:span text:style-name="T65">e</text:span>sitas in un botón cargar mas debes asegurarte que o use demasiados recursos del navegador</text:p>
      <text:p text:style-name="P105"/>
      <text:p text:style-name="P105">usamos s<text:span text:style-name="T86">l</text:span>ice en en el navegador</text:p>
      <text:p text:style-name="P105">y debe de decir que comienza a contar de<text:span text:style-name="T86">s</text:span>de 0 hasta donde lo quiera detener</text:p>
      <text:p text:style-name="P105">se hace referencia a u<text:span text:style-name="T86">n</text:span>a variable a usar ahora llamada load more</text:p>
      <text:p text:style-name="P105">se <text:s/>codifica <text:s/>como objeto y comienza dese 0 a 10</text:p>
      <text:p text:style-name="P105"/>
      <text:p text:style-name="P105">se ag<text:span text:style-name="T65">r </text:span>ega un botón y se cambia <text:s/>el workflow en este se agrega <text:s/>change var<text:span text:style-name="T86">ia</text:span>ble <text:s/>y se co<text:span text:style-name="T65">n</text:span>figura el camino <text:s/>hasta de y se <text:s/>agrega la formula editada ara cambar valor load morend <text:s/>sumándole 1 mas por cada finalización</text:p>
      <text:p text:style-name="P104"/>
      <text:p text:style-name="P104"/>
      <text:p text:style-name="P107"/>
      <text:p text:style-name="P106">se p<text:span text:style-name="T65">u</text:span>ede edit<text:span text:style-name="T65">a</text:span>r para pasar a otro <text:s/>valores</text:p>
      <text:p text:style-name="P106">no se carga si el valor de la carga es <text:span text:style-name="T65">m</text:span>enor <text:s/>al numero puesto inicialmente</text:p>
      <text:p text:style-name="P106"/>
      <text:p text:style-name="P107">mostrar elementos en una cuadricula de datos</text:p>
      <text:p text:style-name="P107"/>
      <text:p text:style-name="P107"/>
      <text:p text:style-name="P107">la cuadricula de dato esta vi<text:span text:style-name="T86">n</text:span>culada a un array</text:p>
      <text:p text:style-name="P107">le decimos a la cuadricula la identificación de cada ele<text:span text:style-name="T86">m</text:span>ento <text:span text:style-name="T86">pr</text:span>opio del arreglo ejemplo id o correo</text:p>
      <text:p text:style-name="P106"/>
      <text:p text:style-name="P107">en el diseño el correo esta antes de rol para moverlo hacia arriba</text:p>
      <text:p text:style-name="P106"/>
      <text:p text:style-name="P107">en esta se puede personalizar por completo</text:p>
      <text:p text:style-name="P107">la cuadricula se creo para un rápida edición en linea </text:p>
      <text:p text:style-name="P107">la cuadricula funciona de manera muy especifica</text:p>
      <text:p text:style-name="P107"/>
      <text:p text:style-name="P107">puedes personalizarla según tus necesidades</text:p>
      <text:p text:style-name="P107"/>
      <text:p text:style-name="P108">agregamos un <text:span text:style-name="T86">w</text:span>orkflow que actualizara los datos de la cuadricula med<text:span text:style-name="T86">i</text:span>a<text:span text:style-name="T86">n</text:span>te post</text:p>
      <text:p text:style-name="P108">usam<text:span text:style-name="T86">o</text:span>s la url base +user + eve value.id</text:p>
      <text:p text:style-name="P107"><text:soft-page-break/></text:p>
      <text:p text:style-name="P108">después paseamos los os fie<text:span text:style-name="T86">l</text:span>ds</text:p>
      <text:p text:style-name="P108">event value. Email o datos <text:s/>actualizar</text:p>
      <text:p text:style-name="P108">para el delete</text:p>
      <text:p text:style-name="P106"/>
      <text:p text:style-name="P108">se <text:span text:style-name="T86">hace</text:span> lo mismo pero se c<text:span text:style-name="T86">a</text:span>mbia el post por este ultimo y luego</text:p>
      <text:p text:style-name="P108"/>
      <text:p text:style-name="P108">en url </text:p>
      <text:p text:style-name="P108">usam<text:span text:style-name="T86">o</text:span>s la url base +user + eve value.id</text:p>
      <text:p text:style-name="P108"/>
      <text:p text:style-name="P108">luego se añade header authorization</text:p>
      <text:p text:style-name="P108">ba<text:span text:style-name="T86">r</text:span>rer + token <text:s/>b<text:span text:style-name="T86">a</text:span>ssed auth acces<text:span text:style-name="T86">s</text:span> token</text:p>
      <text:p text:style-name="P108"/>
      <text:p text:style-name="P108">despu<text:span text:style-name="T67">é</text:span>s de so en el workflow agregamos fetch </text:p>
      <text:p text:style-name="P108">para actualizar la colección usuarios</text:p>
      <text:p text:style-name="P108"/>
      <text:p text:style-name="P108">eliminar varios íte<text:span text:style-name="T66">ms </text:span></text:p>
      <text:p text:style-name="P110">debes de asegurarte que la casilla para seleccionar este disponible</text:p>
      <text:p text:style-name="P110">agregar botón eliminar select user</text:p>
      <text:p text:style-name="P110"/>
      <text:p text:style-name="P110">se copia y pega el de eliminar individualmente y lo colocamos como c<text:span text:style-name="T86">o</text:span>lect<text:span text:style-name="T86">i</text:span>vo antes e la ac<text:span text:style-name="T86">c</text:span>ión se parse mediante formula esto en action también seleccionamos para cambiar el nombre, y seleccionamos e formula lo que quere<text:span text:style-name="T86">m</text:span>os eliminar posiblemente</text:p>
      <text:p text:style-name="P110"/>
      <text:p text:style-name="P109">usam<text:span text:style-name="T86">o</text:span>s la url base +user + ev<text:span text:style-name="T66">action.loop.item.id</text:span></text:p>
      <text:p text:style-name="P110">en action debemos de as<text:span text:style-name="T86">e</text:span>gurar<text:span text:style-name="T86">nos</text:span> de escoger correctamente lo que queremos eliminar</text:p>
      <text:p text:style-name="P110"/>
      <text:p text:style-name="P111">antes de obtener nuestra colección <text:s/>se restablece las filas seleccionadas vuelve a su valor predeterminado</text:p>
      <text:p text:style-name="P111">osea regresa a su estado anterior antes de agregar al usuario </text:p>
      <text:p text:style-name="P111"/>
      <text:p text:style-name="P111">ya puedes editar y <text:span text:style-name="T68">e</text:span>liminar los u<text:span text:style-name="T68">s</text:span>uar<text:span text:style-name="T68">i</text:span>os que quier<text:span text:style-name="T68">e</text:span> ob<text:span text:style-name="T86">v</text:span>io </text:p>
      <text:p text:style-name="P111">esto lo hará su usuario fi<text:span text:style-name="T68">n</text:span>al</text:p>
      <text:p text:style-name="P111"/>
      <text:p text:style-name="P112">cada vez que un usuario navega por interne este manda un motón de información la navegador sobre la pagina web que uses.</text:p>
      <text:p text:style-name="P112"/>
      <text:p text:style-name="P112"><text:soft-page-break/></text:p>
      <text:p text:style-name="P111"><text:tab/></text:p>
      <text:p text:style-name="P111"><text:s/></text:p>
      <text:p text:style-name="P110"/>
      <text:p text:style-name="P112">la seguridad se da cuando un usuario puede acceder y editar la información que solo se le permite observar</text:p>
      <text:p text:style-name="P112">ahí usuarios que pueden comprometer esa pagina web la solución es la autenticación protegiendo el endpoint y que solo los usuario registrado</text:p>
      <text:p text:style-name="P112"/>
      <text:p text:style-name="P112">esto depende el backend qu estés usando como superbase o xano</text:p>
      <text:p text:style-name="P112">se se filtra información <text:s/>no visible a los usua<text:span text:style-name="T86">ri</text:span>os puede sr comprometedora o no entendible</text:p>
      <text:p text:style-name="P112">en este caso se debe filtrar que <text:s/><text:span text:style-name="T69">el id del usuario de la aplicación sea el mismo de la persona autenticada</text:span></text:p>
      <text:p text:style-name="P114">nunca debes confiar en el frontend <text:s/>si no en el backend</text:p>
      <text:p text:style-name="P114"><text:s/>control de usuario por el id</text:p>
      <text:p text:style-name="P114">si no se tiene control de eso puedes terminar con mas usuario de los debidos y estos agregar un motón de cosa que no tendrá que verifica</text:p>
      <text:p text:style-name="P114">se d<text:span text:style-name="T86">e</text:span>be agregar a xano una precondición en delete</text:p>
      <text:p text:style-name="P114">u<text:span text:style-name="T70">n </text:span>get récord con el id de <text:s/>del usuario de la aplicaciones</text:p>
      <text:p text:style-name="P114">que la variable user id sea ig<text:span text:style-name="T86">u</text:span>al a al id del usuario de la aplicación osea que este guardado en la base de datos</text:p>
      <text:p text:style-name="P114">en caso de que no se cumpla esto de un error de acceso denegado con el mensaje no puedes hacer eso</text:p>
      <text:p text:style-name="P115">se puede costumisar para poner no mas el user id</text:p>
      <text:p text:style-name="P112"/>
      <text:p text:style-name="P112"/>
      <text:p text:style-name="P112"/>
      <text:p text:style-name="P115">los otros usuarios no pueden modificar acceso para otros usuarios al menos de que sean administradores</text:p>
      <text:p text:style-name="P113"/>
      <text:p text:style-name="P115">para asegurarse de que solo tengan control máximo los administradores se debe crea un endpoint exclusivamente para esto</text:p>
      <text:p text:style-name="P115"/>
      <text:p text:style-name="P115">se hace una precondición donde se analice si el rol del usuario es administrador <text:s/>se le permite editar el rol de administrador en la pa<text:span text:style-name="T71">g</text:span>ina web</text:p>
      <text:p text:style-name="P115"/>
      <text:p text:style-name="P115">se edita el request <text:s/>de la siguiente forma</text:p>
      <text:p text:style-name="P115"/>
      <text:p text:style-name="P115"><draw:frame draw:style-name="fr2" draw:name="Imagen3" text:anchor-type="char" svg:x="0.1311in" svg:y="0in" svg:width="6.6929in" svg:height="3.7744in" draw:z-index="2"><draw:image xlink:href="Pictures/10000001000004AB000002A2489B7B84.png" xlink:type="simple" xlink:show="embed" xlink:actuate="onLoad" draw:mime-type="image/png"/></draw:frame><text:soft-page-break/></text:p>
      <text:p text:style-name="P115"/>
      <text:p text:style-name="P115"/>
      <text:p text:style-name="P115"/>
      <text:p text:style-name="P115"><draw:frame draw:style-name="fr2" draw:name="Imagen4" text:anchor-type="char" svg:x="-0.1311in" svg:y="0in" svg:width="6.6929in" svg:height="3.7744in" draw:z-index="3"><draw:image xlink:href="Pictures/10000001000004AB000002A2889610E7.png" xlink:type="simple" xlink:show="embed" xlink:actuate="onLoad" draw:mime-type="image/png"/></draw:frame><text:s text:c="2"/></text:p>
      <text:p text:style-name="P115"/>
      <text:p text:style-name="P116">esto se efectuar para que si alguien intenta realizar un cambio ala pagina web me <text:s/>haga u cambio de datos a la grid data oh no lo emita si es otro rol</text:p>
      <text:p text:style-name="P116"/>
      <text:p text:style-name="P116"><text:soft-page-break/>se debe verificar que la api permita hace acciones a los usuarios para una mayor seguridad</text:p>
      <text:p text:style-name="P116"><text:s/>esto se hace mediante</text:p>
      <text:p text:style-name="P116">1. autenticación de los usuarios.</text:p>
      <text:p text:style-name="P116">2. añadiendo <text:s/>cheque adores de control de accesos.</text:p>
      <text:p text:style-name="P116">3. creando <text:span text:style-name="T86">e</text:span>ndpoint para administradores.</text:p>
      <text:p text:style-name="P116">4. filtrando la información sensible en el backend.</text:p>
      <text:p text:style-name="P116"/>
      <text:p text:style-name="P116"/>
      <text:p text:style-name="P116">Y no confíes <text:s/>en el front<text:span text:style-name="T86">end</text:span> siempre ya que puede fallar en cuestiones de seguridad.</text:p>
      <text:p text:style-name="P116"/>
      <text:p text:style-name="P116"/>
      <text:p text:style-name="P116">En una pagina solo los usuarios con rol de administradores puede acceder <text:s/>solo pueden acceder a modificar ese rol de los otros usuarios ero la seguridad depende del backend <text:s/>solo así se podrán proteger esos datos sensibles, según sea el caso.</text:p>
      <text:p text:style-name="P116"/>
      <text:p text:style-name="P116"/>
      <text:p text:style-name="P117">Paginas privadas <text:s/>en weweb</text:p>
      <text:p text:style-name="P117"/>
      <text:p text:style-name="P116"><text:s/><text:span text:style-name="T72">solo quiero que un usuario autenticado pueda crear información sobre un ticket si no lo sta en este caso se redigira al pagina donde esta actualmente </text:span></text:p>
      <text:p text:style-name="P117">para all <text:span text:style-name="T73">ticket</text:span>s deben estar autenticados pero con un grupo en es<text:span text:style-name="T73">p</text:span>ecifico como administradores </text:p>
      <text:p text:style-name="P116"/>
      <text:p text:style-name="P118">se debe crear 2 grupos administradores y comunes ademas de equipo luego asociar a una parte de la pagina web </text:p>
      <text:p text:style-name="P118"/>
      <text:p text:style-name="P118">en token based auth debe de indicarle donde debe buscar la información del usuario ejemplo role y que es texto</text:p>
      <text:p text:style-name="P118">debe verse <text:s/>como esta confirmada la variable <text:s/>y si es una lista se cambia ea eso</text:p>
      <text:p text:style-name="P118">aunque debes de poner la key que aparece en la lista.</text:p>
      <text:p text:style-name="P118">Puedes hacerlo con solo texto y role key</text:p>
      <text:p text:style-name="P118">aun asi podrá acceder a la pagina reservada para administradores</text:p>
      <text:p text:style-name="P118">mas no editar ya que solo se permite editar con una cuenta de administradores <text:span text:style-name="T74">y la persona se redigira a la pagina de inicio si no es administradores</text:span></text:p>
      <text:p text:style-name="P119"><text:soft-page-break/>para mejorar esto ponemos una c<text:span text:style-name="T75">o</text:span>ndición de la siguiente manera</text:p>
      <text:p text:style-name="P119"><draw:frame draw:style-name="fr1" draw:name="Imagen5" text:anchor-type="char" svg:width="6.6929in" svg:height="2.3783in" draw:z-index="4"><draw:image xlink:href="Pictures/100000010000060600000224E8AEE970.png" xlink:type="simple" xlink:show="embed" xlink:actuate="onLoad" draw:mime-type="image/png"/></draw:frame></text:p>
      <text:p text:style-name="P119">esto es para cuando un usuario que no e administrador inicie sesión no se le vea la opciones exclusivas para administrador </text:p>
      <text:p text:style-name="P118"/>
      <text:p text:style-name="P118"/>
      <text:p text:style-name="P119">así el usuario o administrador consiga una url con a pagina de administradores no se vera debido a la configuración por lo cual no se le mostrara la pagina <text:s/>ala que intenta acceder al no ser administrador.</text:p>
      <text:p text:style-name="P119"/>
      <text:p text:style-name="P119">Restringir el contenido es bueno experiencia de usuario pero la seguridad depende del backend, siempre debes de tener controles de acceso al backend, logrando así que las personas que quieran acceder a los datos confidenciales tengan los permisos adecuados, las paginas web privadas en <text:s/>interfaz del usuario ayudan ala experiencia de usuario, pero tienes una medida de seguridad verdadera en el backend.</text:p>
      <text:p text:style-name="P119"/>
      <text:p text:style-name="P121">OVERFLOW es para recorrer la tabla ciando le agregamos un elemento que no cabe a simple vista </text:p>
      <text:p text:style-name="P113"><text:s/></text:p>
      <text:p text:style-name="P122">a la hora de extraer inf<text:span text:style-name="T87">o</text:span>rmación ; puedes usar get delte patch y post para obrener editar o borrar información según lo necesitemos</text:p>
      <text:p text:style-name="P122"/>
      <text:p text:style-name="P110"/>
      <text:p text:style-name="P108"/>
      <text:p text:style-name="P108"/>
      <text:p text:style-name="P108"/>
      <text:p text:style-name="P1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9T08:43:05.390422876</meta:creation-date>
    <dc:date>2025-05-23T17:19:06.471480983</dc:date>
    <meta:editing-duration>PT18H46M11S</meta:editing-duration>
    <meta:editing-cycles>41</meta:editing-cycles>
    <meta:generator>LibreOffice/24.2.7.2$Linux_X86_64 LibreOffice_project/420$Build-2</meta:generator>
    <meta:document-statistic meta:table-count="0" meta:image-count="5" meta:object-count="0" meta:page-count="22" meta:paragraph-count="369" meta:word-count="5510" meta:character-count="31609" meta:non-whitespace-character-count="26246"/>
  </office:meta>
</office:document-meta>
</file>