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C80000037DE4FC610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17.59cm" svg:height="19.948cm" draw:z-index="0"><draw:image xlink:href="Pictures/10000000000006C80000037DE4FC610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7:51:02.435408300</meta:creation-date>
    <dc:date>2025-12-09T17:53:03.745267800</dc:date>
    <meta:editing-duration>PT2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7.2$Windows_X86_64 LibreOffice_project/5cbfd1ab6520636bb5f7b99185aa69bd7456825d</meta:generator>
  </office:meta>
</office:document-meta>
</file>