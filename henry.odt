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0058" officeooo:paragraph-rsid="00040058"/>
    </style:style>
    <style:style style:name="P2" style:family="paragraph" style:parent-style-name="Preformatted_20_Text">
      <style:text-properties officeooo:rsid="00043e11" officeooo:paragraph-rsid="0008e1f7"/>
    </style:style>
    <style:style style:name="T1" style:family="text">
      <style:text-properties officeooo:rsid="0002e7c1"/>
    </style:style>
    <style:style style:name="T2" style:family="text">
      <style:text-properties officeooo:rsid="00040c7b"/>
    </style:style>
    <style:style style:name="T3" style:family="text">
      <style:text-properties officeooo:rsid="00047758"/>
    </style:style>
    <style:style style:name="T4" style:family="text">
      <style:text-properties officeooo:rsid="00064fa9"/>
    </style:style>
    <style:style style:name="T5" style:family="text">
      <style:text-properties officeooo:rsid="0008e1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aquí aprenderemos a <text:s/>utlizar herramientas pararoptimizar procesos, resolver problematicas complejos, <text:s/>para resolver procesos meorar la toma de decisiones en distintos ambitos.</text:p>
      <text:p text:style-name="Preformatted_20_Text">practicar ,diseñar analizr entre otros las ia con todo esto y entre mas se desarrollaran</text:p>
      <text:p text:style-name="Preformatted_20_Text"/>
      <text:p text:style-name="Preformatted_20_Text">generar reportes y promps con ptcf rocef</text:p>
      <text:p text:style-name="Preformatted_20_Text"/>
      <text:p text:style-name="Preformatted_20_Text">Identificar los conceptos básicos y las aplicaciones actuales de la inteligencia artificial en distintos sectores.</text:p>
      <text:p text:style-name="Preformatted_20_Text"/>
      <text:p text:style-name="Preformatted_20_Text">2</text:p>
      <text:p text:style-name="Preformatted_20_Text">Diseñar prompts efectivos utilizando metodologías como PTCF y ROCEF.</text:p>
      <text:p text:style-name="Preformatted_20_Text"/>
      <text:p text:style-name="Preformatted_20_Text">3</text:p>
      <text:p text:style-name="Preformatted_20_Text">Practicar con herramientas generativas para la creación de texto, imágenes y videos.</text:p>
      <text:p text:style-name="Preformatted_20_Text"/>
      <text:p text:style-name="Preformatted_20_Text">4</text:p>
      <text:p text:style-name="Preformatted_20_Text">Implementar agentes de IA personalizados para resolver problemas específicos.</text:p>
      <text:p text:style-name="Preformatted_20_Text"/>
      <text:p text:style-name="Preformatted_20_Text">5</text:p>
      <text:p text:style-name="Preformatted_20_Text">Analizar datos automatizados y generar reportes accionables con ayuda de IA.</text:p>
      <text:p text:style-name="Preformatted_20_Text"/>
      <text:p text:style-name="Preformatted_20_Text"/>
      <text:p text:style-name="Preformatted_20_Text"/>
      <text:p text:style-name="Preformatted_20_Text">la ia la encuentras en meta <text:s/>chatgpt y copylot entre otros</text:p>
      <text:p text:style-name="Preformatted_20_Text"/>
      <text:p text:style-name="Preformatted_20_Text"/>
      <text:p text:style-name="Preformatted_20_Text">tambien whatsapp integro la ia para buscar datos fácilmente mientras hablamos con otras personas</text:p>
      <text:p text:style-name="Preformatted_20_Text"/>
      <text:p text:style-name="Preformatted_20_Text">hailuo esta plataforma permite generar imagenes y video a partor de indicadores de l&lt; ia.</text:p>
      <text:p text:style-name="Preformatted_20_Text">Puedes regiatrarte y hacer una prueba.</text:p>
      <text:p text:style-name="Preformatted_20_Text"/>
      <text:p text:style-name="Preformatted_20_Text">Ia de rx pernite lasificar las radiogracfias de formaque nos permita diferencuiar rapidamente ebtre disyinto diagnosticos para diferencias patrones comunes en estas</text:p>
      <text:p text:style-name="Preformatted_20_Text">es importante aprenser ia por que nis ayudara a fomentar la proiductivbidad de forma significativa.</text:p>
      <text:p text:style-name="Preformatted_20_Text"/>
      <text:p text:style-name="Preformatted_20_Text">Esto ayudara a adquirir ventaja laboral en un mercado competitivo ade,as de ayudar a lidiar con la revolucion tecnologica.</text:p>
      <text:p text:style-name="Preformatted_20_Text">Open ia es una empresa desarrollada por <text:s/>elon musk sam altman entree otrs ha desarrollado herramientas como gpt una ia de de lenguaje natural o dall-e una herrramienta para crear uimagenes asi como chatgpt-4 una herramienta basada en gpt</text:p>
      <text:p text:style-name="Preformatted_20_Text"/>
      <text:p text:style-name="Preformatted_20_Text">chatgpt no es ntodo poderosp a pesar de tener respuestas coherentes tiene restricciones si conocemods tpdp esto podremosn usarlo de forja conciente</text:p>
      <text:p text:style-name="Preformatted_20_Text">si uy conocimiento es limitado, esto pir que solo se afctualizo hasta ajora a enero del 2022 por lo tanto la informacion obtenida a partir de ahi no sera segura.</text:p>
      <text:p text:style-name="Preformatted_20_Text"/>
      <text:p text:style-name="Preformatted_20_Text">Las respuestas <text:span text:style-name="T1">no son tan precisas</text:span></text:p>
      <text:p text:style-name="Preformatted_20_Text"/>
      <text:p text:style-name="P1">gpt viene de de una organización llamada ooen ai su objetivo es garantizar </text:p>
      <text:p text:style-name="P1"/>
      <text:p text:style-name="P1">que <text:span text:style-name="T2">todo los demsas persionas tengsan acceso a la ai</text:span></text:p>
      <text:p text:style-name="P1"/>
      <text:p text:style-name="P2"><text:s/><text:span text:style-name="T3">aunq</text:span><text:span text:style-name="T4">u</text:span><text:span text:style-name="T3">e con su</text:span><text:span text:style-name="T4">s</text:span><text:span text:style-name="T3"> </text:span>limitaciones <text:span text:style-name="T4">como lo moral</text:span></text:p>
      <text:p text:style-name="P2"/>
      <text:p text:style-name="P2"><text:soft-page-break/><text:span text:style-name="T5">chatgpt <text:s/>no puede buswcar mas informacion si no eres mas especofico</text:span></text:p>
      <text:p text:style-name="P2"><text:span text:style-name="T5">ç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8T18:08:37.987788700</dc:date>
    <meta:editing-duration>PT1H13M56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28" meta:word-count="344" meta:character-count="2209" meta:non-whitespace-character-count="1885"/>
  </office:meta>
</office:document-meta>
</file>