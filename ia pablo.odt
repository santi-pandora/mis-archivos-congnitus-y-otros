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14a" officeooo:paragraph-rsid="0010514a"/>
    </style:style>
    <style:style style:name="P2" style:family="paragraph" style:parent-style-name="Standard">
      <style:text-properties officeooo:rsid="00123299" officeooo:paragraph-rsid="00123299"/>
    </style:style>
    <style:style style:name="P3" style:family="paragraph" style:parent-style-name="Standard">
      <style:text-properties officeooo:rsid="0013fa15" officeooo:paragraph-rsid="0013fa15"/>
    </style:style>
    <style:style style:name="P4" style:family="paragraph" style:parent-style-name="Standard">
      <style:text-properties officeooo:rsid="00150223" officeooo:paragraph-rsid="00150223"/>
    </style:style>
    <style:style style:name="P5" style:family="paragraph" style:parent-style-name="Standard">
      <style:text-properties officeooo:rsid="00160a72" officeooo:paragraph-rsid="00160a72"/>
    </style:style>
    <style:style style:name="P6" style:family="paragraph" style:parent-style-name="Standard">
      <style:text-properties officeooo:rsid="0016f207" officeooo:paragraph-rsid="0016f207"/>
    </style:style>
    <style:style style:name="T1" style:family="text">
      <style:text-properties officeooo:rsid="00160a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i la compania no invierten ustedes aun asi puedes tu invertir en frma para avanzar adeñante</text:p>
      <text:p text:style-name="P1"/>
      <text:p text:style-name="P1">responder a la demanda mas rapidamente </text:p>
      <text:p text:style-name="P1">la ia se ha vuelto herramientas <text:s/>mas sin embargo la ia <text:s/>ayudara a <text:s/>a mejrar nuestro trabajo</text:p>
      <text:p text:style-name="P1">en este momento <text:s/>la empresa no implementa mucho la ia pero esto es una bandera roja ya que el cliente hace correcciones en vez de hacer ventas <text:s/>y eso no puede hacer asi.</text:p>
      <text:p text:style-name="P1"/>
      <text:p text:style-name="P2">Lmn encntrar algo que tiene sentido</text:p>
      <text:p text:style-name="P2"/>
      <text:p text:style-name="P2">estamos atrasads en mucho</text:p>
      <text:p text:style-name="P2">los modelos avanzan rapido </text:p>
      <text:p text:style-name="P2">mfejorar nuestra comprension con la ia.</text:p>
      <text:p text:style-name="P2"/>
      <text:p text:style-name="P3">Esro puede hacer <text:s/>automicas workflows</text:p>
      <text:p text:style-name="P3">entendimiento profundos</text:p>
      <text:p text:style-name="P3">colaborcion real </text:p>
      <text:p text:style-name="P3">la oportunidad es raido</text:p>
      <text:p text:style-name="P3">3x mas raido </text:p>
      <text:p text:style-name="P3"/>
      <text:p text:style-name="P3"/>
      <text:p text:style-name="P4">como soy yo ia first </text:p>
      <text:p text:style-name="P4">osea comiezo hacerlo <text:s/>con la ia obvuo sin dejar de curiosar </text:p>
      <text:p text:style-name="P4">.</text:p>
      <text:p text:style-name="P4"/>
      <text:p text:style-name="P4">acceleration codedebu and build faster</text:p>
      <text:p text:style-name="P4">augmentation</text:p>
      <text:p text:style-name="P4">creativity </text:p>
      <text:p text:style-name="P4"/>
      <text:p text:style-name="P4">la ai nos hace mejores desde que apyes.</text:p>
      <text:p text:style-name="P4"/>
      <text:p text:style-name="P4">Exspera</text:p>
      <text:p text:style-name="P4">entregas ms rapidas</text:p>
      <text:p text:style-name="P4">masb iniciativa</text:p>
      <text:p text:style-name="P4">un desarrollo con ia conductora psea ia + nosotros}</text:p>
      <text:p text:style-name="P4">el cliente quiere generar dinero</text:p>
      <text:p text:style-name="P4">se llama a una mayoe demanda global</text:p>
      <text:p text:style-name="P4">hacer el trabaj<text:span text:style-name="T1">o as rapñodo</text:span></text:p>
      <text:p text:style-name="P5">construir portafolio impresionante</text:p>
      <text:p text:style-name="P5"/>
      <text:p text:style-name="P5">example <text:s text:c="2"/>mcp</text:p>
      <text:p text:style-name="P5">aentes ee la ia <text:s/></text:p>
      <text:p text:style-name="P5">oh generar <text:s/>self -service</text:p>
      <text:p text:style-name="P5">automated traaction agent</text:p>
      <text:p text:style-name="P5"><text:s/>were house intelligence. <text:s/></text:p>
      <text:p text:style-name="P6">Rules and workflows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08:09:13.852742100</meta:creation-date>
    <dc:date>2025-12-03T10:00:35.605506600</dc:date>
    <meta:editing-duration>PT31M28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94" meta:character-count="1158" meta:non-whitespace-character-count="976"/>
  </office:meta>
</office:document-meta>
</file>