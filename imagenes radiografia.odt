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C000002D2FE397F6D.png" manifest:media-type="image/png"/>
  <manifest:file-entry manifest:full-path="Pictures/10000001000005C5000002B6E19273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n2" text:anchor-type="char" svg:width="17.59cm" svg:height="8.65cm" draw:z-index="1"><draw:image xlink:href="Pictures/10000001000005BC000002D2FE397F6D.png" xlink:type="simple" xlink:show="embed" xlink:actuate="onLoad" draw:mime-type="image/png"/></draw:frame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width="17.59cm" svg:height="9.74cm" draw:z-index="0"><draw:image xlink:href="Pictures/10000001000005C5000002B6E192731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6:23:52.059133400</meta:creation-date>
    <dc:date>2026-03-11T16:27:03.092338500</dc:date>
    <meta:editing-duration>PT3M14S</meta:editing-duration>
    <meta:editing-cycles>1</meta:editing-cycles>
    <meta:document-statistic meta:table-count="0" meta:image-count="2" meta:object-count="0" meta:page-count="2" meta:paragraph-count="1" meta:word-count="0" meta:character-count="4" meta:non-whitespace-character-count="0"/>
    <meta:generator>LibreOffice/25.2.7.2$Windows_X86_64 LibreOffice_project/5cbfd1ab6520636bb5f7b99185aa69bd7456825d</meta:generator>
  </office:meta>
</office:document-meta>
</file>