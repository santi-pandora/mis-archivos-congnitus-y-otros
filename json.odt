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6d5" officeooo:paragraph-rsid="001296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define el arreglo</text:p>
      <text:p text:style-name="P1">luego se recorre elarreglo ccomo objeto jso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4:29:05.471475211</meta:creation-date>
    <dc:date>2025-03-20T18:46:53.964076110</dc:date>
    <meta:editing-duration>PT4H5M1S</meta:editing-duration>
    <meta:editing-cycles>1</meta:editing-cycles>
    <meta:document-statistic meta:table-count="0" meta:image-count="0" meta:object-count="0" meta:page-count="1" meta:paragraph-count="2" meta:word-count="11" meta:character-count="64" meta:non-whitespace-character-count="55"/>
    <meta:generator>LibreOffice/24.8.5.2$Linux_X86_64 LibreOffice_project/27b361b745d0ea8f99bc93dfcb7a39098dfa5fff</meta:generator>
  </office:meta>
</office:document-meta>
</file>