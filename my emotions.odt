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c63" officeooo:paragraph-rsid="000b5c63"/>
    </style:style>
    <style:style style:name="P2" style:family="paragraph" style:parent-style-name="Standard">
      <style:text-properties officeooo:rsid="000cd8c8" officeooo:paragraph-rsid="000cd8c8"/>
    </style:style>
    <style:style style:name="P3" style:family="paragraph" style:parent-style-name="Standard">
      <style:text-properties officeooo:rsid="001309d1" officeooo:paragraph-rsid="001309d1"/>
    </style:style>
    <style:style style:name="T1" style:family="text">
      <style:text-properties officeooo:rsid="000b9a2e"/>
    </style:style>
    <style:style style:name="T2" style:family="text">
      <style:text-properties officeooo:rsid="000eb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obe comi te sientes en este momento</text:p>
      <text:p text:style-name="P1"/>
      <text:p text:style-name="P1"><text:s/>siticion</text:p>
      <text:p text:style-name="P1">computador que me hace cosas como no aunque o estoy superando</text:p>
      <text:p text:style-name="P1">que piensas:</text:p>
      <text:p text:style-name="P1">pir que hace lo que no le pedi</text:p>
      <text:p text:style-name="P1"/>
      <text:p text:style-name="P1">caccones concretas musica relajante y que me ayuda a <text:span text:style-name="T1">m</text:span>ejoraf</text:p>
      <text:p text:style-name="P1"/>
      <text:p text:style-name="P1">negativo</text:p>
      <text:p text:style-name="P1">ancioso y cofuso peo ahora feliz</text:p>
      <text:p text:style-name="P1"/>
      <text:p text:style-name="P1"/>
      <text:p text:style-name="P2">emociones: <text:span text:style-name="T2">y dice que en lo que me enseño </text:span></text:p>
      <text:p text:style-name="P2">me siento <text:s/>mlesto por qie in compñero encontro un bug </text:p>
      <text:p text:style-name="P3">ahora estoy tranquilo pr que lo resolv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4T17:04:16.810553400</meta:creation-date>
    <dc:date>2025-08-15T17:53:52.816859400</dc:date>
    <meta:editing-duration>PT50M52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1" meta:word-count="72" meta:character-count="387" meta:non-whitespace-character-count="322"/>
  </office:meta>
</office:document-meta>
</file>