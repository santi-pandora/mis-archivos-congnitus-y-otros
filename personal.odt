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00d7" officeooo:paragraph-rsid="000a00d7"/>
    </style:style>
    <style:style style:name="P2" style:family="paragraph" style:parent-style-name="Preformatted_20_Text">
      <style:text-properties officeooo:paragraph-rsid="000a00d7"/>
    </style:style>
    <style:style style:name="P3" style:family="paragraph" style:parent-style-name="Preformatted_20_Text">
      <style:text-properties officeooo:rsid="000e30a3" officeooo:paragraph-rsid="000a00d7"/>
    </style:style>
    <style:style style:name="P4" style:family="paragraph" style:parent-style-name="Preformatted_20_Text">
      <style:text-properties officeooo:rsid="000f8502" officeooo:paragraph-rsid="000a00d7"/>
    </style:style>
    <style:style style:name="P5" style:family="paragraph" style:parent-style-name="Preformatted_20_Text">
      <style:text-properties officeooo:rsid="000fbe98" officeooo:paragraph-rsid="000a00d7"/>
    </style:style>
    <style:style style:name="P6" style:family="paragraph" style:parent-style-name="Preformatted_20_Text">
      <style:text-properties officeooo:rsid="000bde68" officeooo:paragraph-rsid="000bde68"/>
    </style:style>
    <style:style style:name="P7" style:family="paragraph" style:parent-style-name="Preformatted_20_Text">
      <style:text-properties officeooo:rsid="000c578a" officeooo:paragraph-rsid="000c578a"/>
    </style:style>
    <style:style style:name="T1" style:family="text">
      <style:text-properties officeooo:rsid="000e3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"/><text:span text:style-name="T1">autoirelfklexion</text:span></text:p>
      <text:p text:style-name="P3"/>
      <text:p text:style-name="P3">bajar ansiedad</text:p>
      <text:p text:style-name="P3">emocion</text:p>
      <text:p text:style-name="P3">alterados</text:p>
      <text:p text:style-name="P3"/>
      <text:p text:style-name="P3">motivacion </text:p>
      <text:p text:style-name="P3">descubrir que nos altera</text:p>
      <text:p text:style-name="P3">realmente apasionado</text:p>
      <text:p text:style-name="P3"/>
      <text:p text:style-name="P3"/>
      <text:p text:style-name="P3">mantenerse positivo</text:p>
      <text:p text:style-name="P3">como puedo hacer</text:p>
      <text:p text:style-name="P3">empatia</text:p>
      <text:p text:style-name="P3"/>
      <text:p text:style-name="P3"><text:s/>aplicar en lo personal</text:p>
      <text:p text:style-name="P3">habnilidades sociales</text:p>
      <text:p text:style-name="P4">comunicación abierta</text:p>
      <text:p text:style-name="P4">no es algo de la noche a la mañana</text:p>
      <text:p text:style-name="P4"/>
      <text:p text:style-name="P4">paciencia</text:p>
      <text:p text:style-name="P4">efectivos en ña ghestion de personas logros de objetivos</text:p>
      <text:p text:style-name="P4"/>
      <text:p text:style-name="P5">explorar mi emocion </text:p>
      <text:p text:style-name="P5"/>
      <text:p text:style-name="Preformatted_20_Text"/>
      <text:p text:style-name="Preformatted_20_Text">1. me siente truste y feliz</text:p>
      <text:p text:style-name="Preformatted_20_Text">2. no tener la inscripcion del icfes resuelto</text:p>
      <text:p text:style-name="Preformatted_20_Text">y comenzar etapa productiva formal</text:p>
      <text:p text:style-name="Preformatted_20_Text">3. que el sena dno diga nada antes de <text:s/>y que crean que perdi mi tiempo</text:p>
      <text:p text:style-name="Preformatted_20_Text">4. escrkbir como me siento</text:p>
      <text:p text:style-name="Preformatted_20_Text"/>
      <text:p text:style-name="Preformatted_20_Text"/>
      <text:p text:style-name="Preformatted_20_Text"/>
      <text:p text:style-name="P6">imrimir valores</text:p>
      <text:p text:style-name="P6"/>
      <text:p text:style-name="P6">revision de varables dofrerentes</text:p>
      <text:p text:style-name="P6"/>
      <text:p text:style-name="P6">proxy true</text:p>
      <text:p text:style-name="P6"/>
      <text:p text:style-name="P6">dato</text:p>
      <text:p text:style-name="P7">restrction aand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11:36:48.430944338</dc:date>
    <meta:editing-duration>PT4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7" meta:word-count="99" meta:character-count="609" meta:non-whitespace-character-count="531"/>
  </office:meta>
</office:document-meta>
</file>