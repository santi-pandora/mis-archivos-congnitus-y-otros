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d2dba" officeooo:paragraph-rsid="001d2dba"/>
    </style:style>
    <style:style style:name="P2" style:family="paragraph" style:parent-style-name="Standard">
      <style:text-properties officeooo:rsid="001ee070" officeooo:paragraph-rsid="001ee070"/>
    </style:style>
    <style:style style:name="P3" style:family="paragraph" style:parent-style-name="Standard">
      <style:text-properties officeooo:rsid="0020009a" officeooo:paragraph-rsid="0020009a"/>
    </style:style>
    <style:style style:name="P4" style:family="paragraph" style:parent-style-name="Standard">
      <style:text-properties officeooo:rsid="001d2dba" officeooo:paragraph-rsid="001ee070"/>
    </style:style>
    <style:style style:name="P5" style:family="paragraph" style:parent-style-name="Standard">
      <style:text-properties officeooo:rsid="00202315" officeooo:paragraph-rsid="00202315"/>
    </style:style>
    <style:style style:name="P6" style:family="paragraph" style:parent-style-name="Standard">
      <style:text-properties officeooo:rsid="0020af11" officeooo:paragraph-rsid="0020af11"/>
    </style:style>
    <style:style style:name="P7" style:family="paragraph" style:parent-style-name="Standard">
      <style:text-properties officeooo:rsid="00223d02" officeooo:paragraph-rsid="00223d02"/>
    </style:style>
    <style:style style:name="P8" style:family="paragraph" style:parent-style-name="Standard">
      <style:text-properties officeooo:rsid="002356a0" officeooo:paragraph-rsid="002356a0"/>
    </style:style>
    <style:style style:name="P9" style:family="paragraph" style:parent-style-name="Standard">
      <style:text-properties officeooo:rsid="00288caa" officeooo:paragraph-rsid="0032f97d"/>
    </style:style>
    <style:style style:name="P10" style:family="paragraph" style:parent-style-name="Standard">
      <style:text-properties officeooo:rsid="00288caa" officeooo:paragraph-rsid="00288caa"/>
    </style:style>
    <style:style style:name="P11" style:family="paragraph" style:parent-style-name="Standard">
      <style:text-properties officeooo:rsid="003663bb" officeooo:paragraph-rsid="003663bb"/>
    </style:style>
    <style:style style:name="P12" style:family="paragraph" style:parent-style-name="Standard">
      <style:text-properties officeooo:rsid="0039006f" officeooo:paragraph-rsid="0039006f"/>
    </style:style>
    <style:style style:name="P13" style:family="paragraph" style:parent-style-name="Standard">
      <style:text-properties officeooo:rsid="00396077" officeooo:paragraph-rsid="00396077"/>
    </style:style>
    <style:style style:name="P14" style:family="paragraph" style:parent-style-name="Standard">
      <style:text-properties officeooo:rsid="003b73ba" officeooo:paragraph-rsid="003b73ba"/>
    </style:style>
    <style:style style:name="P15" style:family="paragraph" style:parent-style-name="Standard">
      <style:text-properties officeooo:rsid="003c3b30" officeooo:paragraph-rsid="003c3b30"/>
    </style:style>
    <style:style style:name="P16" style:family="paragraph" style:parent-style-name="Standard">
      <style:text-properties officeooo:rsid="003e6d54" officeooo:paragraph-rsid="003e6d54"/>
    </style:style>
    <style:style style:name="P17" style:family="paragraph" style:parent-style-name="Standard">
      <style:text-properties officeooo:rsid="0041a765" officeooo:paragraph-rsid="0041a765"/>
    </style:style>
    <style:style style:name="P18" style:family="paragraph" style:parent-style-name="Standard">
      <style:text-properties officeooo:rsid="00436bc2" officeooo:paragraph-rsid="00436bc2"/>
    </style:style>
    <style:style style:name="P19" style:family="paragraph" style:parent-style-name="Standard">
      <style:text-properties officeooo:rsid="004521c4" officeooo:paragraph-rsid="004521c4"/>
    </style:style>
    <style:style style:name="P20" style:family="paragraph" style:parent-style-name="Standard">
      <style:text-properties officeooo:rsid="00475f8f" officeooo:paragraph-rsid="004521c4"/>
    </style:style>
    <style:style style:name="P21" style:family="paragraph" style:parent-style-name="Standard">
      <style:text-properties officeooo:rsid="004602fa" officeooo:paragraph-rsid="004602fa"/>
    </style:style>
    <style:style style:name="P22" style:family="paragraph" style:parent-style-name="Standard">
      <style:text-properties officeooo:rsid="00475f8f" officeooo:paragraph-rsid="00475f8f"/>
    </style:style>
    <style:style style:name="P23" style:family="paragraph" style:parent-style-name="Standard">
      <style:text-properties officeooo:rsid="0049666c" officeooo:paragraph-rsid="0049666c"/>
    </style:style>
    <style:style style:name="P24" style:family="paragraph" style:parent-style-name="Standard">
      <style:text-properties officeooo:rsid="0049dc5e" officeooo:paragraph-rsid="0049dc5e"/>
    </style:style>
    <style:style style:name="P25" style:family="paragraph" style:parent-style-name="Standard">
      <style:text-properties officeooo:rsid="004bcb45" officeooo:paragraph-rsid="004bcb45"/>
    </style:style>
    <style:style style:name="P26" style:family="paragraph" style:parent-style-name="Standard">
      <style:text-properties officeooo:rsid="00501999" officeooo:paragraph-rsid="00501999"/>
    </style:style>
    <style:style style:name="P27" style:family="paragraph" style:parent-style-name="Standard">
      <style:text-properties officeooo:rsid="00518f04" officeooo:paragraph-rsid="00518f04"/>
    </style:style>
    <style:style style:name="P28" style:family="paragraph" style:parent-style-name="Standard">
      <style:text-properties officeooo:rsid="00551023" officeooo:paragraph-rsid="00551023"/>
    </style:style>
    <style:style style:name="P29" style:family="paragraph" style:parent-style-name="Standard">
      <style:text-properties officeooo:rsid="0056c43a" officeooo:paragraph-rsid="0056c43a"/>
    </style:style>
    <style:style style:name="P30" style:family="paragraph" style:parent-style-name="Standard">
      <style:text-properties officeooo:rsid="005835ef" officeooo:paragraph-rsid="005835ef"/>
    </style:style>
    <style:style style:name="P31" style:family="paragraph" style:parent-style-name="Standard">
      <style:text-properties officeooo:rsid="0059dcff" officeooo:paragraph-rsid="0059dcff"/>
    </style:style>
    <style:style style:name="P32" style:family="paragraph" style:parent-style-name="Standard">
      <style:text-properties officeooo:rsid="005a73b6" officeooo:paragraph-rsid="005a73b6"/>
    </style:style>
    <style:style style:name="P33" style:family="paragraph" style:parent-style-name="Standard">
      <style:text-properties officeooo:rsid="005e5224" officeooo:paragraph-rsid="005e5224"/>
    </style:style>
    <style:style style:name="P34" style:family="paragraph" style:parent-style-name="Standard">
      <style:text-properties officeooo:rsid="005f1925" officeooo:paragraph-rsid="005f1925"/>
    </style:style>
    <style:style style:name="P35" style:family="paragraph" style:parent-style-name="Standard">
      <style:text-properties officeooo:rsid="006238b3" officeooo:paragraph-rsid="006238b3"/>
    </style:style>
    <style:style style:name="P36" style:family="paragraph" style:parent-style-name="Standard">
      <style:text-properties officeooo:rsid="006270f2" officeooo:paragraph-rsid="006270f2"/>
    </style:style>
    <style:style style:name="P37" style:family="paragraph" style:parent-style-name="Standard">
      <style:text-properties officeooo:rsid="0065162d" officeooo:paragraph-rsid="0065162d"/>
    </style:style>
    <style:style style:name="P38" style:family="paragraph" style:parent-style-name="Standard">
      <style:text-properties officeooo:rsid="006524c9" officeooo:paragraph-rsid="006524c9"/>
    </style:style>
    <style:style style:name="P39" style:family="paragraph" style:parent-style-name="Standard">
      <style:text-properties officeooo:rsid="0067affb" officeooo:paragraph-rsid="0067affb"/>
    </style:style>
    <style:style style:name="P40" style:family="paragraph" style:parent-style-name="Standard">
      <style:text-properties officeooo:rsid="0068315c" officeooo:paragraph-rsid="0068315c"/>
    </style:style>
    <style:style style:name="P41" style:family="paragraph" style:parent-style-name="Standard">
      <style:text-properties officeooo:rsid="006f8857" officeooo:paragraph-rsid="006f8857"/>
    </style:style>
    <style:style style:name="P42" style:family="paragraph" style:parent-style-name="Standard">
      <style:text-properties officeooo:rsid="0071632a" officeooo:paragraph-rsid="0071632a"/>
    </style:style>
    <style:style style:name="P43" style:family="paragraph" style:parent-style-name="Standard">
      <style:text-properties officeooo:rsid="00732db8" officeooo:paragraph-rsid="00732db8"/>
    </style:style>
    <style:style style:name="P44" style:family="paragraph" style:parent-style-name="Standard">
      <style:text-properties officeooo:rsid="0074d464" officeooo:paragraph-rsid="0074d464"/>
    </style:style>
    <style:style style:name="P45" style:family="paragraph" style:parent-style-name="Standard">
      <style:text-properties officeooo:rsid="007c0380" officeooo:paragraph-rsid="007c0380"/>
    </style:style>
    <style:style style:name="P46" style:family="paragraph" style:parent-style-name="Standard">
      <style:text-properties officeooo:rsid="007e943c" officeooo:paragraph-rsid="007e943c"/>
    </style:style>
    <style:style style:name="P47" style:family="paragraph" style:parent-style-name="Standard">
      <style:text-properties officeooo:rsid="007f7740" officeooo:paragraph-rsid="007f7740"/>
    </style:style>
    <style:style style:name="P48" style:family="paragraph" style:parent-style-name="Standard">
      <style:text-properties officeooo:rsid="00813411" officeooo:paragraph-rsid="00813411"/>
    </style:style>
    <style:style style:name="P49" style:family="paragraph" style:parent-style-name="Standard">
      <style:text-properties officeooo:rsid="0082a539" officeooo:paragraph-rsid="0082a539"/>
    </style:style>
    <style:style style:name="P50" style:family="paragraph" style:parent-style-name="Standard">
      <style:text-properties officeooo:rsid="00862949" officeooo:paragraph-rsid="00862949"/>
    </style:style>
    <style:style style:name="P51" style:family="paragraph" style:parent-style-name="Standard">
      <style:text-properties officeooo:rsid="0086337c" officeooo:paragraph-rsid="0086337c"/>
    </style:style>
    <style:style style:name="P52" style:family="paragraph" style:parent-style-name="Standard">
      <style:text-properties officeooo:rsid="00888179" officeooo:paragraph-rsid="00888179"/>
    </style:style>
    <style:style style:name="P53" style:family="paragraph" style:parent-style-name="Standard">
      <style:text-properties officeooo:rsid="0088d5b8" officeooo:paragraph-rsid="0088d5b8"/>
    </style:style>
    <style:style style:name="P54" style:family="paragraph" style:parent-style-name="Standard">
      <style:text-properties officeooo:rsid="008ad5c2" officeooo:paragraph-rsid="008ad5c2"/>
    </style:style>
    <style:style style:name="P55" style:family="paragraph" style:parent-style-name="Standard">
      <style:text-properties officeooo:rsid="008d8772" officeooo:paragraph-rsid="008d8772"/>
    </style:style>
    <style:style style:name="P56" style:family="paragraph" style:parent-style-name="Standard">
      <style:text-properties officeooo:rsid="008e716c" officeooo:paragraph-rsid="008e716c"/>
    </style:style>
    <style:style style:name="P57" style:family="paragraph" style:parent-style-name="Standard">
      <style:text-properties officeooo:rsid="008f80dc" officeooo:paragraph-rsid="008f80dc"/>
    </style:style>
    <style:style style:name="P58" style:family="paragraph" style:parent-style-name="Standard">
      <style:text-properties officeooo:rsid="00936a1e" officeooo:paragraph-rsid="00936a1e"/>
    </style:style>
    <style:style style:name="P59" style:family="paragraph" style:parent-style-name="Standard">
      <style:text-properties officeooo:rsid="0095f6fa" officeooo:paragraph-rsid="0095f6fa"/>
    </style:style>
    <style:style style:name="P60" style:family="paragraph" style:parent-style-name="Standard">
      <style:text-properties officeooo:rsid="0099db64" officeooo:paragraph-rsid="0099db64"/>
    </style:style>
    <style:style style:name="P61" style:family="paragraph" style:parent-style-name="Standard">
      <style:text-properties officeooo:rsid="009c7ac4" officeooo:paragraph-rsid="009c7ac4"/>
    </style:style>
    <style:style style:name="P62" style:family="paragraph" style:parent-style-name="Standard">
      <style:text-properties officeooo:rsid="009e7a2a" officeooo:paragraph-rsid="009e7a2a"/>
    </style:style>
    <style:style style:name="P63" style:family="paragraph" style:parent-style-name="Standard">
      <style:text-properties officeooo:rsid="00a0e178" officeooo:paragraph-rsid="00a0e178"/>
    </style:style>
    <style:style style:name="P64" style:family="paragraph" style:parent-style-name="Standard">
      <style:text-properties officeooo:rsid="00a2b499" officeooo:paragraph-rsid="00a0e178"/>
    </style:style>
    <style:style style:name="P65" style:family="paragraph" style:parent-style-name="Standard">
      <style:text-properties officeooo:rsid="00a4061f" officeooo:paragraph-rsid="00a4061f"/>
    </style:style>
    <style:style style:name="P66" style:family="paragraph" style:parent-style-name="Standard">
      <style:text-properties officeooo:rsid="00a4aab5" officeooo:paragraph-rsid="00a4aab5"/>
    </style:style>
    <style:style style:name="P67" style:family="paragraph" style:parent-style-name="Standard">
      <style:text-properties officeooo:rsid="00a5a2cf" officeooo:paragraph-rsid="00a5a2cf"/>
    </style:style>
    <style:style style:name="P68" style:family="paragraph" style:parent-style-name="Standard">
      <style:text-properties officeooo:rsid="00a80e08" officeooo:paragraph-rsid="00a80e08"/>
    </style:style>
    <style:style style:name="P69" style:family="paragraph" style:parent-style-name="Standard">
      <style:text-properties officeooo:rsid="00ab3c13" officeooo:paragraph-rsid="00ab3c13"/>
    </style:style>
    <style:style style:name="P70" style:family="paragraph" style:parent-style-name="Standard">
      <style:text-properties officeooo:rsid="00ac8c1d" officeooo:paragraph-rsid="00ac8c1d"/>
    </style:style>
    <style:style style:name="P71" style:family="paragraph" style:parent-style-name="Standard">
      <style:text-properties officeooo:rsid="00af50af" officeooo:paragraph-rsid="00af50af"/>
    </style:style>
    <style:style style:name="P72" style:family="paragraph" style:parent-style-name="Standard">
      <style:text-properties officeooo:rsid="00afb16b" officeooo:paragraph-rsid="00afb16b"/>
    </style:style>
    <style:style style:name="P73" style:family="paragraph" style:parent-style-name="Standard">
      <style:text-properties officeooo:rsid="01953450" officeooo:paragraph-rsid="01953450"/>
    </style:style>
    <style:style style:name="P74" style:family="paragraph" style:parent-style-name="Standard">
      <style:text-properties officeooo:rsid="00b0ebab" officeooo:paragraph-rsid="00b0ebab"/>
    </style:style>
    <style:style style:name="P75" style:family="paragraph" style:parent-style-name="Standard">
      <style:text-properties officeooo:rsid="00b197a2" officeooo:paragraph-rsid="00b197a2"/>
    </style:style>
    <style:style style:name="P76" style:family="paragraph" style:parent-style-name="Standard">
      <style:text-properties officeooo:rsid="00b441b7" officeooo:paragraph-rsid="00b441b7"/>
    </style:style>
    <style:style style:name="P77" style:family="paragraph" style:parent-style-name="Standard">
      <style:text-properties officeooo:rsid="00b631a1" officeooo:paragraph-rsid="00b631a1"/>
    </style:style>
    <style:style style:name="P78" style:family="paragraph" style:parent-style-name="Standard">
      <style:text-properties officeooo:rsid="00b7dd6d" officeooo:paragraph-rsid="00b7dd6d"/>
    </style:style>
    <style:style style:name="P79" style:family="paragraph" style:parent-style-name="Standard">
      <style:text-properties officeooo:rsid="00b8791b" officeooo:paragraph-rsid="00b8791b"/>
    </style:style>
    <style:style style:name="P80" style:family="paragraph" style:parent-style-name="Standard">
      <style:text-properties officeooo:rsid="00b89534" officeooo:paragraph-rsid="00b89534"/>
    </style:style>
    <style:style style:name="P81" style:family="paragraph" style:parent-style-name="Standard">
      <style:text-properties officeooo:rsid="00ba7575" officeooo:paragraph-rsid="00ba7575"/>
    </style:style>
    <style:style style:name="P82" style:family="paragraph" style:parent-style-name="Standard">
      <style:text-properties officeooo:rsid="00bc68f3" officeooo:paragraph-rsid="00bc68f3"/>
    </style:style>
    <style:style style:name="P83" style:family="paragraph" style:parent-style-name="Standard">
      <style:text-properties officeooo:rsid="00c025af" officeooo:paragraph-rsid="00c025af"/>
    </style:style>
    <style:style style:name="P84" style:family="paragraph" style:parent-style-name="Standard">
      <style:text-properties officeooo:rsid="00c1e930" officeooo:paragraph-rsid="00c1e930"/>
    </style:style>
    <style:style style:name="P85" style:family="paragraph" style:parent-style-name="Standard">
      <style:text-properties officeooo:rsid="00c27884" officeooo:paragraph-rsid="00c27884"/>
    </style:style>
    <style:style style:name="P86" style:family="paragraph" style:parent-style-name="Standard">
      <style:text-properties officeooo:rsid="00c59f90" officeooo:paragraph-rsid="00c59f90"/>
    </style:style>
    <style:style style:name="P87" style:family="paragraph" style:parent-style-name="Standard">
      <style:text-properties officeooo:rsid="00c72e59" officeooo:paragraph-rsid="00c72e59"/>
    </style:style>
    <style:style style:name="P88" style:family="paragraph" style:parent-style-name="Standard">
      <style:text-properties officeooo:rsid="00c84a31" officeooo:paragraph-rsid="00c84a31"/>
    </style:style>
    <style:style style:name="P89" style:family="paragraph" style:parent-style-name="Standard">
      <style:text-properties officeooo:rsid="00cb2875" officeooo:paragraph-rsid="00cb2875"/>
    </style:style>
    <style:style style:name="P90" style:family="paragraph" style:parent-style-name="Standard">
      <style:text-properties officeooo:rsid="00ccfe67" officeooo:paragraph-rsid="00ccfe67"/>
    </style:style>
    <style:style style:name="P91" style:family="paragraph" style:parent-style-name="Standard">
      <style:text-properties officeooo:rsid="00cde037" officeooo:paragraph-rsid="00cde037"/>
    </style:style>
    <style:style style:name="P92" style:family="paragraph" style:parent-style-name="Standard">
      <style:text-properties officeooo:rsid="00cef8c3" officeooo:paragraph-rsid="00cef8c3"/>
    </style:style>
    <style:style style:name="P93" style:family="paragraph" style:parent-style-name="Standard">
      <style:text-properties officeooo:rsid="00d12188" officeooo:paragraph-rsid="00d12188"/>
    </style:style>
    <style:style style:name="P94" style:family="paragraph" style:parent-style-name="Standard">
      <style:text-properties officeooo:rsid="00d3e1a1" officeooo:paragraph-rsid="00d3e1a1"/>
    </style:style>
    <style:style style:name="P95" style:family="paragraph" style:parent-style-name="Standard">
      <style:text-properties officeooo:rsid="00d75918" officeooo:paragraph-rsid="00d75918"/>
    </style:style>
    <style:style style:name="P96" style:family="paragraph" style:parent-style-name="Standard">
      <style:text-properties officeooo:rsid="00d8940d" officeooo:paragraph-rsid="00d8940d"/>
    </style:style>
    <style:style style:name="P97" style:family="paragraph" style:parent-style-name="Standard">
      <style:text-properties officeooo:rsid="00da18c4" officeooo:paragraph-rsid="00da18c4"/>
    </style:style>
    <style:style style:name="P98" style:family="paragraph" style:parent-style-name="Standard">
      <style:text-properties officeooo:rsid="00dcdc79" officeooo:paragraph-rsid="00dcdc79"/>
    </style:style>
    <style:style style:name="P99" style:family="paragraph" style:parent-style-name="Standard">
      <style:text-properties officeooo:rsid="00dd8227" officeooo:paragraph-rsid="00dd8227"/>
    </style:style>
    <style:style style:name="P100" style:family="paragraph" style:parent-style-name="Standard">
      <style:text-properties officeooo:rsid="00de262f" officeooo:paragraph-rsid="00de262f"/>
    </style:style>
    <style:style style:name="P101" style:family="paragraph" style:parent-style-name="Standard">
      <style:text-properties officeooo:rsid="00e262b4" officeooo:paragraph-rsid="00e262b4"/>
    </style:style>
    <style:style style:name="P102" style:family="paragraph" style:parent-style-name="Standard">
      <style:text-properties officeooo:rsid="00e3a357" officeooo:paragraph-rsid="00e3a357"/>
    </style:style>
    <style:style style:name="P103" style:family="paragraph" style:parent-style-name="Standard">
      <style:text-properties officeooo:rsid="00e5aa5f" officeooo:paragraph-rsid="00e5aa5f"/>
    </style:style>
    <style:style style:name="P104" style:family="paragraph" style:parent-style-name="Standard">
      <style:text-properties officeooo:rsid="00e7704c" officeooo:paragraph-rsid="00e7704c"/>
    </style:style>
    <style:style style:name="P105" style:family="paragraph" style:parent-style-name="Standard">
      <style:text-properties officeooo:rsid="00e77647" officeooo:paragraph-rsid="00e77647"/>
    </style:style>
    <style:style style:name="P106" style:family="paragraph" style:parent-style-name="Standard">
      <style:text-properties officeooo:rsid="00e82dcb" officeooo:paragraph-rsid="00e82dcb"/>
    </style:style>
    <style:style style:name="P107" style:family="paragraph" style:parent-style-name="Standard">
      <style:text-properties officeooo:rsid="00e8a933" officeooo:paragraph-rsid="00e8a933"/>
    </style:style>
    <style:style style:name="P108" style:family="paragraph" style:parent-style-name="Standard">
      <style:text-properties officeooo:rsid="00e9f4e4" officeooo:paragraph-rsid="00e9f4e4"/>
    </style:style>
    <style:style style:name="P109" style:family="paragraph" style:parent-style-name="Standard">
      <style:text-properties officeooo:rsid="00eaf60e" officeooo:paragraph-rsid="00eaf60e"/>
    </style:style>
    <style:style style:name="P110" style:family="paragraph" style:parent-style-name="Standard">
      <style:text-properties officeooo:rsid="00eed90f" officeooo:paragraph-rsid="00eed90f"/>
    </style:style>
    <style:style style:name="P111" style:family="paragraph" style:parent-style-name="Standard">
      <style:text-properties officeooo:rsid="00f28b30" officeooo:paragraph-rsid="00f28b30"/>
    </style:style>
    <style:style style:name="P112" style:family="paragraph" style:parent-style-name="Standard">
      <style:text-properties officeooo:rsid="00f33756" officeooo:paragraph-rsid="00f33756"/>
    </style:style>
    <style:style style:name="P113" style:family="paragraph" style:parent-style-name="Standard">
      <style:text-properties officeooo:rsid="00f3a740" officeooo:paragraph-rsid="00f3a740"/>
    </style:style>
    <style:style style:name="P114" style:family="paragraph" style:parent-style-name="Standard">
      <style:text-properties officeooo:rsid="00f737f2" officeooo:paragraph-rsid="00f737f2"/>
    </style:style>
    <style:style style:name="P115" style:family="paragraph" style:parent-style-name="Standard">
      <style:text-properties officeooo:rsid="00f89fde" officeooo:paragraph-rsid="00f89fde"/>
    </style:style>
    <style:style style:name="P116" style:family="paragraph" style:parent-style-name="Standard">
      <style:text-properties officeooo:rsid="00fa0a87" officeooo:paragraph-rsid="00fa0a87"/>
    </style:style>
    <style:style style:name="P117" style:family="paragraph" style:parent-style-name="Standard">
      <style:text-properties officeooo:rsid="00fb5330" officeooo:paragraph-rsid="00fb5330"/>
    </style:style>
    <style:style style:name="P118" style:family="paragraph" style:parent-style-name="Standard">
      <style:text-properties officeooo:rsid="00fb92ba" officeooo:paragraph-rsid="00fb92ba"/>
    </style:style>
    <style:style style:name="P119" style:family="paragraph" style:parent-style-name="Standard">
      <style:text-properties officeooo:rsid="00fc0a36" officeooo:paragraph-rsid="0100d260"/>
    </style:style>
    <style:style style:name="P120" style:family="paragraph" style:parent-style-name="Standard">
      <style:text-properties officeooo:rsid="01030a59" officeooo:paragraph-rsid="01030a59"/>
    </style:style>
    <style:style style:name="P121" style:family="paragraph" style:parent-style-name="Standard">
      <style:text-properties officeooo:rsid="0104f749" officeooo:paragraph-rsid="0104f749"/>
    </style:style>
    <style:style style:name="P122" style:family="paragraph" style:parent-style-name="Standard">
      <style:text-properties officeooo:rsid="01089237" officeooo:paragraph-rsid="01089237"/>
    </style:style>
    <style:style style:name="P123" style:family="paragraph" style:parent-style-name="Standard">
      <style:text-properties officeooo:rsid="010b3acd" officeooo:paragraph-rsid="010b3acd"/>
    </style:style>
    <style:style style:name="P124" style:family="paragraph" style:parent-style-name="Standard">
      <style:text-properties officeooo:rsid="010d4999" officeooo:paragraph-rsid="010d4999"/>
    </style:style>
    <style:style style:name="P125" style:family="paragraph" style:parent-style-name="Standard">
      <style:text-properties officeooo:rsid="010d13ed" officeooo:paragraph-rsid="0113f41b"/>
    </style:style>
    <style:style style:name="P126" style:family="paragraph" style:parent-style-name="Standard">
      <style:text-properties officeooo:rsid="01121ac2" officeooo:paragraph-rsid="0113f41b"/>
    </style:style>
    <style:style style:name="P127" style:family="paragraph" style:parent-style-name="Standard">
      <style:text-properties officeooo:rsid="0113f41b" officeooo:paragraph-rsid="0113f41b"/>
    </style:style>
    <style:style style:name="P128" style:family="paragraph" style:parent-style-name="Standard">
      <style:text-properties officeooo:rsid="01159966" officeooo:paragraph-rsid="0113f41b"/>
    </style:style>
    <style:style style:name="P129" style:family="paragraph" style:parent-style-name="Standard">
      <style:text-properties officeooo:rsid="01159966" officeooo:paragraph-rsid="01159966"/>
    </style:style>
    <style:style style:name="P130" style:family="paragraph" style:parent-style-name="Standard">
      <style:text-properties officeooo:rsid="01168504" officeooo:paragraph-rsid="01168504"/>
    </style:style>
    <style:style style:name="P131" style:family="paragraph" style:parent-style-name="Standard">
      <style:text-properties officeooo:rsid="01184ea7" officeooo:paragraph-rsid="01184ea7"/>
    </style:style>
    <style:style style:name="P132" style:family="paragraph" style:parent-style-name="Standard">
      <style:text-properties officeooo:rsid="01194cc5" officeooo:paragraph-rsid="01194cc5"/>
    </style:style>
    <style:style style:name="P133" style:family="paragraph" style:parent-style-name="Standard">
      <style:text-properties officeooo:rsid="011cb369" officeooo:paragraph-rsid="011cb369"/>
    </style:style>
    <style:style style:name="P134" style:family="paragraph" style:parent-style-name="Standard">
      <style:text-properties officeooo:rsid="011e6873" officeooo:paragraph-rsid="011e6873"/>
    </style:style>
    <style:style style:name="P135" style:family="paragraph" style:parent-style-name="Standard">
      <style:text-properties officeooo:rsid="01225a4b" officeooo:paragraph-rsid="01225a4b"/>
    </style:style>
    <style:style style:name="P136" style:family="paragraph" style:parent-style-name="Standard">
      <style:text-properties officeooo:rsid="0126ccde" officeooo:paragraph-rsid="0126ccde"/>
    </style:style>
    <style:style style:name="P137" style:family="paragraph" style:parent-style-name="Standard">
      <style:text-properties officeooo:rsid="012949f9" officeooo:paragraph-rsid="012949f9"/>
    </style:style>
    <style:style style:name="P138" style:family="paragraph" style:parent-style-name="Standard">
      <style:text-properties officeooo:rsid="012a3140" officeooo:paragraph-rsid="012a3140"/>
    </style:style>
    <style:style style:name="P139" style:family="paragraph" style:parent-style-name="Standard">
      <style:text-properties officeooo:rsid="012bd9f7" officeooo:paragraph-rsid="012bd9f7"/>
    </style:style>
    <style:style style:name="P140" style:family="paragraph" style:parent-style-name="Standard">
      <style:text-properties officeooo:rsid="012f1b40" officeooo:paragraph-rsid="012f1b40"/>
    </style:style>
    <style:style style:name="P141" style:family="paragraph" style:parent-style-name="Standard">
      <style:text-properties officeooo:rsid="012ebd7d" officeooo:paragraph-rsid="012ebd7d"/>
    </style:style>
    <style:style style:name="P142" style:family="paragraph" style:parent-style-name="Standard">
      <style:text-properties officeooo:rsid="0130eb18" officeooo:paragraph-rsid="0130eb18"/>
    </style:style>
    <style:style style:name="P143" style:family="paragraph" style:parent-style-name="Standard">
      <style:text-properties officeooo:rsid="01313c25" officeooo:paragraph-rsid="01313c25"/>
    </style:style>
    <style:style style:name="P144" style:family="paragraph" style:parent-style-name="Standard">
      <style:text-properties officeooo:rsid="01314a4b" officeooo:paragraph-rsid="01314a4b"/>
    </style:style>
    <style:style style:name="P145" style:family="paragraph" style:parent-style-name="Standard">
      <style:text-properties officeooo:rsid="0132bf3a" officeooo:paragraph-rsid="0132bf3a"/>
    </style:style>
    <style:style style:name="P146" style:family="paragraph" style:parent-style-name="Standard">
      <style:text-properties officeooo:rsid="0135d8da" officeooo:paragraph-rsid="0135d8da"/>
    </style:style>
    <style:style style:name="P147" style:family="paragraph" style:parent-style-name="Standard">
      <style:text-properties officeooo:rsid="0137a575" officeooo:paragraph-rsid="0137a575"/>
    </style:style>
    <style:style style:name="P148" style:family="paragraph" style:parent-style-name="Standard">
      <style:text-properties officeooo:rsid="013b3de3" officeooo:paragraph-rsid="013b3de3"/>
    </style:style>
    <style:style style:name="P149" style:family="paragraph" style:parent-style-name="Standard">
      <style:text-properties officeooo:rsid="0135d8da" officeooo:paragraph-rsid="0140d30e"/>
    </style:style>
    <style:style style:name="P150" style:family="paragraph" style:parent-style-name="Standard">
      <style:text-properties officeooo:rsid="013ed8ab" officeooo:paragraph-rsid="0140d30e"/>
    </style:style>
    <style:style style:name="P151" style:family="paragraph" style:parent-style-name="Standard">
      <style:text-properties officeooo:rsid="0140d30e" officeooo:paragraph-rsid="0140d30e"/>
    </style:style>
    <style:style style:name="P152" style:family="paragraph" style:parent-style-name="Standard">
      <style:text-properties officeooo:rsid="014271fd" officeooo:paragraph-rsid="014271fd"/>
    </style:style>
    <style:style style:name="P153" style:family="paragraph" style:parent-style-name="Standard">
      <style:text-properties officeooo:rsid="0143a284" officeooo:paragraph-rsid="0143a284"/>
    </style:style>
    <style:style style:name="P154" style:family="paragraph" style:parent-style-name="Standard">
      <style:text-properties officeooo:rsid="01452109" officeooo:paragraph-rsid="01452109"/>
    </style:style>
    <style:style style:name="P155" style:family="paragraph" style:parent-style-name="Standard">
      <style:text-properties officeooo:rsid="01467bc0" officeooo:paragraph-rsid="01467bc0"/>
    </style:style>
    <style:style style:name="P156" style:family="paragraph" style:parent-style-name="Standard">
      <style:text-properties officeooo:rsid="01475726" officeooo:paragraph-rsid="01475726"/>
    </style:style>
    <style:style style:name="P157" style:family="paragraph" style:parent-style-name="Standard">
      <style:text-properties officeooo:rsid="01488788" officeooo:paragraph-rsid="01488788"/>
    </style:style>
    <style:style style:name="P158" style:family="paragraph" style:parent-style-name="Standard">
      <style:text-properties officeooo:rsid="01499b00" officeooo:paragraph-rsid="01499b00"/>
    </style:style>
    <style:style style:name="P159" style:family="paragraph" style:parent-style-name="Standard">
      <style:text-properties officeooo:rsid="0150c1bd" officeooo:paragraph-rsid="0150c1bd"/>
    </style:style>
    <style:style style:name="P160" style:family="paragraph" style:parent-style-name="Standard">
      <style:text-properties officeooo:rsid="0153f584" officeooo:paragraph-rsid="0153f584"/>
    </style:style>
    <style:style style:name="P161" style:family="paragraph" style:parent-style-name="Standard">
      <style:text-properties officeooo:rsid="0154c01e" officeooo:paragraph-rsid="0150c1bd"/>
    </style:style>
    <style:style style:name="P162" style:family="paragraph" style:parent-style-name="Standard">
      <style:text-properties officeooo:rsid="0154c01e" officeooo:paragraph-rsid="0154c01e"/>
    </style:style>
    <style:style style:name="P163" style:family="paragraph" style:parent-style-name="Standard">
      <style:text-properties officeooo:rsid="01550280" officeooo:paragraph-rsid="01550280"/>
    </style:style>
    <style:style style:name="P164" style:family="paragraph" style:parent-style-name="Standard">
      <style:text-properties officeooo:rsid="015558f7" officeooo:paragraph-rsid="015558f7"/>
    </style:style>
    <style:style style:name="P165" style:family="paragraph" style:parent-style-name="Standard">
      <style:text-properties officeooo:rsid="0156a50c" officeooo:paragraph-rsid="0156a50c"/>
    </style:style>
    <style:style style:name="P166" style:family="paragraph" style:parent-style-name="Standard">
      <style:text-properties officeooo:rsid="01604e80" officeooo:paragraph-rsid="01604e80"/>
    </style:style>
    <style:style style:name="P167" style:family="paragraph" style:parent-style-name="Standard">
      <style:text-properties officeooo:rsid="016057e7" officeooo:paragraph-rsid="016057e7"/>
    </style:style>
    <style:style style:name="P168" style:family="paragraph" style:parent-style-name="Standard">
      <style:text-properties officeooo:rsid="0162066c" officeooo:paragraph-rsid="0162066c"/>
    </style:style>
    <style:style style:name="P169" style:family="paragraph" style:parent-style-name="Standard">
      <style:text-properties officeooo:rsid="0163ca0f" officeooo:paragraph-rsid="0163ca0f"/>
    </style:style>
    <style:style style:name="P170" style:family="paragraph" style:parent-style-name="Standard">
      <style:text-properties officeooo:rsid="0164052f" officeooo:paragraph-rsid="0164052f"/>
    </style:style>
    <style:style style:name="P171" style:family="paragraph" style:parent-style-name="Standard">
      <style:text-properties officeooo:rsid="01654aa9" officeooo:paragraph-rsid="01654aa9"/>
    </style:style>
    <style:style style:name="P172" style:family="paragraph" style:parent-style-name="Standard">
      <style:text-properties officeooo:rsid="01654aa9" officeooo:paragraph-rsid="0168459f"/>
    </style:style>
    <style:style style:name="P173" style:family="paragraph" style:parent-style-name="Standard">
      <style:text-properties officeooo:rsid="0166b6f6" officeooo:paragraph-rsid="0168459f"/>
    </style:style>
    <style:style style:name="P174" style:family="paragraph" style:parent-style-name="Standard">
      <style:text-properties officeooo:rsid="016b39e6" officeooo:paragraph-rsid="016b39e6"/>
    </style:style>
    <style:style style:name="P175" style:family="paragraph" style:parent-style-name="Standard">
      <style:text-properties officeooo:rsid="016bf1ca" officeooo:paragraph-rsid="016bf1ca"/>
    </style:style>
    <style:style style:name="P176" style:family="paragraph" style:parent-style-name="Standard">
      <style:text-properties officeooo:rsid="016d4335" officeooo:paragraph-rsid="016d4335"/>
    </style:style>
    <style:style style:name="P177" style:family="paragraph" style:parent-style-name="Standard">
      <style:text-properties officeooo:rsid="016ec79c" officeooo:paragraph-rsid="016d4335"/>
    </style:style>
    <style:style style:name="P178" style:family="paragraph" style:parent-style-name="Standard">
      <style:text-properties officeooo:rsid="0170395f" officeooo:paragraph-rsid="0170395f"/>
    </style:style>
    <style:style style:name="P179" style:family="paragraph" style:parent-style-name="Standard">
      <style:text-properties officeooo:rsid="0173b080" officeooo:paragraph-rsid="0173b080"/>
    </style:style>
    <style:style style:name="P180" style:family="paragraph" style:parent-style-name="Standard">
      <style:text-properties officeooo:rsid="0173f4e4" officeooo:paragraph-rsid="0173f4e4"/>
    </style:style>
    <style:style style:name="P181" style:family="paragraph" style:parent-style-name="Standard">
      <style:text-properties officeooo:rsid="01752699" officeooo:paragraph-rsid="01752699"/>
    </style:style>
    <style:style style:name="P182" style:family="paragraph" style:parent-style-name="Standard">
      <style:text-properties officeooo:rsid="0179412b" officeooo:paragraph-rsid="0179412b"/>
    </style:style>
    <style:style style:name="P183" style:family="paragraph" style:parent-style-name="Standard">
      <style:text-properties officeooo:rsid="0183a003" officeooo:paragraph-rsid="0183a003"/>
    </style:style>
    <style:style style:name="P184" style:family="paragraph" style:parent-style-name="Standard">
      <style:text-properties officeooo:rsid="018477ce" officeooo:paragraph-rsid="018477ce"/>
    </style:style>
    <style:style style:name="P185" style:family="paragraph" style:parent-style-name="Standard">
      <style:text-properties officeooo:rsid="018518cc" officeooo:paragraph-rsid="018518cc"/>
    </style:style>
    <style:style style:name="P186" style:family="paragraph" style:parent-style-name="Standard">
      <style:text-properties officeooo:rsid="01878639" officeooo:paragraph-rsid="01878639"/>
    </style:style>
    <style:style style:name="P187" style:family="paragraph" style:parent-style-name="Standard">
      <style:text-properties officeooo:rsid="018bf088" officeooo:paragraph-rsid="018bf088"/>
    </style:style>
    <style:style style:name="P188" style:family="paragraph" style:parent-style-name="Standard">
      <style:text-properties officeooo:rsid="018d7c47" officeooo:paragraph-rsid="018d7c47"/>
    </style:style>
    <style:style style:name="P189" style:family="paragraph" style:parent-style-name="Standard">
      <style:text-properties officeooo:rsid="018d9bc7" officeooo:paragraph-rsid="018d9bc7"/>
    </style:style>
    <style:style style:name="P190" style:family="paragraph" style:parent-style-name="Standard">
      <style:text-properties officeooo:rsid="018f4c29" officeooo:paragraph-rsid="018f4c29"/>
    </style:style>
    <style:style style:name="P191" style:family="paragraph" style:parent-style-name="Standard">
      <style:text-properties officeooo:rsid="01943608" officeooo:paragraph-rsid="01943608"/>
    </style:style>
    <style:style style:name="P192" style:family="paragraph" style:parent-style-name="Standard">
      <style:text-properties officeooo:rsid="0195519a" officeooo:paragraph-rsid="0195519a"/>
    </style:style>
    <style:style style:name="P193" style:family="paragraph" style:parent-style-name="Standard">
      <style:text-properties officeooo:rsid="01957ed6" officeooo:paragraph-rsid="01957ed6"/>
    </style:style>
    <style:style style:name="P194" style:family="paragraph" style:parent-style-name="Standard">
      <style:text-properties officeooo:rsid="0195ee99" officeooo:paragraph-rsid="0195ee99"/>
    </style:style>
    <style:style style:name="P195" style:family="paragraph" style:parent-style-name="Standard">
      <style:text-properties officeooo:rsid="01979a1e" officeooo:paragraph-rsid="01979a1e"/>
    </style:style>
    <style:style style:name="P196" style:family="paragraph" style:parent-style-name="Standard">
      <style:text-properties officeooo:rsid="01994645" officeooo:paragraph-rsid="01994645"/>
    </style:style>
    <style:style style:name="P197" style:family="paragraph" style:parent-style-name="Standard">
      <style:text-properties officeooo:rsid="019ada3f" officeooo:paragraph-rsid="019ada3f"/>
    </style:style>
    <style:style style:name="P198" style:family="paragraph" style:parent-style-name="Standard">
      <style:text-properties officeooo:rsid="019c6c3b" officeooo:paragraph-rsid="019c6c3b"/>
    </style:style>
    <style:style style:name="P199" style:family="paragraph" style:parent-style-name="Standard">
      <style:text-properties officeooo:rsid="019dd6ca" officeooo:paragraph-rsid="019dd6ca"/>
    </style:style>
    <style:style style:name="P200" style:family="paragraph" style:parent-style-name="Standard">
      <style:text-properties officeooo:rsid="019f0c58" officeooo:paragraph-rsid="019dd6ca"/>
    </style:style>
    <style:style style:name="P201" style:family="paragraph" style:parent-style-name="Standard">
      <style:text-properties officeooo:rsid="019f0c58" officeooo:paragraph-rsid="019f0c58"/>
    </style:style>
    <style:style style:name="P202" style:family="paragraph" style:parent-style-name="Standard">
      <style:text-properties fo:font-size="24pt" officeooo:rsid="0084b2cc" officeooo:paragraph-rsid="01a27134" style:font-size-asian="24pt" style:font-size-complex="24pt"/>
    </style:style>
    <style:style style:name="P203" style:family="paragraph" style:parent-style-name="Standard">
      <style:text-properties fo:font-size="24pt" officeooo:rsid="00855eb0" officeooo:paragraph-rsid="01a27134" style:font-size-asian="24pt" style:font-size-complex="24pt"/>
    </style:style>
    <style:style style:name="P204" style:family="paragraph" style:parent-style-name="Standard">
      <style:text-properties fo:font-size="24pt" officeooo:rsid="01a27134" officeooo:paragraph-rsid="01a27134" style:font-size-asian="24pt" style:font-size-complex="24pt"/>
    </style:style>
    <style:style style:name="P205" style:family="paragraph" style:parent-style-name="Standard">
      <style:text-properties fo:font-size="24pt" officeooo:rsid="01a2abef" officeooo:paragraph-rsid="01a2abef" style:font-size-asian="24pt" style:font-size-complex="24pt"/>
    </style:style>
    <style:style style:name="P206" style:family="paragraph" style:parent-style-name="Standard">
      <style:text-properties fo:font-size="24pt" officeooo:rsid="01a4be05" officeooo:paragraph-rsid="01a4be05" style:font-size-asian="24pt" style:font-size-complex="24pt"/>
    </style:style>
    <style:style style:name="P207" style:family="paragraph" style:parent-style-name="Standard">
      <style:text-properties fo:font-size="24pt" officeooo:rsid="01a5f139" officeooo:paragraph-rsid="01a5f139" style:font-size-asian="24pt" style:font-size-complex="24pt"/>
    </style:style>
    <style:style style:name="P208" style:family="paragraph" style:parent-style-name="Standard">
      <style:text-properties fo:font-size="24pt" officeooo:rsid="01a79267" officeooo:paragraph-rsid="01a79267" style:font-size-asian="24pt" style:font-size-complex="24pt"/>
    </style:style>
    <style:style style:name="T1" style:family="text">
      <style:text-properties officeooo:rsid="01928e53"/>
    </style:style>
    <style:style style:name="T2" style:family="text">
      <style:text-properties officeooo:rsid="0034e8c1"/>
    </style:style>
    <style:style style:name="T3" style:family="text">
      <style:text-properties officeooo:rsid="0020009a"/>
    </style:style>
    <style:style style:name="T4" style:family="text">
      <style:text-properties officeooo:rsid="004f8ec9"/>
    </style:style>
    <style:style style:name="T5" style:family="text">
      <style:text-properties officeooo:rsid="002b39b8"/>
    </style:style>
    <style:style style:name="T6" style:family="text">
      <style:text-properties officeooo:rsid="002a35ce"/>
    </style:style>
    <style:style style:name="T7" style:family="text">
      <style:text-properties officeooo:rsid="0024de75"/>
    </style:style>
    <style:style style:name="T8" style:family="text">
      <style:text-properties officeooo:rsid="00223d02"/>
    </style:style>
    <style:style style:name="T9" style:family="text">
      <style:text-properties officeooo:rsid="0026ca15"/>
    </style:style>
    <style:style style:name="T10" style:family="text">
      <style:text-properties officeooo:rsid="002f0142"/>
    </style:style>
    <style:style style:name="T11" style:family="text">
      <style:text-properties officeooo:rsid="0022be3f"/>
    </style:style>
    <style:style style:name="T12" style:family="text">
      <style:text-properties officeooo:rsid="00378b70"/>
    </style:style>
    <style:style style:name="T13" style:family="text">
      <style:text-properties officeooo:rsid="00337c09"/>
    </style:style>
    <style:style style:name="T14" style:family="text">
      <style:text-properties officeooo:rsid="002b799f"/>
    </style:style>
    <style:style style:name="T15" style:family="text">
      <style:text-properties officeooo:rsid="002d7836"/>
    </style:style>
    <style:style style:name="T16" style:family="text">
      <style:text-properties officeooo:rsid="0032f97d"/>
    </style:style>
    <style:style style:name="T17" style:family="text">
      <style:text-properties officeooo:rsid="002e1d03"/>
    </style:style>
    <style:style style:name="T18" style:family="text">
      <style:text-properties officeooo:rsid="00396077"/>
    </style:style>
    <style:style style:name="T19" style:family="text">
      <style:text-properties officeooo:rsid="003c3b30"/>
    </style:style>
    <style:style style:name="T20" style:family="text">
      <style:text-properties officeooo:rsid="003ab830"/>
    </style:style>
    <style:style style:name="T21" style:family="text">
      <style:text-properties officeooo:rsid="003e3a37"/>
    </style:style>
    <style:style style:name="T22" style:family="text">
      <style:text-properties officeooo:rsid="003e6d54"/>
    </style:style>
    <style:style style:name="T23" style:family="text">
      <style:text-properties officeooo:rsid="0048e994"/>
    </style:style>
    <style:style style:name="T24" style:family="text">
      <style:text-properties officeooo:rsid="004048eb"/>
    </style:style>
    <style:style style:name="T25" style:family="text">
      <style:text-properties officeooo:rsid="0040b3ca"/>
    </style:style>
    <style:style style:name="T26" style:family="text">
      <style:text-properties officeooo:rsid="004830c6"/>
    </style:style>
    <style:style style:name="T27" style:family="text">
      <style:text-properties officeooo:rsid="004521c4"/>
    </style:style>
    <style:style style:name="T28" style:family="text">
      <style:text-properties officeooo:rsid="00475f8f"/>
    </style:style>
    <style:style style:name="T29" style:family="text">
      <style:text-properties officeooo:rsid="0047c14b"/>
    </style:style>
    <style:style style:name="T30" style:family="text">
      <style:text-properties officeooo:rsid="0049666c"/>
    </style:style>
    <style:style style:name="T31" style:family="text">
      <style:text-properties officeooo:rsid="0049dc5e"/>
    </style:style>
    <style:style style:name="T32" style:family="text">
      <style:text-properties officeooo:rsid="004cf958"/>
    </style:style>
    <style:style style:name="T33" style:family="text">
      <style:text-properties officeooo:rsid="005011f2"/>
    </style:style>
    <style:style style:name="T34" style:family="text">
      <style:text-properties officeooo:rsid="00518f04"/>
    </style:style>
    <style:style style:name="T35" style:family="text">
      <style:text-properties officeooo:rsid="0056c43a"/>
    </style:style>
    <style:style style:name="T36" style:family="text">
      <style:text-properties officeooo:rsid="005c63d1"/>
    </style:style>
    <style:style style:name="T37" style:family="text">
      <style:text-properties officeooo:rsid="006270f2"/>
    </style:style>
    <style:style style:name="T38" style:family="text">
      <style:text-properties officeooo:rsid="00678e7b"/>
    </style:style>
    <style:style style:name="T39" style:family="text">
      <style:text-properties officeooo:rsid="0060b2b7"/>
    </style:style>
    <style:style style:name="T40" style:family="text">
      <style:text-properties officeooo:rsid="006238b3"/>
    </style:style>
    <style:style style:name="T41" style:family="text">
      <style:text-properties officeooo:rsid="006de5bd"/>
    </style:style>
    <style:style style:name="T42" style:family="text">
      <style:text-properties officeooo:rsid="006524c9"/>
    </style:style>
    <style:style style:name="T43" style:family="text">
      <style:text-properties officeooo:rsid="0067affb"/>
    </style:style>
    <style:style style:name="T44" style:family="text">
      <style:text-properties officeooo:rsid="00652ab5"/>
    </style:style>
    <style:style style:name="T45" style:family="text">
      <style:text-properties officeooo:rsid="00658129"/>
    </style:style>
    <style:style style:name="T46" style:family="text">
      <style:text-properties officeooo:rsid="0068315c"/>
    </style:style>
    <style:style style:name="T47" style:family="text">
      <style:text-properties officeooo:rsid="006b730d"/>
    </style:style>
    <style:style style:name="T48" style:family="text">
      <style:text-properties officeooo:rsid="0069a0c3"/>
    </style:style>
    <style:style style:name="T49" style:family="text">
      <style:text-properties officeooo:rsid="0069e3da"/>
    </style:style>
    <style:style style:name="T50" style:family="text">
      <style:text-properties officeooo:rsid="006f8857"/>
    </style:style>
    <style:style style:name="T51" style:family="text">
      <style:text-properties officeooo:rsid="0071632a"/>
    </style:style>
    <style:style style:name="T52" style:family="text">
      <style:text-properties officeooo:rsid="007c2e5b"/>
    </style:style>
    <style:style style:name="T53" style:family="text">
      <style:text-properties officeooo:rsid="0074d464"/>
    </style:style>
    <style:style style:name="T54" style:family="text">
      <style:text-properties officeooo:rsid="00788c58"/>
    </style:style>
    <style:style style:name="T55" style:family="text">
      <style:text-properties officeooo:rsid="007c0380"/>
    </style:style>
    <style:style style:name="T56" style:family="text">
      <style:text-properties officeooo:rsid="007b7ee5"/>
    </style:style>
    <style:style style:name="T57" style:family="text">
      <style:text-properties officeooo:rsid="007ce91c"/>
    </style:style>
    <style:style style:name="T58" style:family="text">
      <style:text-properties officeooo:rsid="00810cd3"/>
    </style:style>
    <style:style style:name="T59" style:family="text">
      <style:text-properties officeooo:rsid="00862949"/>
    </style:style>
    <style:style style:name="T60" style:family="text">
      <style:text-properties officeooo:rsid="008735fd"/>
    </style:style>
    <style:style style:name="T61" style:family="text">
      <style:text-properties officeooo:rsid="008c5b00"/>
    </style:style>
    <style:style style:name="T62" style:family="text">
      <style:text-properties officeooo:rsid="008e716c"/>
    </style:style>
    <style:style style:name="T63" style:family="text">
      <style:text-properties officeooo:rsid="008f80dc"/>
    </style:style>
    <style:style style:name="T64" style:family="text">
      <style:text-properties officeooo:rsid="00949d5f"/>
    </style:style>
    <style:style style:name="T65" style:family="text">
      <style:text-properties officeooo:rsid="0099db64"/>
    </style:style>
    <style:style style:name="T66" style:family="text">
      <style:text-properties officeooo:rsid="0095f6fa"/>
    </style:style>
    <style:style style:name="T67" style:family="text">
      <style:text-properties officeooo:rsid="009acfeb"/>
    </style:style>
    <style:style style:name="T68" style:family="text">
      <style:text-properties officeooo:rsid="009c7ac4"/>
    </style:style>
    <style:style style:name="T69" style:family="text">
      <style:text-properties officeooo:rsid="009e7a2a"/>
    </style:style>
    <style:style style:name="T70" style:family="text">
      <style:text-properties officeooo:rsid="009f84a5"/>
    </style:style>
    <style:style style:name="T71" style:family="text">
      <style:text-properties officeooo:rsid="00a1d7b1"/>
    </style:style>
    <style:style style:name="T72" style:family="text">
      <style:text-properties officeooo:rsid="00a3dade"/>
    </style:style>
    <style:style style:name="T73" style:family="text">
      <style:text-properties officeooo:rsid="00a80e08"/>
    </style:style>
    <style:style style:name="T74" style:family="text">
      <style:text-properties officeooo:rsid="00a94b37"/>
    </style:style>
    <style:style style:name="T75" style:family="text">
      <style:text-properties officeooo:rsid="00ad11b7"/>
    </style:style>
    <style:style style:name="T76" style:family="text">
      <style:text-properties officeooo:rsid="00adf69e"/>
    </style:style>
    <style:style style:name="T77" style:family="text">
      <style:text-properties officeooo:rsid="00b0ca4e"/>
    </style:style>
    <style:style style:name="T78" style:family="text">
      <style:text-properties officeooo:rsid="00b0ebab"/>
    </style:style>
    <style:style style:name="T79" style:family="text">
      <style:text-properties officeooo:rsid="00b197a2"/>
    </style:style>
    <style:style style:name="T80" style:family="text">
      <style:text-properties officeooo:rsid="00b2c734"/>
    </style:style>
    <style:style style:name="T81" style:family="text">
      <style:text-properties officeooo:rsid="00b89534"/>
    </style:style>
    <style:style style:name="T82" style:family="text">
      <style:text-properties officeooo:rsid="00bc179c"/>
    </style:style>
    <style:style style:name="T83" style:family="text">
      <style:text-properties officeooo:rsid="00be9502"/>
    </style:style>
    <style:style style:name="T84" style:family="text">
      <style:text-properties officeooo:rsid="00cae8b8"/>
    </style:style>
    <style:style style:name="T85" style:family="text">
      <style:text-properties officeooo:rsid="00cb2875"/>
    </style:style>
    <style:style style:name="T86" style:family="text">
      <style:text-properties officeooo:rsid="00ccfe67"/>
    </style:style>
    <style:style style:name="T87" style:family="text">
      <style:text-properties officeooo:rsid="00cef8c3"/>
    </style:style>
    <style:style style:name="T88" style:family="text">
      <style:text-properties officeooo:rsid="00d17506"/>
    </style:style>
    <style:style style:name="T89" style:family="text">
      <style:text-properties officeooo:rsid="00d565af"/>
    </style:style>
    <style:style style:name="T90" style:family="text">
      <style:text-properties officeooo:rsid="00d75918"/>
    </style:style>
    <style:style style:name="T91" style:family="text">
      <style:text-properties officeooo:rsid="00d7b151"/>
    </style:style>
    <style:style style:name="T92" style:family="text">
      <style:text-properties officeooo:rsid="00d8940d"/>
    </style:style>
    <style:style style:name="T93" style:family="text">
      <style:text-properties officeooo:rsid="00d94b7d"/>
    </style:style>
    <style:style style:name="T94" style:family="text">
      <style:text-properties officeooo:rsid="00dd8227"/>
    </style:style>
    <style:style style:name="T95" style:family="text">
      <style:text-properties officeooo:rsid="00dfc6e4"/>
    </style:style>
    <style:style style:name="T96" style:family="text">
      <style:text-properties officeooo:rsid="00e197c3"/>
    </style:style>
    <style:style style:name="T97" style:family="text">
      <style:text-properties officeooo:rsid="00e1f316"/>
    </style:style>
    <style:style style:name="T98" style:family="text">
      <style:text-properties officeooo:rsid="00e82dcb"/>
    </style:style>
    <style:style style:name="T99" style:family="text">
      <style:text-properties officeooo:rsid="00e8a933"/>
    </style:style>
    <style:style style:name="T100" style:family="text">
      <style:text-properties officeooo:rsid="00ecf277"/>
    </style:style>
    <style:style style:name="T101" style:family="text">
      <style:text-properties officeooo:rsid="00eed90f"/>
    </style:style>
    <style:style style:name="T102" style:family="text">
      <style:text-properties officeooo:rsid="00ef37a8"/>
    </style:style>
    <style:style style:name="T103" style:family="text">
      <style:text-properties officeooo:rsid="00f11dfe"/>
    </style:style>
    <style:style style:name="T104" style:family="text">
      <style:text-properties officeooo:rsid="00f59b6b"/>
    </style:style>
    <style:style style:name="T105" style:family="text">
      <style:text-properties officeooo:rsid="00f89fde"/>
    </style:style>
    <style:style style:name="T106" style:family="text">
      <style:text-properties officeooo:rsid="0100cc4c"/>
    </style:style>
    <style:style style:name="T107" style:family="text">
      <style:text-properties officeooo:rsid="00ff882b"/>
    </style:style>
    <style:style style:name="T108" style:family="text">
      <style:text-properties officeooo:rsid="00fde7be"/>
    </style:style>
    <style:style style:name="T109" style:family="text">
      <style:text-properties officeooo:rsid="00fc6c9c"/>
    </style:style>
    <style:style style:name="T110" style:family="text">
      <style:text-properties officeooo:rsid="0100d260"/>
    </style:style>
    <style:style style:name="T111" style:family="text">
      <style:text-properties officeooo:rsid="010535b5"/>
    </style:style>
    <style:style style:name="T112" style:family="text">
      <style:text-properties officeooo:rsid="010ac5ff"/>
    </style:style>
    <style:style style:name="T113" style:family="text">
      <style:text-properties officeooo:rsid="0109bd50"/>
    </style:style>
    <style:style style:name="T114" style:family="text">
      <style:text-properties officeooo:rsid="010d4999"/>
    </style:style>
    <style:style style:name="T115" style:family="text">
      <style:text-properties officeooo:rsid="010d13ed"/>
    </style:style>
    <style:style style:name="T116" style:family="text">
      <style:text-properties officeooo:rsid="010ed25b"/>
    </style:style>
    <style:style style:name="T117" style:family="text">
      <style:text-properties officeooo:rsid="01103639"/>
    </style:style>
    <style:style style:name="T118" style:family="text">
      <style:text-properties officeooo:rsid="01121ac2"/>
    </style:style>
    <style:style style:name="T119" style:family="text">
      <style:text-properties officeooo:rsid="0113f41b"/>
    </style:style>
    <style:style style:name="T120" style:family="text">
      <style:text-properties officeooo:rsid="012008e2"/>
    </style:style>
    <style:style style:name="T121" style:family="text">
      <style:text-properties officeooo:rsid="01184ea7"/>
    </style:style>
    <style:style style:name="T122" style:family="text">
      <style:text-properties officeooo:rsid="01194cc5"/>
    </style:style>
    <style:style style:name="T123" style:family="text">
      <style:text-properties officeooo:rsid="011cb369"/>
    </style:style>
    <style:style style:name="T124" style:family="text">
      <style:text-properties officeooo:rsid="011daa36"/>
    </style:style>
    <style:style style:name="T125" style:family="text">
      <style:text-properties officeooo:rsid="01257006"/>
    </style:style>
    <style:style style:name="T126" style:family="text">
      <style:text-properties officeooo:rsid="012635f8"/>
    </style:style>
    <style:style style:name="T127" style:family="text">
      <style:text-properties officeooo:rsid="0126ccde"/>
    </style:style>
    <style:style style:name="T128" style:family="text">
      <style:text-properties officeooo:rsid="012949f9"/>
    </style:style>
    <style:style style:name="T129" style:family="text">
      <style:text-properties officeooo:rsid="01289592"/>
    </style:style>
    <style:style style:name="T130" style:family="text">
      <style:text-properties officeooo:rsid="012a3140"/>
    </style:style>
    <style:style style:name="T131" style:family="text">
      <style:text-properties officeooo:rsid="012be238"/>
    </style:style>
    <style:style style:name="T132" style:family="text">
      <style:text-properties officeooo:rsid="012cc555"/>
    </style:style>
    <style:style style:name="T133" style:family="text">
      <style:text-properties officeooo:rsid="01313c25"/>
    </style:style>
    <style:style style:name="T134" style:family="text">
      <style:text-properties officeooo:rsid="0135d8da"/>
    </style:style>
    <style:style style:name="T135" style:family="text">
      <style:text-properties officeooo:rsid="0137a575"/>
    </style:style>
    <style:style style:name="T136" style:family="text">
      <style:text-properties officeooo:rsid="013983b6"/>
    </style:style>
    <style:style style:name="T137" style:family="text">
      <style:text-properties officeooo:rsid="013b3de3"/>
    </style:style>
    <style:style style:name="T138" style:family="text">
      <style:text-properties officeooo:rsid="013cc9cb"/>
    </style:style>
    <style:style style:name="T139" style:family="text">
      <style:text-properties officeooo:rsid="013ed8ab"/>
    </style:style>
    <style:style style:name="T140" style:family="text">
      <style:text-properties officeooo:rsid="0140d30e"/>
    </style:style>
    <style:style style:name="T141" style:family="text">
      <style:text-properties officeooo:rsid="014271fd"/>
    </style:style>
    <style:style style:name="T142" style:family="text">
      <style:text-properties officeooo:rsid="0143a284"/>
    </style:style>
    <style:style style:name="T143" style:family="text">
      <style:text-properties officeooo:rsid="01452109"/>
    </style:style>
    <style:style style:name="T144" style:family="text">
      <style:text-properties officeooo:rsid="015558f7"/>
    </style:style>
    <style:style style:name="T145" style:family="text">
      <style:text-properties officeooo:rsid="0156a50c"/>
    </style:style>
    <style:style style:name="T146" style:family="text">
      <style:text-properties officeooo:rsid="01574e3a"/>
    </style:style>
    <style:style style:name="T147" style:family="text">
      <style:text-properties officeooo:rsid="0158ccc2"/>
    </style:style>
    <style:style style:name="T148" style:family="text">
      <style:text-properties officeooo:rsid="015f7fb7"/>
    </style:style>
    <style:style style:name="T149" style:family="text">
      <style:text-properties officeooo:rsid="015d5199"/>
    </style:style>
    <style:style style:name="T150" style:family="text">
      <style:text-properties officeooo:rsid="01595d59"/>
    </style:style>
    <style:style style:name="T151" style:family="text">
      <style:text-properties officeooo:rsid="01596e91"/>
    </style:style>
    <style:style style:name="T152" style:family="text">
      <style:text-properties officeooo:rsid="015e7b3f"/>
    </style:style>
    <style:style style:name="T153" style:family="text">
      <style:text-properties officeooo:rsid="0166b6f6"/>
    </style:style>
    <style:style style:name="T154" style:family="text">
      <style:text-properties officeooo:rsid="0168459f"/>
    </style:style>
    <style:style style:name="T155" style:family="text">
      <style:text-properties officeooo:rsid="01693d56"/>
    </style:style>
    <style:style style:name="T156" style:family="text">
      <style:text-properties officeooo:rsid="016b39e6"/>
    </style:style>
    <style:style style:name="T157" style:family="text">
      <style:text-properties officeooo:rsid="016bf1ca"/>
    </style:style>
    <style:style style:name="T158" style:family="text">
      <style:text-properties officeooo:rsid="0171ecc2"/>
    </style:style>
    <style:style style:name="T159" style:family="text">
      <style:text-properties officeooo:rsid="0173b080"/>
    </style:style>
    <style:style style:name="T160" style:family="text">
      <style:text-properties officeooo:rsid="0173f4e4"/>
    </style:style>
    <style:style style:name="T161" style:family="text">
      <style:text-properties officeooo:rsid="01755051"/>
    </style:style>
    <style:style style:name="T162" style:family="text">
      <style:text-properties officeooo:rsid="017714dc"/>
    </style:style>
    <style:style style:name="T163" style:family="text">
      <style:text-properties officeooo:rsid="01774d17"/>
    </style:style>
    <style:style style:name="T164" style:family="text">
      <style:text-properties officeooo:rsid="0179412b"/>
    </style:style>
    <style:style style:name="T165" style:family="text">
      <style:text-properties officeooo:rsid="0178c2d2"/>
    </style:style>
    <style:style style:name="T166" style:family="text">
      <style:text-properties officeooo:rsid="017b3d3b"/>
    </style:style>
    <style:style style:name="T167" style:family="text">
      <style:text-properties officeooo:rsid="017dc100"/>
    </style:style>
    <style:style style:name="T168" style:family="text">
      <style:text-properties officeooo:rsid="017fe7ab"/>
    </style:style>
    <style:style style:name="T169" style:family="text">
      <style:text-properties officeooo:rsid="017e20cc"/>
    </style:style>
    <style:style style:name="T170" style:family="text">
      <style:text-properties officeooo:rsid="0180cf7f"/>
    </style:style>
    <style:style style:name="T171" style:family="text">
      <style:text-properties officeooo:rsid="01814e63"/>
    </style:style>
    <style:style style:name="T172" style:family="text">
      <style:text-properties officeooo:rsid="01823193"/>
    </style:style>
    <style:style style:name="T173" style:family="text">
      <style:text-properties officeooo:rsid="0182df36"/>
    </style:style>
    <style:style style:name="T174" style:family="text">
      <style:text-properties officeooo:rsid="018518cc"/>
    </style:style>
    <style:style style:name="T175" style:family="text">
      <style:text-properties officeooo:rsid="018a07b1"/>
    </style:style>
    <style:style style:name="T176" style:family="text">
      <style:text-properties officeooo:rsid="018bf088"/>
    </style:style>
    <style:style style:name="T177" style:family="text">
      <style:text-properties officeooo:rsid="018bf1a3"/>
    </style:style>
    <style:style style:name="T178" style:family="text">
      <style:text-properties officeooo:rsid="018d7c47"/>
    </style:style>
    <style:style style:name="T179" style:family="text">
      <style:text-properties officeooo:rsid="018d9bc7"/>
    </style:style>
    <style:style style:name="T180" style:family="text">
      <style:text-properties officeooo:rsid="01957ed6"/>
    </style:style>
    <style:style style:name="T181" style:family="text">
      <style:text-properties officeooo:rsid="0195ee99"/>
    </style:style>
    <style:style style:name="T182" style:family="text">
      <style:text-properties officeooo:rsid="019863ac"/>
    </style:style>
    <style:style style:name="T183" style:family="text">
      <style:text-properties officeooo:rsid="019ada3f"/>
    </style:style>
    <style:style style:name="T184" style:family="text">
      <style:text-properties officeooo:rsid="019c6c3b"/>
    </style:style>
    <style:style style:name="T185" style:family="text">
      <style:text-properties officeooo:rsid="019dd6ca"/>
    </style:style>
    <style:style style:name="T186" style:family="text">
      <style:text-properties officeooo:rsid="019f0c58"/>
    </style:style>
    <style:style style:name="T187" style:family="text">
      <style:text-properties officeooo:rsid="00875a72"/>
    </style:style>
    <style:style style:name="T188" style:family="text">
      <style:text-properties officeooo:rsid="008a196c"/>
    </style:style>
    <style:style style:name="T189" style:family="text">
      <style:text-properties officeooo:rsid="01a27134"/>
    </style:style>
    <style:style style:name="T190" style:family="text">
      <style:text-properties officeooo:rsid="01a2abef"/>
    </style:style>
    <style:style style:name="T191" style:family="text">
      <style:text-properties officeooo:rsid="01a4215a"/>
    </style:style>
    <style:style style:name="T192" style:family="text">
      <style:text-properties officeooo:rsid="01a5f13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 text:c="2"/></text:p>
      <text:p text:style-name="P1">Para obtener lo que vemos en una <text:span text:style-name="T1">p</text:span>c o portatil <text:s/>se e<text:span text:style-name="T2">n</text:span>ciede primero la maquina pricipal esta ge<text:span text:style-name="T2">n</text:span>era electricidad</text:p>
      <text:p text:style-name="P1"/>
      <text:p text:style-name="P1">la onda de electr<text:span text:style-name="T2">cic</text:span>idad eb un pc se interpreta <text:s/>como pulso altos o baj<text:span text:style-name="T2">o</text:span>s estos se llaman bits</text:p>
      <text:p text:style-name="P2">esta señal va la bis para ejecutar el posrt</text:p>
      <text:p text:style-name="P2">en el disco duro <text:s/>esta las istrucciones para ejecitar el hardware de<text:span text:style-name="T2">n</text:span>tro del software</text:p>
      <text:p text:style-name="P1"/>
      <text:p text:style-name="P2">chip: es es software </text:p>
      <text:p text:style-name="P2">los 0 y <text:s/>la entienden la cpu como intel core entre ot<text:span text:style-name="T3">tros esta evia los datos al ram donee se arma la estructura deñ sistema operativo</text:span></text:p>
      <text:p text:style-name="P3">el corazon del sistema es <text:s/>el kernel quien traduce entre hardware y software traduciendo las acciones del usiario de la cpmputadors al mundo real <text:s/>el kernel arraca los sistema de seguridad del sistema operativo desifrando datos de usuarios</text:p>
      <text:p text:style-name="P4">post es <text:s/>una prueba</text:p>
      <text:p text:style-name="P4"><text:s/>para verificar que tod<text:span text:style-name="T3">os</text:span> hardware funcione correctamente en la pc</text:p>
      <text:p text:style-name="P4"/>
      <text:p text:style-name="P3">las pantallas son <text:s/>conjuntos de puntos de luz <text:s/>de un color unico</text:p>
      <text:p text:style-name="P3"/>
      <text:p text:style-name="P3">creas el usuario y contraseña o ingrsas con eso l pulso elctrico a ña cpu y esta da la ordn al disco duro <text:s/>donde se pondra la accion parta que el kernel acceda a l<text:span text:style-name="T4">o</text:span>s datos de ese usuario</text:p>
      <text:p text:style-name="P3"/>
      <text:p text:style-name="P5">esto ha sido si durante mas de 50 años asi como tambien <text:span text:style-name="T4">p</text:span>ara los <text:span text:style-name="T4">t</text:span>elevisores de hoy o relojes digitales</text:p>
      <text:p text:style-name="P5"/>
      <text:p text:style-name="P5">todas estas baes son vitales para desarrollar software</text:p>
      <text:p text:style-name="P5"/>
      <text:p text:style-name="P5">los circutos constituyen la base de tpda la tecnología funcionan controlando el flujo eléctrico</text:p>
      <text:p text:style-name="P5"/>
      <text:p text:style-name="P5">polo negatovo se conoce como a tierra</text:p>
      <text:p text:style-name="P5"/>
      <text:p text:style-name="P5">amparake define la cantidad de eergia que pasa <text:s/>entre mas alto el numero mas <text:s/>rapido carga <text:s/>la <text:s/>bateria</text:p>
      <text:p text:style-name="P5"/>
      <text:p text:style-name="P5">voltaje hace fluir la corriente</text:p>
      <text:p text:style-name="P6">la resisencia contrlla el flujo de energoa <text:s/>evitando el sobrecalentmiento oliberandolo como calor</text:p>
      <text:p text:style-name="P6"/>
      <text:p text:style-name="P6">los ohimos <text:span text:style-name="T5">u</text:span>nidad de medida de oposicion al pado de crriente</text:p>
      <text:p text:style-name="P6">dependien do de la resistencua puedes crear un motor electrico</text:p>
      <text:p text:style-name="P6">oh las pie<text:span text:style-name="T6">z</text:span>as movies de un brazos electrico.</text:p>
      <text:p text:style-name="P6">La electricodad</text:p>
      <text:p text:style-name="P6"><text:s/>se v<text:span text:style-name="T7">ue</text:span>elve audio c<text:span text:style-name="T7">uand</text:span>o haces vibrar una me<text:span text:style-name="T7">m</text:span>brana a ritmo de una onda electrica.<text:span text:style-name="T8">combinar los componwntes pue</text:span><text:span text:style-name="T9">d</text:span><text:span text:style-name="T8">es crear lo que quieras</text:span></text:p>
      <text:p text:style-name="P7">para encender cientas artes se necesita un transistor el cual on interumptores automaticos <text:span text:style-name="T10">q</text:span>ue mediante <text:s/>señales eletricas decodn cuando encende<text:span text:style-name="T10">r</text:span> y apagar u<text:span text:style-name="T10">n </text:span><text:s/><text:span text:style-name="T10">c</text:span>omnente a part<text:span text:style-name="T10">i</text:span>r de ciertas condiciones la combinacion de mil<text:span text:style-name="T10">l</text:span>on<text:span text:style-name="T10">e</text:span>s de transistores le da la capacidad a los procesadores la ca<text:span text:style-name="T11">p</text:span>acidad de operaciones matiemat<text:span text:style-name="T9">i</text:span>cas <text:span text:style-name="T9">u</text:span>n condensad<text:span text:style-name="T9">or</text:span> permite almacenar <text:s/>mediante electricidad estas <text:span text:style-name="T11">o</text:span>peraciomes y de millones de estos esta compuesta la memoria ram </text:p>
      <text:p text:style-name="P7"><text:soft-page-break/>para guardar persistetemente esto uando otr<text:span text:style-name="T6">o</text:span>s componwnts llamado discos duris una usb es un discp duro </text:p>
      <text:p text:style-name="P7">tamboen existe un disco duro de estado solido los condensadpres tran<text:span text:style-name="T12">s</text:span>forman en byts la energoa eléctrica <text:span text:style-name="T11">esos 0 y 1 son organizados en instrucciones especoficas a las que llaamos </text:span><text:span text:style-name="T5">s</text:span><text:span text:style-name="T11">oftware este viaja al procesador atra es del circuito <text:s/></text:span></text:p>
      <text:p text:style-name="P8">los its se consideran bytes</text:p>
      <text:p text:style-name="P6"/>
      <text:p text:style-name="P9">la luz es una onda <text:span text:style-name="T13">de tipo radio</text:span> que fluye de arriba a abajo <text:span text:style-name="T14">depejdiendo de la lo</text:span><text:span text:style-name="T15">ng</text:span><text:span text:style-name="T14">itud se podra ver oh no la luz, </text:span><text:span text:style-name="T16">esto tambien la usan </text:span><text:span text:style-name="T13">telefonos bluetooth <text:s/>wifi <text:s/>y la señal del televisot aunque esyas son invisibles a nuestros ojos; se puede transmitir <text:s/>soempre y cindo el emisor s</text:span><text:span text:style-name="T12">i</text:span><text:span text:style-name="T13">ga bintacto</text:span></text:p>
      <text:p text:style-name="P9"><text:span text:style-name="T14"><text:s/></text:span><text:span text:style-name="T17">cpu y memoria ram</text:span></text:p>
      <text:p text:style-name="P10"/>
      <text:p text:style-name="P10"/>
      <text:p text:style-name="P11">ñ signo de arroba e la tabla de askit seria el 64</text:p>
      <text:p text:style-name="P11"/>
      <text:p text:style-name="P11"/>
      <text:p text:style-name="P12">binarios es posble represen</text:p>
      <text:p text:style-name="P12">mediante 01 puedes rev¿presentar <text:s/>cada numero grande</text:p>
      <text:p text:style-name="P12">si es 0 el numero suma si no es 0 el numero suma osea duma los valores de la caja todos los valores disponibles <text:s/><text:span text:style-name="T18">esos grupos de 8 digitos entre 0 y 1 es un byte</text:span></text:p>
      <text:p text:style-name="P12"/>
      <text:p text:style-name="P13">los procesadores hacen esos calculos al mismo tiempo <text:s/>con 8 <text:s/>cables</text:p>
      <text:p text:style-name="P13"/>
      <text:p text:style-name="P13">en la urss usaban 12 <text:s/>a 48 bites</text:p>
      <text:p text:style-name="P13"/>
      <text:p text:style-name="P13">192.168.1.1 una doreccion ip conbinaciones de 4 bytes ue identofocan una computadora en una red cada numero separado s un byte no sprepasa el 25</text:p>
      <text:p text:style-name="P13">los bytes <text:s/>tamboen son los emojis ofh fotos <text:s/>e imagenes que estas estan acmodidadeas en una ciadricula los bytes deyermibanbel color que va a tener <text:s/>cada pixel</text:p>
      <text:p text:style-name="P13">un emoji en una tabla axcii o tambien utf llamado hoy en dia ahi desde u<text:span text:style-name="T19">n</text:span> 8 hasta 32buts;</text:p>
      <text:p text:style-name="P13">el organismo encargado <text:s/><text:span text:style-name="T20">a regular las equivalaencias entre los numeros de b</text:span><text:span text:style-name="T21">y</text:span><text:span text:style-name="T20">tes y letras y suibolos se llama <text:s/>unicide <text:s/>consortium todos los debe respoetar, cuando se programa en un lenvuaje d programacion todas esas instrucciones <text:s text:c="2"/>se traducen a bytes de assembler <text:s text:c="2"/>que el procespdor interpreta para ekcutar las instruccionesy por eo es que un byte es un 0 o <text:s/>y 1 y un bute son 8 bytes.</text:span></text:p>
      <text:p text:style-name="P13"/>
      <text:p text:style-name="P14">Un dispositvo que tiene sftware se puede programar y si se pueden programar tiene una cpu</text:p>
      <text:p text:style-name="P14"/>
      <text:p text:style-name="P15">la cpu esta en todas partes dnde haya una pantallla programable es un cpu unidades centrañes de procesamiento</text:p>
      <text:p text:style-name="P15"/>
      <text:p text:style-name="P15">y donde se almacena es la ram</text:p>
      <text:p text:style-name="P15">ahi varias mrcas de cpu desde apple hasta intel entre otras</text:p>
      <text:p text:style-name="P15"/>
      <text:p text:style-name="P15">la cpu <text:span text:style-name="T21">por dentro son transistores q</text:span><text:span text:style-name="T22">u</text:span><text:span text:style-name="T21">e ejecutan operaciones matemáticas </text:span><text:span text:style-name="T22">estas operaciones ocurren en ciclos osa el paso de la electriodad por la cpu <text:s/>esos ciclos e llama hertz es la velociad por la cual se mide <text:s/>un proceador psea los ciclos por segundo que pueden usar la <text:s/>cpu para ejectar esas peraciones</text:span></text:p>
      <text:p text:style-name="P16"><text:soft-page-break/>eje plo si una cpu tiene un megahertz de velocidad esos sign<text:span text:style-name="T23">i</text:span>f<text:span text:style-name="T23">i</text:span>ca que p<text:span text:style-name="T23">ue</text:span>de ejec<text:span text:style-name="T23">u</text:span>t<text:span text:style-name="T23">a</text:span>r el millon de ciclos por segundo</text:p>
      <text:p text:style-name="P16">un giga signofica mil mellones</text:p>
      <text:p text:style-name="P16">la m 1 millon</text:p>
      <text:p text:style-name="P16">so dice tales numeros de gigahertz sign<text:span text:style-name="T23">i</text:span>f<text:span text:style-name="T23">i</text:span>ca que puede ejectar ese numero contado lo entre <text:s/>los miles de millones esto por segundps a mas corrienteqie ermite el procesador mas calor provocando que l chip se queme.</text:p>
      <text:p text:style-name="P16">Por lo tanto encima de ese chip se pone u <text:s/>vetiladpr</text:p>
      <text:p text:style-name="P16">los limites termicos del <text:span text:style-name="T24">c</text:span>hip determina los limites de veloci<text:span text:style-name="T25">d</text:span>ad del procesdor</text:p>
      <text:p text:style-name="P16"/>
      <text:p text:style-name="P17">la are a es silicio</text:p>
      <text:p text:style-name="P17">osea se puede convertr a silicio pa<text:span text:style-name="T26">r</text:span>a hacer cristles naytirales de eso </text:p>
      <text:p text:style-name="P18">para hacer eso usaos los larcers li<text:span text:style-name="T27">t</text:span>ográfic<text:span text:style-name="T27">o</text:span>s</text:p>
      <text:p text:style-name="P18"/>
      <text:p text:style-name="P19">en u <text:s/>cpu la distcia entre transitor entre transitor es de 10 a 25 atomes de ciilicio</text:p>
      <text:p text:style-name="P19">y todo funciona en un circuio rodimensional</text:p>
      <text:p text:style-name="P19"/>
      <text:p text:style-name="P19">ess millones permiten correr navegadpres , videojuegps y ia.</text:p>
      <text:p text:style-name="P19"/>
      <text:p text:style-name="P19">ASML CONSTRUYE <text:s/>las maquinas de litografoa que hacen posible esto <text:s/></text:p>
      <text:p text:style-name="P19"/>
      <text:p text:style-name="P20"/>
      <text:p text:style-name="P21">gpu nucleos pequeñps y csimpescpu tiene nucleos mas <text:span text:style-name="T28">en un waiefer no todas ls obleas quedan bien</text:span></text:p>
      <text:p text:style-name="P22">la cpu venden según cu<text:span text:style-name="T29">an</text:span>to <text:span text:style-name="T29">no </text:span><text:s/>falle el lasers <text:span text:style-name="T30">debido a que no quedan completamente alineados</text:span></text:p>
      <text:p text:style-name="P22"/>
      <text:p text:style-name="P23">ests se prueba mediante test </text:p>
      <text:p text:style-name="P23">y algunos nucleos no funciona bien los venden mas bar<text:span text:style-name="T31">a</text:span>tos</text:p>
      <text:p text:style-name="P24">asi se venden la cpu deendiendo el falla o triunfa el litografico del laser</text:p>
      <text:p text:style-name="P24"/>
      <text:p text:style-name="P25">memoria de un procesador se conoce omo registro y cache</text:p>
      <text:p text:style-name="P25">para cargsr un sisyema operativo se necesita una ram un tipo de memoria que carga datos mas extensos <text:span text:style-name="T32">solo fucionan cuando el computad</text:span><text:span text:style-name="T33">or</text:span><text:span text:style-name="T32"> tiene luz.</text:span></text:p>
      <text:p text:style-name="P25"/>
      <text:p text:style-name="P26">La ventaja de est<text:span text:style-name="T34">as</text:span> pueden ser muy veloce ademas cuentan <text:s/>con var<text:span text:style-name="T34">i</text:span>as jerarquias.</text:p>
      <text:p text:style-name="P27">Para q la cpu acceda a datos en lacache ese da le toma de 1 a 20 nanosegunos a a cpu acceder </text:p>
      <text:p text:style-name="P27"/>
      <text:p text:style-name="P27"/>
      <text:p text:style-name="P26"/>
      <text:p text:style-name="P28">1 segundo ahi mil mil<text:span text:style-name="T35">l</text:span>ones nanosegundos</text:p>
      <text:p text:style-name="P28">20 nanosegundos <text:s/><text:span text:style-name="T35">serian 2 millonésimas de segundos</text:span></text:p>
      <text:p text:style-name="P23"/>
      <text:p text:style-name="P29">para que la cu acceda al dat<text:span text:style-name="T36">o</text:span> de l<text:span text:style-name="T36">a</text:span> memoria </text:p>
      <text:p text:style-name="P30">ram le toma 70 nanosegundos </text:p>
      <text:p text:style-name="P30">la cpu pasa un archivo del d<text:span text:style-name="T36">isc</text:span>o duro a la ram para interpretarlo</text:p>
      <text:p text:style-name="P31">la arquitectura es la organización interna de <text:s/>los oponentes, instrucciones, memoria y operaciones.</text:p>
      <text:p text:style-name="P30"/>
      <text:p text:style-name="P32">Las 3 grandes arquitecturas son :</text:p>
      <text:p text:style-name="P32"><text:soft-page-break/>x86 risc y arm</text:p>
      <text:p text:style-name="P32"/>
      <text:p text:style-name="P32">los diseñadores de procesadores descubrieron que los programadores <text:s/>muchas veces hacen los mismos procesos <text:s/>por lo tanto se imaginaron que esos procesos repetitivos corrieran en transistores específicos para correr esas instrucciones <text:s/>las cuales junto con las existentes determinan el tipo de arquitectura de la CPU.</text:p>
      <text:p text:style-name="P32"/>
      <text:p text:style-name="P33">Los procesad<text:span text:style-name="T37">o</text:span>res x6 funconn para rocezs relacionalos a windows </text:p>
      <text:p text:style-name="P33"/>
      <text:p text:style-name="P34">un ris<text:span text:style-name="T38">k</text:span> es un c<text:span text:style-name="T38">h</text:span>ip con instrucciones genéricas osea mas versatil</text:p>
      <text:p text:style-name="P34"/>
      <text:p text:style-name="P34">chip que gasta mu<text:span text:style-name="T39">ch</text:span>o <text:span text:style-name="T39">m</text:span>enos electricida<text:span text:style-name="T40">d</text:span> es esta en el telefo<text:span text:style-name="T39">no.</text:span></text:p>
      <text:p text:style-name="P35">Y ese chip es el tipo arm <text:span text:style-name="T41">hace que la</text:span> d<text:span text:style-name="T41">u</text:span>ra<text:span text:style-name="T41">cion</text:span> la bateria <text:span text:style-name="T41">sea mas largo.</text:span></text:p>
      <text:p text:style-name="P34"/>
      <text:p text:style-name="P36"><text:s/></text:p>
      <text:p text:style-name="P37">ese chip de ar<text:span text:style-name="T42">m</text:span> esta <text:span text:style-name="T42">p</text:span>resente de seguroen telefono p<text:span text:style-name="T42">u</text:span>esto hacer el mas comun para ay<text:span text:style-name="T42">u</text:span>dar al ah<text:span text:style-name="T42">o</text:span>rro de batería</text:p>
      <text:p text:style-name="P37"/>
      <text:p text:style-name="P38">el x86 es el mas producida en escala a esar de la reduccion <text:s/>por el incremento en <text:span text:style-name="T43">a</text:span>rm que ayuda a la bateria de las computadoras de tipo portatil <text:span text:style-name="T44">los procesad</text:span><text:span text:style-name="T45">o</text:span><text:span text:style-name="T44">res pueden predec</text:span><text:span text:style-name="T43">i</text:span><text:span text:style-name="T44">r <text:s/>el tipo de codigo <text:s/>a usar</text:span></text:p>
      <text:p text:style-name="P39">el procesador <text:s/>puede procesador que partes del codigo va usar el usuario ejemplo en spotify para el ahorro de bateria eso mediante ejecución <text:s/>especulativa <text:span text:style-name="T46">pes</text:span><text:span text:style-name="T47">e</text:span><text:span text:style-name="T46"> a su pr</text:span><text:span text:style-name="T47">o</text:span><text:span text:style-name="T46">blemas de seguridad</text:span>.</text:p>
      <text:p text:style-name="P39"/>
      <text:p text:style-name="P39"/>
      <text:p text:style-name="P40">La arquitectura de procesador es el lenguaje de ensamble mediante el cual s<text:span text:style-name="T48">e</text:span> le explica a un humano como hacer que la cpu haga <text:s/>una operación med<text:span text:style-name="T48">i</text:span>ante un lenguaje <text:span text:style-name="T48">parecido al </text:span>humano <text:span text:style-name="T49">usando una serie de instrucciones</text:span>.</text:p>
      <text:p text:style-name="P40"/>
      <text:p text:style-name="P40"><text:s/><text:span text:style-name="T50">En el psdo para rograar la cpu se usaban tarjetas con huecos el hueco representaba una instrucción en lenguaje vinario</text:span></text:p>
      <text:p text:style-name="P40"/>
      <text:p text:style-name="P41">cuando dio qie a =? 1 la cpu calcula el numero como un byte y lo asigna en la am como un espacio lo mismo con b = 2, llamadas direcciones <text:s/>y reservando una direccion de memoria o puntero tamboen conocido como apuntaores.</text:p>
      <text:p text:style-name="P41"/>
      <text:p text:style-name="P41">Al decur que a+b es iguak <text:s/>a c se esxtraen los valores en memorua <text:span text:style-name="T51">ram y liego se suma <text:s/>los 2 valores de sus apuntadores una vez generado se manda a la direccion de memoria que corresponde a la variable todo ese ocirre cuando compila un legiaje en un lemguaje de ensamblador.</text:span></text:p>
      <text:p text:style-name="P41"/>
      <text:p text:style-name="P41"/>
      <text:p text:style-name="P42">Cpu operaciones</text:p>
      <text:p text:style-name="P42">ram almacenaento de informacion </text:p>
      <text:p text:style-name="P42"/>
      <text:p text:style-name="P42"/>
      <text:p text:style-name="P42">casi todos los chip funcionan asi <text:s/>solo qeahi diferentes tipos e<text:span text:style-name="T52">s</text:span>pecializados</text:p>
      <text:p text:style-name="P42"/>
      <text:p text:style-name="P42">como los:</text:p>
      <text:p text:style-name="P42"><text:soft-page-break/>ystem on chip telefono</text:p>
      <text:p text:style-name="P42">gpu graficos</text:p>
      <text:p text:style-name="P42">tpu inteligencia artificial.</text:p>
      <text:p text:style-name="P42"/>
      <text:p text:style-name="P43">Ahi <text:s/>muchos dispsitivod que solo tienen una funcion.</text:p>
      <text:p text:style-name="P43"/>
      <text:p text:style-name="P43">Eje<text:span text:style-name="T53">m</text:span>p<text:span text:style-name="T53">l</text:span>o un audiofono al ontrario del televisores, tablets o telefonos</text:p>
      <text:p text:style-name="P43"/>
      <text:p text:style-name="P44">c<text:span text:style-name="T54">uan</text:span>ado ahi software que el habla al hardware se necesi<text:span text:style-name="T55">ta</text:span>n inte<text:span text:style-name="T56">r</text:span>medio para eso ta<text:span text:style-name="T56">m</text:span>bien para <text:span text:style-name="T56">que</text:span> un programador le d<text:span text:style-name="T56">e</text:span> i<text:span text:style-name="T56">n</text:span>strucciones, <text:span text:style-name="T56">sin necesidad de aplicaciones especificas </text:span><text:span text:style-name="T55">esto sea el sosyema operativo.</text:span></text:p>
      <text:p text:style-name="P44"/>
      <text:p text:style-name="P45">La forma e comunicar lo que perm<text:span text:style-name="T57">i</text:span>te comunicar software con hardware se llama drivers y los sis<text:span text:style-name="T57">t</text:span>emas operatovos le hablan al softwware a traves de una colección estandar pre acordadas de difere<text:span text:style-name="T57">n</text:span>tes mecanismos de comunicación</text:p>
      <text:p text:style-name="P45"/>
      <text:p text:style-name="P45"/>
      <text:p text:style-name="P44"/>
      <text:p text:style-name="P46">cuando uno reproduce una musica la api manda una instrucción al sistema operativo conecta con el driver del parlante y esto provoca la vibración para que suene</text:p>
      <text:p text:style-name="P46"/>
      <text:p text:style-name="P47">lo sistemas operativos gestionan recursos de la c<text:span text:style-name="T58">o</text:span>mputadora.</text:p>
      <text:p text:style-name="P47"/>
      <text:p text:style-name="P47"/>
      <text:p text:style-name="P48">Los lenfguajes de rpgramauon abstraen estos conceotos y los hacen faciles de procesar</text:p>
      <text:p text:style-name="P48"/>
      <text:p text:style-name="P49">el soema decide que necesita mas recursos</text:p>
      <text:p text:style-name="P49">lacpu solo maneja una cosa al tiempo y el sostema operativo es quien decode que <text:span text:style-name="T59">rec</text:span><text:span text:style-name="T60">u</text:span><text:span text:style-name="T59">rs</text:span><text:span text:style-name="T60">o</text:span><text:span text:style-name="T59">s darles</text:span></text:p>
      <text:p text:style-name="P50">ejemplo </text:p>
      <text:p text:style-name="P50">excel y navegador al mismo tiempo designan recursos para que no se percate el usuario del salto </text:p>
      <text:p text:style-name="P50">al abrir muchos archivos al mismo tiempio la computadora se pone lenta</text:p>
      <text:p text:style-name="P50"/>
      <text:p text:style-name="P50"/>
      <text:p text:style-name="P50"/>
      <text:p text:style-name="P51">el sotema evalua que memoria ram va usar una aplicacion</text:p>
      <text:p text:style-name="P49"/>
      <text:p text:style-name="P52">estos proicesos so trnsparentes <text:s/>y no tiene que precuparse el programado</text:p>
      <text:p text:style-name="P52"/>
      <text:p text:style-name="P52"/>
      <text:p text:style-name="P52">mecanosmis de interrupcion</text:p>
      <text:p text:style-name="P52">los procesops de la aplicación según ña jerarquia de procesos <text:s/>no iterrumpiran ñas acciones de teclado y mouse</text:p>
      <text:p text:style-name="P53">todo eso lo hac el sotema de forma idependiente.</text:p>
      <text:p text:style-name="P52"/>
      <text:p text:style-name="P53">y de esa forma aunque se romps una plicacion n se rompe so no perfudcara el sistema.</text:p>
      <text:p text:style-name="P53"/>
      <text:p text:style-name="P53"/>
      <text:p text:style-name="P54"><text:soft-page-break/>El almace amiento de datos en los doscos duros tamb<text:span text:style-name="T61">ien</text:span> es diferente según el sitema operativo <text:s/><text:span text:style-name="T61">afts de apple para windows ntfs</text:span></text:p>
      <text:p text:style-name="P54"/>
      <text:p text:style-name="P55">linux usa ext3/4</text:p>
      <text:p text:style-name="P55">los rchivos ls decide eñ sistema operativo y les agrega una capa de permiso, <text:span text:style-name="T62">el sotema es dode esta tu llave a acceso</text:span></text:p>
      <text:p text:style-name="P54"/>
      <text:p text:style-name="P53"/>
      <text:p text:style-name="P56">usiaris cotraseñas estan protegid<text:span text:style-name="T63">edi stus archivos del pedasito que tienes de tus discos duros.pero no puedes abrir lo del ortro archivo </text:span></text:p>
      <text:p text:style-name="P56"/>
      <text:p text:style-name="P57">los drovers pueden habrir arcghivo de sistemas diferentes eso so ienen las instruccions corrspondietes a ese sitema de archvos</text:p>
      <text:p text:style-name="P56"/>
      <text:p text:style-name="P56"/>
      <text:p text:style-name="P53"/>
      <text:p text:style-name="P58">las llaves oh <text:span text:style-name="T64">a</text:span>cceso meduante contraseña y usuario restrigen el acceso para cando esta no existe la presencia del password asi no se puede acceder a contenido del si<text:span text:style-name="T65">s</text:span>tema operativ<text:span text:style-name="T66">os</text:span></text:p>
      <text:p text:style-name="P59">en este caso <text:span text:style-name="T65">oh cuao tu accedes a tu banco</text:span></text:p>
      <text:p text:style-name="P59"/>
      <text:p text:style-name="P60">el metodo para resringur acceso se llaman anillos</text:p>
      <text:p text:style-name="P60">comienza desde 0 el nivel mas <text:span text:style-name="T67">profundo donde esta el hardware </text:span><text:span text:style-name="T68">y el kernel</text:span></text:p>
      <text:p text:style-name="P60"/>
      <text:p text:style-name="P61">e anillo <text:s/>y 2 donde cara el software carga, <text:span text:style-name="T69">este software traduce entre aplixaciones y hardware</text:span></text:p>
      <text:p text:style-name="P60"/>
      <text:p text:style-name="P62">el anillo 3 carga e doftware normal <text:s/>navegador juegos oftfimatica etc </text:p>
      <text:p text:style-name="P62">si una aplicación quiere ha lar con el harware <text:s/>esta debe <text:s/>comunicarse mediante los drovers y controladpres prsentes en los anillos 1 y2 para <text:s/><text:span text:style-name="T70">lograr una comunicacojn fectova ejeplo que spotidfy hga sonar un parlante.</text:span></text:p>
      <text:p text:style-name="P62"/>
      <text:p text:style-name="P63">Las <text:span text:style-name="T71">m</text:span>aquinas vrtuales fubcionan como si fieran una computadora v<text:span text:style-name="T71">ir</text:span>tual <text:s/><text:span text:style-name="T71">osea corren muhos usuarios</text:span></text:p>
      <text:p text:style-name="P64"><text:s/>en el anillo <text:s/>1 se crea la maquina vi<text:span text:style-name="T72">r </text:span>tual creando una memoria haciendo qie se cre una meoria vortual que la hace creer al ssema que ese es el lugar 0 de arranque, <text:span text:style-name="T72">y tu puedes tener varios como la pc te permia hacerlo</text:span></text:p>
      <text:p text:style-name="P65">un servodor en la nube es una computadora que se dide en espacios vortials para reservartelos si necesita mas aumenta la cantiad de recursos y recluta recursos de otras computadoras.</text:p>
      <text:p text:style-name="P65"/>
      <text:p text:style-name="P65"/>
      <text:p text:style-name="P66">La interfaz grafica depende de fodferentes sistemas operativos, detras de estas estan <text:s/>las de line de comandis asi cimenzo linuz, windows ymac <text:s/>comda line interfaces oh clis.</text:p>
      <text:p text:style-name="P66"/>
      <text:p text:style-name="P66"/>
      <text:p text:style-name="P66">Aopple corren con mac os los pcn los telefonos con ios</text:p>
      <text:p text:style-name="P66">los telefonos inteligentes funcionan con watchos.</text:p>
      <text:p text:style-name="P66">Asi como linux horizono y demas componntes como pantallas moviles o dispotivos medicos usan onx</text:p>
      <text:p text:style-name="P66"/>
      <text:p text:style-name="P66">meientras haya softwar eque interactue con el hardware a nivel general ahi sistema operativos</text:p>
      <text:p text:style-name="P66"><text:soft-page-break/>em la era moderna lmediante reglas los sisyemas operatovos restrgen que aplicaciones pueden corrersese e android usan la playstore y apple la apptoremediante reglas permiss oh sistemas de verificacion.</text:p>
      <text:p text:style-name="P66">Em escrotorio pudes usar cialqier aplicación mas sin emargo al usar las tuyas debes de tener una firma, llave de seguridad oh certificado, esto por lque los que enden este software como microisoft o apple les pide pasanr un proceso de veroficacion que les permita obtener una lave para ejecutar estas aplicaciones en su sistemas.</text:p>
      <text:p text:style-name="P66"/>
      <text:p text:style-name="P66"/>
      <text:p text:style-name="P67">Si e nvias un mensaje a whatsapp o h cualquier aplicación pasan muchas cosas <text:span text:style-name="T73">i</text:span>nteresant<text:span text:style-name="T73">e</text:span>s como</text:p>
      <text:p text:style-name="P67"/>
      <text:p text:style-name="P68">lo <text:span text:style-name="T74">pri</text:span>mero es entender <text:span text:style-name="T74">que cuamdo envias unos mensajes se emvian entre computadoras </text:span></text:p>
      <text:p text:style-name="P68"/>
      <text:p text:style-name="P69">alunas funcionan con red inalambrica llamada wifi</text:p>
      <text:p text:style-name="P69"/>
      <text:p text:style-name="P69"/>
      <text:p text:style-name="P70">y si no esta eso se conecta a una red de antena de tec o,ogia <text:s/>o se conecta a un ca ñr de red</text:p>
      <text:p text:style-name="P70"><text:s/><text:span text:style-name="T75">quien traduce las señsles privadas</text:span></text:p>
      <text:p text:style-name="P70">el moden es <text:s/><text:span text:style-name="T76">quien tradice la señl por medio un cable de fbra optica del ineernet domestico al gobal</text:span></text:p>
      <text:p text:style-name="P70"/>
      <text:p text:style-name="P71">dses mrnsaje <text:s/>llega a un servidor intermdio quien es que almacena el mensaj y e india comollegar</text:p>
      <text:p text:style-name="P70"/>
      <text:p text:style-name="P72">la lista de contactos son un onton de llaves publicas para c<text:span text:style-name="T77">ifrar un mensaje con la llave publica para ellos <text:s text:c="2"/>desde tu telefono, y lo mismo con <text:s/></text:span><text:span text:style-name="T78">los contactos que tienes ellos tienen tu llave publica y te envian informzcion solo a ti</text:span></text:p>
      <text:p text:style-name="P72"/>
      <text:p text:style-name="P73"/>
      <text:p text:style-name="P72"><text:s/><text:span text:style-name="T78">cifrando mensaje</text:span></text:p>
      <text:p text:style-name="P74">el intercambio deestas llaves ocirre en el servidpr </text:p>
      <text:p text:style-name="P74">pero las llaves privada estan en tu computadora</text:p>
      <text:p text:style-name="P72"/>
      <text:p text:style-name="P74">de esa manera se recoben mensajes y se desifran en tu telefono imediatamente sin ver el contenido en el servodor lo unico que hace este <text:s/>es ver a uien le mandas este mmensaje.</text:p>
      <text:p text:style-name="P74"/>
      <text:p text:style-name="P74">Metadatos: infrmacion etra</text:p>
      <text:p text:style-name="P74">datos: ontemdo del mensajes</text:p>
      <text:p text:style-name="P74">un mensaje cifrado es como un mensaje en una caja que se cierra con la llave publica, que tiene tpdo el mundo pero la forma de abrirlo es con la llave privada la cual es la unica que tienes, este mrnsaje se vuelve paquete que viaja por internet <text:s/><text:span text:style-name="T79">es un formato vbinario y todo los metadatos los entienden los protocolos como 4glt wifi oh ehernet como iwifi</text:span></text:p>
      <text:p text:style-name="P75">aunque cada estandar funciona diferente</text:p>
      <text:p text:style-name="P74"/>
      <text:p text:style-name="P75">los estandares como 4g son muchas antenas donde esta tu telefono por ejemplo en este momento este ve cuantas antenas ahi e <text:s/>tu barrio unas 4 o 6 <text:span text:style-name="T80">siempre estando cinectado de antena en antena <text:s/>ciando condices oh caminas.</text:span></text:p>
      <text:p text:style-name="P75"/>
      <text:p text:style-name="P76"><text:soft-page-break/>Un wifi router transforma la señal de radio a una de cable que qse conecta a un moden este los manda al proveedpr de internet y esta se conecta con <text:s/>otras atraves de cables gigantescos qie van por todo el planeta muchos pcultos bajo el agua.</text:p>
      <text:p text:style-name="P76"/>
      <text:p text:style-name="P77">Y la informacion se almacena en centros de datos lla,ads data cemter ubicados en distintas partes del mundo.</text:p>
      <text:p text:style-name="P77"><text:s/></text:p>
      <text:p text:style-name="P78">u ixp sabe restribuirlo <text:s/>cuando mandas informacion al distrobuir prioncipal luego </text:p>
      <text:p text:style-name="P78"/>
      <text:p text:style-name="P78"/>
      <text:p text:style-name="P78">esto se hace con numeros <text:s/>estoa numetos son ip y las pc <text:s/>los doirigen <text:s/>a las dns que <text:s/>sob <text:s/>bases de datos gogantes donde ahi nombre de dominio asignadas a una ip clonadas <text:s/>oh copias <text:s/>un tinternet checks points</text:p>
      <text:p text:style-name="P78"/>
      <text:p text:style-name="P78">una pc abe <text:s/>solo las mas comunes no sabe todo solo las mas comunes</text:p>
      <text:p text:style-name="P78"/>
      <text:p text:style-name="P78"/>
      <text:p text:style-name="P78">rl ciclo es ente mensaje se vieve opaquete se cifra, va al royter wfi y de esre <text:s/>voaja a los proveedores de internet y ahi este sabe donde msndarlo por el dns el paquete va a fluir co <text:s/>esa informacion a un punto de intercambio de internet encontrado el servidor en este caso whatsapp y ahi busca qiien lo recibe osea su amiga mandandolo al ixp <text:s/>mandandolo al isp de tu amiga al routr y modn de tu amiga qien lo <text:s/>recibe en forma de notificacion eso tambien puede ser msdado por una antena 4g donde se coneta el telefoo de su amiga.</text:p>
      <text:p text:style-name="P78"/>
      <text:p text:style-name="P79">Wn una computadora <text:s/>en ocasiones usando comamdos mandando menajes <text:s/>vas haber numetos ip llamada rtaza de ruta qye es un mapa que muestra por donde pao el mesje a velocidas de la luz, el tiempo que le tma a un m4bsaje llega de una computadora a otra se le llama ping</text:p>
      <text:p text:style-name="P79"/>
      <text:p text:style-name="P79">si una cpmputadora o telefono estan en la misma red no deben de viajar a internet muy probablemete</text:p>
      <text:p text:style-name="P79"><text:s/>solo rebota el mensje en el proveedor de internet local <text:s/>cuando vez algo en youtube no se va sus servodores de usa si no qe gnera copias mas cercanas e <text:s/>los servodores de cada pais, de sa manera en vez de hacer el recorrido largo el menje solo tenga que estar en ñla red local <text:s/>de la ciuadad <text:s/>estos se conoce como servodpe de cache y es lo mismo con el internet satelital. </text:p>
      <text:p text:style-name="P79">Una antena satelital se conecta a internet y el satelite a quien se cnecto lo manda <text:s/>al iso cercano a tu casa y ese ip se encrga de enrutar el paquete osea desifrarlo.</text:p>
      <text:p text:style-name="P79">El satelite va al espacio <text:s/>como cabñe cuya funcion es byscar el proveedor de internet cercano a ti.</text:p>
      <text:p text:style-name="P79"/>
      <text:p text:style-name="P79">El internet tiene protocolos reglas y cifrados <text:span text:style-name="T81">las ip tiene 4 numeris mas no mas de eso</text:span></text:p>
      <text:p text:style-name="P80">tecncas para el correo diferencuas entre ipv4 y ipv 6</text:p>
      <text:p text:style-name="P79"/>
      <text:p text:style-name="P81">para usar la ia</text:p>
      <text:p text:style-name="P81">1. no pedir absolutamete todo a la ia <text:s/>da un gran contexto de o que quiero hacer y en bae a eso que prganice unn plan como puedo hacerlo y paso a paso como desarrollar la aplicación, entre mas desiciones toe la ia los resultados sran maos</text:p>
      <text:p text:style-name="P81">2.crear proyecto en <text:s/>maquina y codigo separado y luego organizar mas o menos los archivos y carpetas y en b<text:span text:style-name="T82">ase</text:span> ha esto puedes <text:span text:style-name="T82">preguntar a la ia <text:s/>parte concretas para que te puedas orientar en lo que quieres hacer?</text:span></text:p>
      <text:p text:style-name="P81"><text:soft-page-break/></text:p>
      <text:p text:style-name="P82">Los tipos de datos en la omputadora</text:p>
      <text:p text:style-name="P81"/>
      <text:p text:style-name="P82">los persistentes y volatiles </text:p>
      <text:p text:style-name="P82">persistntes dato sigue ahi asi apagas la computadra</text:p>
      <text:p text:style-name="P82">volatil: se b<text:span text:style-name="T83">o</text:span>rra de la computadora</text:p>
      <text:p text:style-name="P82"/>
      <text:p text:style-name="P83"/>
      <text:p text:style-name="P84">un archiovo no guardado <text:s/>se borrara del computadpr</text:p>
      <text:p text:style-name="P84"/>
      <text:p text:style-name="P84">gardar significa que va al dosco duro</text:p>
      <text:p text:style-name="P84">y tenerlo en accion es que esta en la ram</text:p>
      <text:p text:style-name="P84"/>
      <text:p text:style-name="P85">la ram es un chip de memoria volatil comun aunue ahi muchos otros como la cache o registro que son memorias pequeñas muy veloces dentro del transitor que ahi en las cpu.</text:p>
      <text:p text:style-name="P85"/>
      <text:p text:style-name="P85">La bios y dico diuros entre otras son un formto de meria persistente</text:p>
      <text:p text:style-name="P85">el firmware es una herramienta de arranque de oftware present en los chips.</text:p>
      <text:p text:style-name="P85"/>
      <text:p text:style-name="P85"/>
      <text:p text:style-name="P86">Los discos de estdo olido son un tipo de malmacenamiento permanente.</text:p>
      <text:p text:style-name="P87">Los doscos duros mecanos son asi por tener un disco pr dentro</text:p>
      <text:p text:style-name="P88">ademas dr una celda de meoria un tipo de chip especial la velocodad de estos discps es la vlocidad que alcanza la velocidd alrededr del cicuito <text:span text:style-name="T84">la velocidad de la luz es syu v</text:span><text:span text:style-name="T85">e</text:span><text:span text:style-name="T84">lo</text:span><text:span text:style-name="T85">ci</text:span><text:span text:style-name="T84">dad </text:span><text:span text:style-name="T85">sin vpartes mecanicas </text:span></text:p>
      <text:p text:style-name="P89">en in<text:span text:style-name="T86">gñes se les llama harsd drives</text:span></text:p>
      <text:p text:style-name="P90">un discp de estado solido es solid state drive </text:p>
      <text:p text:style-name="P91">los doscos duros diros giardan <text:s/>la informacion <text:s/>en un for ato de bloques, <text:span text:style-name="T87">se conoce como foematos de memoria esto</text:span></text:p>
      <text:p text:style-name="P91"/>
      <text:p text:style-name="P92">fat 32 era popular pero ahora ya cambio a ntfs as veloz y seguro que fat 32</text:p>
      <text:p text:style-name="P92"/>
      <text:p text:style-name="P93">ext3 y ext4</text:p>
      <text:p text:style-name="P93">esto significa q<text:span text:style-name="T88">u</text:span>e ahi un si<text:span text:style-name="T88">s</text:span>tema de permisos como barrera para ev<text:span text:style-name="T88">i</text:span>tar que otr<text:span text:style-name="T88">o</text:span>s vean archivos que no q<text:span text:style-name="T88">ui</text:span>eres que vean</text:p>
      <text:p text:style-name="P93"/>
      <text:p text:style-name="P94">el ipod aipad y mac usan el <text:span text:style-name="T89">apfs apple files system </text:span><text:span text:style-name="T90">un disco <text:s/>mediant el indice indica ciamdo termina y comienza un archivo</text:span></text:p>
      <text:p text:style-name="P95">al borrar un archivo se borra e apuntador del <text:s/>bloue de archivo</text:p>
      <text:p text:style-name="P95"><text:s/><text:span text:style-name="T91">dejandolo libre anque no sin <text:s/>contenido elimnafo pars so bresescibri <text:s/>el contenfo esto a la larga <text:s/>provoca que un <text:s/>diso mecanico s</text:span><text:span text:style-name="T92">e</text:span><text:span text:style-name="T91">a mas lento</text:span></text:p>
      <text:p text:style-name="P95"/>
      <text:p text:style-name="P95"/>
      <text:p text:style-name="P96">en el pasado la fracmenacion pegaba el archivo por archibo</text:p>
      <text:p text:style-name="P96"/>
      <text:p text:style-name="P96">solo que <text:s/>un disco meca ico no esnecesario, <text:span text:style-name="T93">aun as los doscos moriran tarde oh temprano por eso debes de copuar la informacion e otris lares para no perderla</text:span></text:p>
      <text:p text:style-name="P96"/>
      <text:p text:style-name="P97"><text:soft-page-break/>la iformacion puede ser cifrada osea que solo se pueda acceder por una llave como la contraseña.</text:p>
      <text:p text:style-name="P96"/>
      <text:p text:style-name="P98">Windows linux mac y telefonos usan esos mecanosmos</text:p>
      <text:p text:style-name="P98">cuando lo dubes a la nube va <text:s/>a u a computadoras gigantestcas.</text:p>
      <text:p text:style-name="P98"/>
      <text:p text:style-name="P98">Los forenses <text:s/>de ciberseguridad usan in software especializdos en reconstruir archovos borrados atraves de u mapa estadistico</text:p>
      <text:p text:style-name="P98"/>
      <text:p text:style-name="P98">recordemos datos procesadps por la cpu<text:span text:style-name="T94">d de la cpu pasa a l ram <text:s/>luego pasa al disco solido todo esto en mens de un segundo</text:span></text:p>
      <text:p text:style-name="P98">.</text:p>
      <text:p text:style-name="P99">la ram es 7000 veces mas rapida que un disco zsolio y este es mas de 70 veces mas rapido que <text:s/>u o mecano</text:p>
      <text:p text:style-name="P99"/>
      <text:p text:style-name="P99">mediante swap se crea un espacio para archivos que son mas grandes que la ram usand eñ disco duro como ram virtual.</text:p>
      <text:p text:style-name="P99">Por lo cual <text:s/>se debe liberar la ramcada cieri tiempo ya que swap hace mas lento el disco.</text:p>
      <text:p text:style-name="P99"/>
      <text:p text:style-name="P99">Hoy en dia eso es automatico.</text:p>
      <text:p text:style-name="P99"/>
      <text:p text:style-name="P99">Mememristor <text:s/>es una cpu y memoria ram al mismo tiempo aunque no se ha producido a escala aunque en el futuro se dra esta posibilidad.</text:p>
      <text:p text:style-name="P99"/>
      <text:p text:style-name="P99">Los system on a chip que son los que tienen los telefonos estos integran <text:s/>chips por dentro integrados</text:p>
      <text:p text:style-name="P99"/>
      <text:p text:style-name="P99"/>
      <text:p text:style-name="P100">cuando la gnte joven y muy vieja <text:span text:style-name="T95">se estre</text:span><text:span text:style-name="T96">lla xon el siatema de arcbhios ahi un prcentaje que usan site as de carpetas </text:span><text:span text:style-name="T97">y el restp se vierperdoidos en una cosa particular creen que todo funciona e <text:s/>una app y las fotos se aren en una galrroa</text:span></text:p>
      <text:p text:style-name="P101">+de hecho todos lod ocede <text:s/>consideran mover archivos de un lugae a otro como funda,entos par aprender tecnologia</text:p>
      <text:p text:style-name="P102">ests archivos se guaran jerarquicamente cmo un arbol </text:p>
      <text:p text:style-name="P102"/>
      <text:p text:style-name="P103">una <text:s/>arpeta raiz <text:s/>una de usiario <text:s/>una de dsisy,a y otras de apps <text:s/></text:p>
      <text:p text:style-name="P102"/>
      <text:p text:style-name="P102"/>
      <text:p text:style-name="P104">cyando instalas na impresora va los drivers</text:p>
      <text:p text:style-name="P104"/>
      <text:p text:style-name="P105">el contenido esta distribudo en forma jearquia ekenplo usiaio-descargas-archivos</text:p>
      <text:p text:style-name="P105"/>
      <text:p text:style-name="P105">el contnido solo es accesible a quentenga el usuario y cntraseña <text:s text:c="2"/><text:span text:style-name="T98">los ptros udiaio no aceden a eseaa carpeta</text:span></text:p>
      <text:p text:style-name="P105"/>
      <text:p text:style-name="P106">uni la esteuctira seroa </text:p>
      <text:p text:style-name="P106"><text:s/>home/frddy/camar/FOTO.NG E<text:span text:style-name="T99">esro es en linux</text:span></text:p>
      <text:p text:style-name="P107">es votalenteneerl a jerarquia al ser estudate de ingenieria de software sus prinipios</text:p>
      <text:p text:style-name="P108"><text:soft-page-break/>en windos wes c: dentro luego usuarios, en esta pasa a mi usiario luego a <text:s/>la carpeta en este caso imahenes y luego al archivo</text:p>
      <text:p text:style-name="P108"/>
      <text:p text:style-name="P109">un png o jpg <text:s/><text:span text:style-name="T100">ha n sodo escoido los ultimos años por los sosyemappetativos osea ocltan ñas ultimas 4 letras </text:span><text:span text:style-name="T101">pero internamiete ni ocirre esto</text:span></text:p>
      <text:p text:style-name="P109"><text:s/></text:p>
      <text:p text:style-name="P110">je mplo de platzo es platzi.com</text:p>
      <text:p text:style-name="P110"><text:s/><text:span text:style-name="T102">el servidor y lo demasserian las carpetas del ervidr. </text:span></text:p>
      <text:p text:style-name="P110">ademas png y jpg son tiposde i<text:span text:style-name="T103">m</text:span>agnes</text:p>
      <text:p text:style-name="P110"/>
      <text:p text:style-name="P110"/>
      <text:p text:style-name="P111">existen protocolos </text:p>
      <text:p text:style-name="P112">como web scockets que so transferencias de datos ejemplo chats</text:p>
      <text:p text:style-name="P113">e<text:span text:style-name="T104">l</text:span> identif<text:span text:style-name="T104">i</text:span>cador <text:span text:style-name="T104">es un numero de 4 digitos.</text:span></text:p>
      <text:p text:style-name="P113"/>
      <text:p text:style-name="P113"/>
      <text:p text:style-name="P113"/>
      <text:p text:style-name="P114">Este contienr <text:s/>con un subdominio</text:p>
      <text:p text:style-name="P113"/>
      <text:p text:style-name="P115">por que ciando usas una pc apiond android</text:p>
      <text:p text:style-name="P113"/>
      <text:p text:style-name="P113"><text:s/><text:span text:style-name="T105">o usas windows mac no se ven esos tiempoz</text:span></text:p>
      <text:p text:style-name="P113"/>
      <text:p text:style-name="P115">ver la extension de lo archivos como are</text:p>
      <text:p text:style-name="P113"/>
      <text:p text:style-name="P113"/>
      <text:p text:style-name="P116">desactovar ña mala costumbre la ,ala costumbres de esconder las extensiones u la ruta de los archivos</text:p>
      <text:p text:style-name="P113"/>
      <text:p text:style-name="P117">e mac uedes mostrar en el finder </text:p>
      <text:p text:style-name="P117">al hace esose genera un gn netgovio éro que quirtan autonoia ya que soempre te indicaran como se dben de pasar los archois en lugar de la libertad de el traspso</text:p>
      <text:p text:style-name="P117"/>
      <text:p text:style-name="P117"/>
      <text:p text:style-name="P118">los chips y la electronoca moderna <text:s/>empezaon como tbos de vacios</text:p>
      <text:p text:style-name="P118"/>
      <text:p text:style-name="P119">le<text:span text:style-name="T106">n</text:span>tamente est<text:span text:style-name="T107">o</text:span> se <text:span text:style-name="T108">fue</text:span> <text:span text:style-name="T106">hac</text:span>ie<text:span text:style-name="T106">n</text:span>do ms <text:span text:style-name="T109">p</text:span><text:span text:style-name="T106">e</text:span>queño, <text:span text:style-name="T107">puesto qie empacamos transitoras en formas mas c</text:span><text:span text:style-name="T110">ortas</text:span></text:p>
      <text:p text:style-name="P119"/>
      <text:p text:style-name="P119"/>
      <text:p text:style-name="P120">en un telefono en el chp colocan los trasitores que funcionan como cpu y gpu casi pegadotos</text:p>
      <text:p text:style-name="P120"/>
      <text:p text:style-name="P121">tod esto esta pegado por el moden quien habla con la central tlefonica</text:p>
      <text:p text:style-name="P121">todas esas funciones se estandarizaron en un solo chip <text:span text:style-name="T111">llamado soc</text:span></text:p>
      <text:p text:style-name="P121"/>
      <text:p text:style-name="P121"/>
      <text:p text:style-name="P122">un telefono tiene un baro<text:span text:style-name="T112">m</text:span>etro y <text:span text:style-name="T113">termómetro que son mecanisms fisicos usando electrponica <text:s/>llegan <text:s/>mecanica oh fisica le hacen llegar la señal al proesador solo que usan el sstem on chip <text:s/>qie pose los traitores necesaros para que funcione.</text:span></text:p>
      <text:p text:style-name="P123"><text:soft-page-break/>Ahi cas<text:span text:style-name="T114">o</text:span> donde componentes <text:span text:style-name="T114">en muchos csos la camara </text:span><text:s/>f<text:span text:style-name="T114">lo</text:span>t<text:span text:style-name="T114">a</text:span>ra en un tipo de aceite <text:span text:style-name="T115">o tambien tiene </text:span></text:p>
      <text:p text:style-name="P123"><text:s/><text:span text:style-name="T115">lectro imanes que lo que efectun es la c</text:span><text:span text:style-name="T114">a</text:span><text:span text:style-name="T115">pacidad de estabilizar l camara aun a pesatr del movimiento, </text:span><text:span text:style-name="T114">este <text:s/>caso s cuando tiembla</text:span></text:p>
      <text:p text:style-name="P124">los telefonos hoy <text:s/>tiene una duracion de bateria mucho mas larga aunque <text:s/>esto se define por el <text:s/>a densidd de energ<text:span text:style-name="T116">i</text:span>a <text:span text:style-name="T116">atraves de metodos quimicos</text:span> que se le <text:s/>puede m<text:span text:style-name="T117">e</text:span>ter a una bateria <text:span text:style-name="T116">aun a pesar del crecimiento de </text:span><text:span text:style-name="T117">l</text:span><text:span text:style-name="T116">a tecnologia </text:span><text:span text:style-name="T117">lo que pasa es que poee 2 razones</text:span></text:p>
      <text:p text:style-name="P125">el mercado acpetan telefonos que duren un dia mas no uno qe dure 6 horas <text:span text:style-name="T118">adema no recompensamos el mwrcado de otros tipos de telefonos <text:s/>como los samsung gaaxy oh ultra entre otros de esa ga</text:span><text:span text:style-name="T119">m</text:span><text:span text:style-name="T118">a</text:span></text:p>
      <text:p text:style-name="P126"/>
      <text:p text:style-name="P126"><text:span text:style-name="T119">lo otro es que </text:span><text:s text:c="2"/><text:span text:style-name="T119">los fabricantes de chip crean chips que los crean <text:s/>chips tienen qu gastar menos electricodad, lo qqe ocurre con los relefonos siguen egendo por que las apps spn complejos <text:s/>simelo q8e si usas el telefono muxho se genera calor y ese calor en tra a la bteria y si hay mucha cocentecion la bateria explota, por es se debe cuidar la cantidad e dflujo electrico <text:s/></text:span></text:p>
      <text:p text:style-name="P126"/>
      <text:p text:style-name="P127">arm domina la arquitectura de s chips telefonicos y de los system on chips <text:s/>la industria muda todo eso a un system on chips presentes en telefonos tablets de atuto. Estas gregan <text:s/>unidades de p<text:span text:style-name="T120">r</text:span>ocesamiento neuronal vcom o una de sus novedades</text:p>
      <text:p text:style-name="P128"><text:s/>es un tipo de chip conocido <text:s/>tpu <text:s text:c="2"/>para usar ia.</text:p>
      <text:p text:style-name="P128"/>
      <text:p text:style-name="P129">La cpu de un siste on <text:s/>chip <text:s/>es una cpu normal de una pç</text:p>
      <text:p text:style-name="P129">ainqie no tienen la <text:s/>ksma cantiad de nicleo</text:p>
      <text:p text:style-name="P129"/>
      <text:p text:style-name="P129"><text:s/>la ia en todo <text:s/>el planeta <text:s/>se <text:s/>comienza por ka hiperoptimizacion <text:s/>de los las coaas</text:p>
      <text:p text:style-name="P130">los sostem on chip ayudan a facilitar <text:s/>se uso puesto a que cuando se comienza po la optimizacion se toene encienta <text:s/>ue la ram <text:s/>y l gpu estan juntas <text:span text:style-name="T121">por </text:span>lo tanto ssi no se usa partr de esa ran la ia puede apeovechar estos componentes para ser mas eficiente.</text:p>
      <text:p text:style-name="P130"/>
      <text:p text:style-name="P131">Lo<text:span text:style-name="T122">s</text:span> s<text:span text:style-name="T122">y</text:span>s<text:span text:style-name="T122">t</text:span>em on chip hjacen que apple lidere el mercado de implentacion en maquia local.</text:p>
      <text:p text:style-name="P131"/>
      <text:p text:style-name="P132">Las rimeras computdora slo impriman <text:s/>dap no teniasn gr<text:span text:style-name="T123">a</text:span>ficos</text:p>
      <text:p text:style-name="P133">el oxiloscopio permitia ver son ondas que segeneraban al usar <text:s/>la computadora </text:p>
      <text:p text:style-name="P133">moviedo las imagenes colocadoles un palito para crear pong mediante un palito y otro al <text:span text:style-name="T124">f</text:span>rente de este, puesto que se modifico la imagen que dab el oxiloscopio</text:p>
      <text:p text:style-name="P134">a parot de ese momento los <text:s/>vodeojuegos empujaron lo posible a nivel grafico.</text:p>
      <text:p text:style-name="P131"/>
      <text:p text:style-name="P131"/>
      <text:p text:style-name="P135">Osea en llas primeras versiones eran oara las pantallas no eran computadoras <text:span text:style-name="T125">como tal se imprima en papel n esa epoca <text:s text:c="2"/></text:span><text:span text:style-name="T126">con la intetracion al oiloscop</text:span><text:span text:style-name="T127">io <text:s/>esto <text:s/>contado fie ntes de los sosemas operativos.</text:span></text:p>
      <text:p text:style-name="P135"/>
      <text:p text:style-name="P136">Em uni o dos <text:s/>se pueden jugar juegos como tetris pronce of persia sin tener vntanas todavia , por qie cargaban <text:s/>cafa una de esas pantallas <text:s/>y eran sencillos, por decadas lllevamos los chips a su maximo niveles gracuas a los v<text:span text:style-name="T128">i</text:span>deojuego<text:span text:style-name="T129">s</text:span></text:p>
      <text:p text:style-name="P136"/>
      <text:p text:style-name="P137">esto funciono hasta evolucionar e<text:span text:style-name="T130">n u</text:span>na industria que construia<text:span text:style-name="T130">ra esto para disño grafico, produccion audiovisual y videojuegos <text:s/>llaados gpu</text:span></text:p>
      <text:p text:style-name="P137"/>
      <text:p text:style-name="P138"><text:soft-page-break/>la gpu a <text:s/>comparacon es que la gpu <text:s/>yiene muxhos niclleos con nos calculos pero como son muxhos los hacen <text:s/>al mismo tiempo</text:p>
      <text:p text:style-name="P139"/>
      <text:p text:style-name="P138">representar u umagen en poantalla representa un calculo de <text:s/>una matriz de millones de puntos de luz</text:p>
      <text:p text:style-name="P138"/>
      <text:p text:style-name="P139">la gpu <text:span text:style-name="T131">mediante sus chips le da pioridad a todfa la pa</text:span><text:span text:style-name="T132">ntalla</text:span></text:p>
      <text:p text:style-name="P139"/>
      <text:p text:style-name="P140">las</text:p>
      <text:p text:style-name="P139"/>
      <text:p text:style-name="P139"/>
      <text:p text:style-name="P141">cada uno de esos putos de color en la cuaricula se llama pitxeles</text:p>
      <text:p text:style-name="P141"/>
      <text:p text:style-name="P140">stas formasn lineas de color rojo verde y azul</text:p>
      <text:p text:style-name="P140"/>
      <text:p text:style-name="P142">la cpu procesabas imagesnes <text:s/>lineales</text:p>
      <text:p text:style-name="P142">la caga de repente <text:s/>eso es de la gpu. Y la gpuprocesa en paralelo</text:p>
      <text:p text:style-name="P142"/>
      <text:p text:style-name="P142"/>
      <text:p text:style-name="P142">la tarketas grafocas fieron creadas por nvidia y amd <text:span text:style-name="T133">que adquirio ati </text:span></text:p>
      <text:p text:style-name="P143">sino iera por esa industria no habrian <text:s/>credcio las consolas de videojuegps.</text:p>
      <text:p text:style-name="P143"/>
      <text:p text:style-name="P143">Esta es una pc que esta optmizada para correr videojuegps.</text:p>
      <text:p text:style-name="P143"/>
      <text:p text:style-name="P144">Toda la pantalla como se indico anteriormente atraves de un sostema conoxido como pipelines</text:p>
      <text:p text:style-name="P142"/>
      <text:p text:style-name="P142"/>
      <text:p text:style-name="P145">los orimeros circuitos de gpu eran circuitos semcillos </text:p>
      <text:p text:style-name="P145"><text:s/>a medida que aumentaron la cmoplejidad de lod transistores se crearon caracterosticas emergentes <text:s/><text:span text:style-name="T134">como la generacio de costuras.</text:span></text:p>
      <text:p text:style-name="P146">Progra acion de sheaters</text:p>
      <text:p text:style-name="P146">luces caculo de fisicas </text:p>
      <text:p text:style-name="P146">debido aqe todo esto se podia pasar </text:p>
      <text:p text:style-name="P146">por esfos chips <text:span text:style-name="T135">en los nicleos que hacen estps calculo a milesimas de segundos </text:span></text:p>
      <text:p text:style-name="P147">y emergio la computacion pa<text:span text:style-name="T136">r</text:span><text:span text:style-name="T137">n</text:span>alela</text:p>
      <text:p text:style-name="P148">de la cual funciona <text:s/><text:span text:style-name="T138">los efectos especoales, videojuegos y animacion</text:span></text:p>
      <text:p text:style-name="P148"><text:s/></text:p>
      <text:p text:style-name="P149"><text:s/><text:span text:style-name="T139">peo ellos uno usan a ram nor al para nunca travarse <text:s/>ya qie esta le</text:span><text:span text:style-name="T140">j</text:span><text:span text:style-name="T139">os de</text:span><text:span text:style-name="T140">l</text:span><text:span text:style-name="T139"> chip, </text:span><text:span text:style-name="T140">estps antes del system on chip que tienen todo i ntegrado</text:span></text:p>
      <text:p text:style-name="P150"/>
      <text:p text:style-name="P150"><text:s/></text:p>
      <text:p text:style-name="P151">las gpu tienn un chip integrado una memoria que se <text:s/>cono e como VRAM Esa es una memoria volatil sonde se carga <text:s/>datos de <text:span text:style-name="T141">t</text:span>u <text:span text:style-name="T141">v</text:span>ideojuego</text:p>
      <text:p text:style-name="P151"/>
      <text:p text:style-name="P152">por ejemplo el mundo se usan la gpu para rear datos simuñdos en una epx donde los investogadores hacian simuñacion de fisica or supercomputadoras se dieron ciwnta qe el chip de la ps3 tenia qie uaba gpu y cpu para los vodeojuegos </text:p>
      <text:p text:style-name="P152"><text:soft-page-break/>era increible eficiente pr lo qe compraron en masa playustatio 3 para instalarle linux y cear supercomputadoras y crear supercomputadpras al ifinal del dia un ideojugo es una simulacion <text:s/>del mundo teal perfecto parala fisicas</text:p>
      <text:p text:style-name="P152"/>
      <text:p text:style-name="P152">sony y microsoft no ganan donero con sus co dolas enci si no quecon los videjuegpos</text:p>
      <text:p text:style-name="P152">por eso ps3 perdio dinero ya qe no las uaban para juegos las usban mas para fines cientificos, </text:p>
      <text:p text:style-name="P152">aunque sony no permitio eso mas, <text:span text:style-name="T142">aunque enue no signofica qe no se hatan usado para la co putacio cientofca.</text:span></text:p>
      <text:p text:style-name="P152"/>
      <text:p text:style-name="P152"/>
      <text:p text:style-name="P153">La ia se convirto en prcesmiento paralelo </text:p>
      <text:p text:style-name="P152"/>
      <text:p text:style-name="P153">cuando tu <text:s/>usas un modeo para crear sxt este mismo recorrre un aebol gigantesco de la estructura del lenguaje humano</text:p>
      <text:p text:style-name="P145">, <text:span text:style-name="T142">trdo de encontrar diferentes caminos para una pregunta. Que tu le haces desde chtgpt gemii, entreoe otros. Este prceso ocirre en gpus <text:s/>antes de la superintelugencias.</text:span></text:p>
      <text:p text:style-name="P145"/>
      <text:p text:style-name="P153">Los autos <text:s/>como teslas ty wayno usan gpus, atraves de las camaras <text:s/>t radares en l marco para capturar imagenes del <text:s/>undo extwrior lo cial permite decidr <text:s/>al algoritmo de ia la accion como avanzar, fenar o moverse. Si las gpu ese proceaiento no eria posible.</text:p>
      <text:p text:style-name="P153">Las cpu se <text:span text:style-name="T143">p</text:span>rama con lenguajes <text:span text:style-name="T143">de nsa,badpr</text:span></text:p>
      <text:p text:style-name="P154">las aplicaciones se usan lenujes como c++ java scri´t entre otros <text:s/>pero tpdo estps compilan al lengiaje de ña cpu</text:p>
      <text:p text:style-name="P154"/>
      <text:p text:style-name="P154"/>
      <text:p text:style-name="P154">para las pgpus lks fabricantes hn creado lemguajes para qe el programador le hablen al metal paa programr el chip dw la cpu el mas conocido es cuda de nvidia inicialmente para vodeojuegos, este modelo es parte de la razon por lo cual es posible la revolucion de la ia, pueto qie permite calculos muy masivos reprogramado el comprtaientos de chips pensadps originalmente para pixeles, tabien se fabrica <text:s/>las gpu a nivel de <text:s/>hardwqare para onsidera ones distintas. </text:p>
      <text:p text:style-name="P154">La cpu es el corazon e una tarjwta madre de ina cmputadora</text:p>
      <text:p text:style-name="P154">la gpu se conecta atraves de unpuerto por alta veocidad lllamado pcie un <text:s/>puerta qie s conecta <text:s/>por uesquitas a la electronica de la tarketa madre</text:p>
      <text:p text:style-name="P154"/>
      <text:p text:style-name="P155">en el syurem oncgip una cpu esta pegada a a gpu</text:p>
      <text:p text:style-name="P155"/>
      <text:p text:style-name="P155">en un a computadora la cpu tiene sistema de refriamento por agua <text:s/>la gpu utiliza uno paralelo, codecs dque son codificadores de compresion <text:s/>y descomprsion un algoritmo que se usa ejemplos en un video</text:p>
      <text:p text:style-name="P155"/>
      <text:p text:style-name="P155">usando menos electricidad lo mismo con la simuñacion de vodeojuegps</text:p>
      <text:p text:style-name="P155"/>
      <text:p text:style-name="P155">udando ray tranning para la luz</text:p>
      <text:p text:style-name="P155"/>
      <text:p text:style-name="P155">sesta se programaba en coidigo y luahora en los chips y la gpu tiene unidades <text:s/>especialisadas en eso</text:p>
      <text:p text:style-name="P155">la ia recorre <text:s/>en escencia arboles y matrices grandes.</text:p>
      <text:p text:style-name="P155">Es la escencia <text:s/>del roceamiento neural osea sus unidades</text:p>
      <text:p text:style-name="P155">esto fie primero ocupado por las driptomoneda</text:p>
      <text:p text:style-name="P155"><text:soft-page-break/></text:p>
      <text:p text:style-name="P155">por la formula especfoca.atraves del blockshainn</text:p>
      <text:p text:style-name="P155"/>
      <text:p text:style-name="P155">ese es mas amigable en parealelo y serial y asi se creo la critomineria como en e el salvador</text:p>
      <text:p text:style-name="P155"/>
      <text:p text:style-name="P156">las gpu no abamdinan los vodegjuegos <text:s/>rkemplo val</text:p>
      <text:p text:style-name="P156">usa eñ steam os para <text:s/>remplaar el sistema operatovo de uso en tu pc por uno que maxima el uso de componente para un juego</text:p>
      <text:p text:style-name="P156"/>
      <text:p text:style-name="P156">un algoritmo es una serie de aso logocos sin am uiguidad para resolver un <text:s/>prpblema u obtener un objetovo.</text:p>
      <text:p text:style-name="P156"/>
      <text:p text:style-name="P156">Como ejemplo un aire avndicuonado.</text:p>
      <text:p text:style-name="P156"/>
      <text:p text:style-name="P156">Se defien valores</text:p>
      <text:p text:style-name="P156">luego condiciones</text:p>
      <text:p text:style-name="P156"/>
      <text:p text:style-name="P156">y antes de todo eso un cclo que pregunte si dcede tal oh no sitiaion</text:p>
      <text:p text:style-name="P156"/>
      <text:p text:style-name="P156"/>
      <text:p text:style-name="P156">pueden existir akgoritmos mas simples</text:p>
      <text:p text:style-name="P156"/>
      <text:p text:style-name="P156">añgoritmo seroes de instricciones matematicas de las prdenes aun sistemas</text:p>
      <text:p text:style-name="P156"/>
      <text:p text:style-name="P156">este puede ser exresado por un lenguake d programacion</text:p>
      <text:p text:style-name="P156"/>
      <text:p text:style-name="P156">los lenguajes son mecanosmos para convei eaas instruciciones en el lenguae de la maquina</text:p>
      <text:p text:style-name="P156"/>
      <text:p text:style-name="P156"/>
      <text:p text:style-name="P157">en la compilacion se tranaforma ese lengiaje humano en el de 1 y 0 y el resultao de eso es un archovo <text:s/>eecitable en windows eson los archovos.exe, en linux y mc son arhivos con permisos de ejecucione otro mecanimos son los interpretados</text:p>
      <text:p text:style-name="P157"/>
      <text:p text:style-name="P157">que see ken en linea linea <text:s/>en el chip pero sin compilarlo psea se tranfoma en un ejectable.</text:p>
      <text:p text:style-name="P157"><text:s/>En jist compila justo ntes de ejcitar en calcquier lengiaje</text:p>
      <text:p text:style-name="P157"/>
      <text:p text:style-name="P157">}un ingeniero interpreta los problemas solucionandolos en los lenguajes qj sepas resolver</text:p>
      <text:p text:style-name="P157"/>
      <text:p text:style-name="P157"/>
      <text:p text:style-name="P158">la doreccion ip toenen </text:p>
      <text:p text:style-name="P158"/>
      <text:p text:style-name="P159">todas las mobedas en internet es blockshing</text:p>
      <text:p text:style-name="P159"/>
      <text:p text:style-name="P160">cada ip es unica o pueden her 2 iguales para qie llegie como es la informacion</text:p>
      <text:p text:style-name="P161"/>
      <text:p text:style-name="P162">ip signifkca interne protcol oh protocolo de internet</text:p>
      <text:p text:style-name="P162"/>
      <text:p text:style-name="P162"><text:soft-page-break/>lo qie se hce es prganizar estos numeros en 4 numos diferentes que contiene 4 bites osea 8 bits y el numero maximo a representar son 8 bits</text:p>
      <text:p text:style-name="P162"/>
      <text:p text:style-name="P163">de 0 a 255 es el mximo de bits que podemos presentar <text:span text:style-name="T144">en total 256 que podemo expresar en 8 bits</text:span></text:p>
      <text:p text:style-name="P163"/>
      <text:p text:style-name="P164">esa es la razon d que solo puedes teer 255.255.255.255 maimo numer<text:span text:style-name="T145">os</text:span></text:p>
      <text:p text:style-name="P162"/>
      <text:p text:style-name="P164">si se tomaran esos numero y se expadieran a 0 y 1, </text:p>
      <text:p text:style-name="P164">si cada uno tuviera 8 bits son 4 gryupos estos serian 8x4 <text:span text:style-name="T145">te fiendo 32 bits</text:span></text:p>
      <text:p text:style-name="P164"/>
      <text:p text:style-name="P165">qie se agrupab en numero decimales normales, esto fue constituido <text:span text:style-name="T146">por el agencoa darpa quie creo esa estructrta para nteret mas sin embargo <text:s/></text:span><text:span text:style-name="T147">se voeve superpopular y lo antiene hasta que los numeros se acaben y eso sera posible </text:span><text:span text:style-name="T148">cu</text:span><text:span text:style-name="T147">ando se lleg</text:span><text:span text:style-name="T148">o</text:span><text:span text:style-name="T147"> al total de <text:s/>4.300.000.000 con</text:span><text:span text:style-name="T148">e</text:span><text:span text:style-name="T147">ctados a internet, todo eso requieren </text:span><text:span text:style-name="T148">que l</text:span><text:span text:style-name="T147">a ip deben ser unicas y persistentes ese problema ya que se hiba a acabar lo</text:span><text:span text:style-name="T149">s </text:span><text:span text:style-name="T147">conocemos desde el 98 </text:span><text:span text:style-name="T150">por lo cual se crearon los ipv6</text:span></text:p>
      <text:p text:style-name="P162"/>
      <text:p text:style-name="P162"><text:s/><text:span text:style-name="T151">pu</text:span><text:span text:style-name="T149">e</text:span><text:span text:style-name="T151">sto q</text:span><text:span text:style-name="T149">u</text:span><text:span text:style-name="T151">e se a</text:span><text:span text:style-name="T149">c</text:span><text:span text:style-name="T151">abaron las d</text:span><text:span text:style-name="T152">i</text:span><text:span text:style-name="T151">recciones </text:span><text:span text:style-name="T149">se creo este protocolo</text:span></text:p>
      <text:p text:style-name="P162"/>
      <text:p text:style-name="P162"/>
      <text:p text:style-name="P162"/>
      <text:p text:style-name="P166">no exacyamnte no van a ver</text:p>
      <text:p text:style-name="P166">este fie creado para tener mucho mas espacio cuadruplicado.</text:p>
      <text:p text:style-name="P166"/>
      <text:p text:style-name="P167">Una doreccion <text:s/>ipv6 tiene 8 grupos que se reresetan 4 digitos hexadecimales una baee numericas <text:tab/>ue tiene digoos del 0 a la f osea <text:s/>apartor de la e representan los numeros que sigo</text:p>
      <text:p text:style-name="P167">en ipv6 se comprime la doreccion de los numeros ciando est es muy larga y solo tiene 00</text:p>
      <text:p text:style-name="P167"/>
      <text:p text:style-name="P168">darpa no creyo que internet tendria poúlarodad , por lo cial y debido a que los co mputadores conectados se crearon mas organizaciones pa asignae iop permanentes</text:p>
      <text:p text:style-name="P168"/>
      <text:p text:style-name="P169">iana es la que asigna esos numeros ip permanentes</text:p>
      <text:p text:style-name="P169"/>
      <text:p text:style-name="P169">las conexiones de ytu casaqe se creean deben de tene una ip unica, aunque se conecte a la re global donde esta youtube servidores etc</text:p>
      <text:p text:style-name="P169"/>
      <text:p text:style-name="P169">la ip loal es doferente cuando es local o global</text:p>
      <text:p text:style-name="P169"/>
      <text:p text:style-name="P169"/>
      <text:p text:style-name="P169">mi localhost es la ip 127.0.0.1</text:p>
      <text:p text:style-name="P169"/>
      <text:p text:style-name="P169"/>
      <text:p text:style-name="P169">sin i portar las ip local </text:p>
      <text:p text:style-name="P169">cuano tu tv telefono etc usan las conexiones mediante ip local</text:p>
      <text:p text:style-name="P169">ese paquete de ip local se transmite al internet global y luego va al internet global y al regresar el troute gracuas a esa ip local sabe <text:s/>a donde mandar la informacion, esto lo hace internamene atraves de una NAT</text:p>
      <text:p text:style-name="P169"/>
      <text:p text:style-name="P169"><text:soft-page-break/>que transforma las peticiones ocales a una red extern en internet</text:p>
      <text:p text:style-name="P169"/>
      <text:p text:style-name="P170">un domino es la aignacion de un nomvre para una serie de numeros esowcoficos</text:p>
      <text:p text:style-name="P170"/>
      <text:p text:style-name="P171">nombes de dominios atraves de nameships</text:p>
      <text:p text:style-name="P171"/>
      <text:p text:style-name="P172">trodas las computasoras tienen telefonos etc tiemnen una larga lista de numeros oara su ip que nadie recxuerda se necesota una baese de dattos para ponerles nom brss nombres <text:span text:style-name="T153">estos bvebian un archivo que se compartia en los proveedores de internet sinembrgo no escala debido a que tenemoas caroas cojmbinaciones </text:span><text:span text:style-name="T154">de nombres y por eso no <text:s/>escala</text:span></text:p>
      <text:p text:style-name="P173"><text:span text:style-name="T154">por eso se dreo ua base da datos que tiene como base mecanosm os interacionales </text:span><text:span text:style-name="T155">y mecanismos internacionales esa base se conoce como nombres de domio</text:span><text:span text:style-name="T156">nio <text:s text:c="2"/>dns es lo qie poe4rmote yun numero sea exacvtamente equivalente a cosas como platzi.com</text:span></text:p>
      <text:p text:style-name="P174">siguiendo las reglas de ivbp4</text:p>
      <text:p text:style-name="P173">.</text:p>
      <text:p text:style-name="P174">estos solo usab letras del idioma ingkles, comienzan con una letra aunque ahi casos donde esyos no es asi ejmeplo usan ñ oh tildes comiebzan por numeros; y no distingen entre mayusculas y minusculas</text:p>
      <text:p text:style-name="P174">una vez teniendo tu nombre se necesitan top levek domain oh tld un sofijo que <text:span text:style-name="T157">se le agrega a esos dominios los mas conocidois son .gov.com.net algunos son exvlusoivos para instituciones edicatovas y lo militar; tambieb est5a n los exvlusivo oara paises.</text:span></text:p>
      <text:p text:style-name="P174"/>
      <text:p text:style-name="P175">Todo esto se determia aleatoriamente </text:p>
      <text:p text:style-name="P176">aunwque se respeta el dominio .com</text:p>
      <text:p text:style-name="P176"/>
      <text:p text:style-name="P177">ren esta e0poca los dominios que no tenian relevamcia <text:s/>ahora a toernen como .ia </text:p>
      <text:p text:style-name="P177"/>
      <text:p text:style-name="P177"/>
      <text:p text:style-name="P178">rl dominio no es lo mismo wue tener una pahi a web solo el derecho a que unn umero ip tenga <text:s/>una direccion como tal</text:p>
      <text:p text:style-name="P178">ya que escmad interesante contar que tienes una pajina web con un dominio propio</text:p>
      <text:p text:style-name="P178">hoy endia casi no hay npombres .com entonces swe debewn buscxar otros vo barajar ahasta enconbtrar el indicad; aun asi mucha gente que quiere tener un dominio ´rou+¿oo debe e <text:s/>comprarle a yterceras personas esto siendo todo un negocio</text:p>
      <text:p text:style-name="P178">uno de los as carpo es business.com</text:p>
      <text:p text:style-name="P178">y google recibio el suyo despues de que un empleado lo compro</text:p>
      <text:p text:style-name="P178">y si un lo compra pueden aerle el copyrgotght por derechos de autor</text:p>
      <text:p text:style-name="P178">nameship.com es usado para comprar dominioos.</text:p>
      <text:p text:style-name="P178">Godaddy usa mslas practicas <text:span text:style-name="T158">como la reventa dse dominios</text:span></text:p>
      <text:p text:style-name="P178"><text:s/><text:span text:style-name="T158">buscar en nameship el dominio que te parezca mas econimcos </text:span><text:span text:style-name="T159">le ayades al corrito y tamboien vende nameship otras cosas como histing wodr´press ssl</text:span></text:p>
      <text:p text:style-name="P179">dominio y correo electronico son cosas apartes</text:p>
      <text:p text:style-name="P179">se checjean y se realiza las comprar</text:p>
      <text:p text:style-name="P179">la provacidad de dominio es impor5ate pero solo ecesitas <text:s/>colocar el nombre y quien es el dueño</text:p>
      <text:p text:style-name="P179"/>
      <text:p text:style-name="P179">y estoen la provacidas significa que nadie sabe quienec sel deño del dominio una vez comprado se debe onfigurar el dominio <text:s/><text:span text:style-name="T160">tebnoiendo siferentes nombres los mas importantes es el e records apuntando donde esta el servodor.</text:span></text:p>
      <text:p text:style-name="P179"><text:soft-page-break/><text:s/><text:span text:style-name="T160">Y los cname records ckn un punto como ejempolo docs,google.com</text:span></text:p>
      <text:p text:style-name="P180">docs es el subdominio una cea tienes tu dominio <text:s/>y le apuntas a una ip y por lp tanto debes de crearla a como una computadoras. Sirviendo como tipicamente como un sitio web osea se ubica el no,bre a la nube <text:s/>una computadora de un datacenter para montarlo en la nube</text:p>
      <text:p text:style-name="P180"/>
      <text:p text:style-name="P180"/>
      <text:p text:style-name="P181">estas en tu computadora y escribes platizi.com esto pueso atraves del modelocliente-servidor lo qie oxurre internamente es qje al darke enter tu navegador es el cliente luego este lo mamda al routewr <text:span text:style-name="T161">transformandolo a un ip esa es la aservodor y es ahi donde estan los datos y liuego este responde <text:s/>con los datos solicitado </text:span><text:span text:style-name="T162">ppr, detras no solo pasa eso <text:s/>los telefonos traen el responsivo </text:span><text:span text:style-name="T163">esto se hace mediante el a</text:span><text:span text:style-name="T164">g</text:span><text:span text:style-name="T163">ente de usuario que indica <text:s/></text:span><text:span text:style-name="T165">el disposotivo el navegador etc </text:span></text:p>
      <text:p text:style-name="P182">eso lo hace conociendode antemano quien eres tu, <text:span text:style-name="T166">por qu</text:span><text:span text:style-name="T167">e cuando te logeas</text:span><text:span text:style-name="T168">t</text:span><text:span text:style-name="T167">e eñ sevodor guardo esa informacion</text:span></text:p>
      <text:p text:style-name="P182"><text:s/><text:span text:style-name="T169">esop se le llama cookie <text:s/>a</text:span><text:span text:style-name="T168">sig</text:span><text:span text:style-name="T169">nados </text:span><text:span text:style-name="T168">al dominio de </text:span><text:span text:style-name="T170">l</text:span><text:span text:style-name="T168">a </text:span><text:span text:style-name="T170">pe</text:span><text:span text:style-name="T168">icion que estas </text:span><text:span text:style-name="T171">h</text:span><text:span text:style-name="T168">aciendo, </text:span><text:span text:style-name="T171">y estas viajan siempre en la cabecra c</text:span><text:span text:style-name="T172">uando </text:span><text:span text:style-name="T171"><text:s/></text:span><text:span text:style-name="T172">ingresas con esos datos, </text:span><text:span text:style-name="T173">aunque esto no ocurre de toso <text:s/>primerro <text:s/></text:span></text:p>
      <text:p text:style-name="P182"/>
      <text:p text:style-name="P183">htrml trae texto y referencias a css</text:p>
      <text:p text:style-name="P183"/>
      <text:p text:style-name="P184">css define el estilo grafico cdel navegasor</text:p>
      <text:p text:style-name="P184">js define como va a respikbdse la pagina web</text:p>
      <text:p text:style-name="P184"/>
      <text:p text:style-name="P184">get son varoables qye voiajan por la url</text:p>
      <text:p text:style-name="P184">post es un metodo que va en eñl hewader y la respuesta es exclusiva y asi no se vewra la contraseña</text:p>
      <text:p text:style-name="P184">en el navegador ´para ptros</text:p>
      <text:p text:style-name="P184">500 es para eeror no enclntyrado</text:p>
      <text:p text:style-name="P184">200 oki</text:p>
      <text:p text:style-name="P184"/>
      <text:p text:style-name="P184">400 no esta fincionabndo</text:p>
      <text:p text:style-name="P184">300 redireccion</text:p>
      <text:p text:style-name="P184"/>
      <text:p text:style-name="P184">imap es un ejemplo de <text:s/>apos</text:p>
      <text:p text:style-name="P184"/>
      <text:p text:style-name="P184">los peotocolos son diferentes para </text:p>
      <text:p text:style-name="P184">telefonos usan el protocolo</text:p>
      <text:p text:style-name="P184"/>
      <text:p text:style-name="P184">muy puocas empresas manejar el ´protocolo del correo electronico</text:p>
      <text:p text:style-name="P184"/>
      <text:p text:style-name="P184">en telefon</text:p>
      <text:p text:style-name="P184">usan java clotoin oh <text:s/>swift</text:p>
      <text:p text:style-name="P184"/>
      <text:p text:style-name="P184">y usan hsson para guardsar los datos</text:p>
      <text:p text:style-name="P184">xml empresan estructira datos nornales</text:p>
      <text:p text:style-name="P184"/>
      <text:p text:style-name="P184">usan htpps para pr<text:span text:style-name="T174">o</text:span>ticolos</text:p>
      <text:p text:style-name="P184"/>
      <text:p text:style-name="P185">+</text:p>
      <text:p text:style-name="P185"/>
      <text:p text:style-name="P185"><text:soft-page-break/>c´pm para cpmputradoras y unix poara servodpres.</text:p>
      <text:p text:style-name="P185"/>
      <text:p text:style-name="P186">Padres de los s<text:span text:style-name="T175">i</text:span>stemas operativos. <text:span text:style-name="T175">El </text:span><text:span text:style-name="T176">unixz es e padre de todos los sistemas operativois de lado de servidires</text:span></text:p>
      <text:p text:style-name="P187">e<text:span text:style-name="T177">estos se fueron frag</text:span><text:span text:style-name="T178">m</text:span><text:span text:style-name="T177">etados en diferentes modelos como el bsd </text:span><text:span text:style-name="T178">siste,as de investogacion</text:span></text:p>
      <text:p text:style-name="P188">creando empresas como micxro syatem </text:p>
      <text:p text:style-name="P188">y sustemas com freebdsd</text:p>
      <text:p text:style-name="P188"/>
      <text:p text:style-name="P188">la otra rama es inux esb <text:s/>linyuxz</text:p>
      <text:p text:style-name="P188">montado sibre una teoe<text:span text:style-name="T179">ria de software libre</text:span></text:p>
      <text:p text:style-name="P189">creando linux haasta una version donde se podria usar el sioftware libremente por u <text:s/>exoerto wie les dio la lkencis gnu /gpl</text:p>
      <text:p text:style-name="P189"/>
      <text:p text:style-name="P189"/>
      <text:p text:style-name="P189">xerox parc creo la primera computasora con interfaz graficxas en ventanaws y creaando el conceotos de mouse</text:p>
      <text:p text:style-name="P189"/>
      <text:p text:style-name="P189">y steve jobvs se rtomo el conceoto y lo implemebnto en lisa <text:s/>y luego mac que sew volvio una computadoea de distribicion masiva.</text:p>
      <text:p text:style-name="P190">Micrisoft compro dos y luego terminan <text:s/>creando microsoft dos esto todavia cuando no eran famosoas </text:p>
      <text:p text:style-name="P190">y <text:s/>sustrajeron ideas del mac y crearon la baes del windows.</text:p>
      <text:p text:style-name="P190"/>
      <text:p text:style-name="P191">Archivos y mtadatos</text:p>
      <text:p text:style-name="P191"/>
      <text:p text:style-name="P73">los formatos de archivo sn <text:s/>como se identofica ua imagen b un sstema operativo <text:s/>como un excel, pdf vodeo y alfgunas veces no es muy claro el tipo de archivo uno de los mecaismos ára identoficar una</text:p>
      <text:p text:style-name="P73"/>
      <text:p text:style-name="P73">si el nombre del archivo es txt es texto doc word etc</text:p>
      <text:p text:style-name="P73"/>
      <text:p text:style-name="P73"/>
      <text:p text:style-name="P73">¡Hola, Santiago! Exactamente. Un archivo, en su nivel más fundamental, es una secuencia de 1s y 0s (bits) organizados en bytes.</text:p>
      <text:p text:style-name="P73"/>
      <text:p text:style-name="P73">Cuando envías un archivo a través de Internet, lo que realmente ocurre es que esa cadena de bits viaja desde tu computadora hacia un servidor (como un "almacén" intermedio o final). El servidor recibe esos bits y, basándose en la cabecera (los primeros bytes que actúan como "número mágico") o en el tipo MIME que le asignes, sabe cómo reconstruir o interpretar esa información para que luego pueda ser descargada o visualizada correctamente por otro usuario.</text:p>
      <text:p text:style-name="P73"/>
      <text:p text:style-name="P73">Es como enviar un paquete sellado: el contenido son los datos, y la etiqueta (cabecera/MIME) le dice al sistema qué hay dentro para que no intente abrir un video como si fuera un documento de texto.</text:p>
      <text:p text:style-name="P73"/>
      <text:p text:style-name="P73">Para profundizar, te recomiendo:</text:p>
      <text:p text:style-name="P73"/>
      <text:p text:style-name="P73">"Redes e Internet"</text:p>
      <text:p text:style-name="P73">"Archivos y estructuras de datos"</text:p>
      <text:p text:style-name="P73"/>
      <text:p text:style-name="P73"><text:soft-page-break/></text:p>
      <text:p text:style-name="P73">Publicar respuesta</text:p>
      <text:p text:style-name="P73">osea mi teoria seria correcta?</text:p>
      <text:p text:style-name="P73">Santiago</text:p>
      <text:p text:style-name="P73">Freddy</text:p>
      <text:p text:style-name="P73">Notas de Freddy:</text:p>
      <text:p text:style-name="P73">¡Así es, Santiago! Tu razonamiento es totalmente correcto.</text:p>
      <text:p text:style-name="P73"/>
      <text:p text:style-name="P73">Lo has entendido perfectamente: un archivo es, en esencia, una secuencia de bits (1s y 0s) que se almacena de forma persistente. Cuando lo envías a un servidor, estás transmitiendo esa misma secuencia a través de la red. El servidor actúa como un punto de almacenamiento donde esos bits quedan guardados, esperando a que alguien más los solicite.</text:p>
      <text:p text:style-name="P73"/>
      <text:p text:style-name="P73">Al ser solo datos binarios, el archivo es "agnóstico" al lugar donde esté; lo que importa es que el sistema que lo recibe sepa interpretar esos 1s y 0s correctamente (usando la cabecera o el tipo MIME, como vimos).</text:p>
      <text:p text:style-name="P73"/>
      <text:p text:style-name="P73">Para seguir construyendo sobre esto, te recomiendo revisar:</text:p>
      <text:p text:style-name="P73"/>
      <text:p text:style-name="P73">"Qué son las bases de datos"</text:p>
      <text:p text:style-name="P73">"Modelo Cliente/Servidor: ¿Cómo funciona un sitio web?"</text:p>
      <text:p text:style-name="P73"/>
      <text:p text:style-name="P73"/>
      <text:p text:style-name="P73">Publicar respuesta</text:p>
      <text:p text:style-name="P73">cuando uso bittorrent ejemplo ese seria como mi servdpr local y lo compato a otro srefvodor ekemplo cuanfp ubes un juego como avatar de esa fprma?</text:p>
      <text:p text:style-name="P73">Santiago</text:p>
      <text:p text:style-name="P73">Freddy</text:p>
      <text:p text:style-name="P73">Notas de Freddy:</text:p>
      <text:p text:style-name="P73">¡Exacto, Santiago! Vas por muy buen camino.</text:p>
      <text:p text:style-name="P73"/>
      <text:p text:style-name="P73">En el caso de BitTorrent, tu computadora no solo actúa como un "servidor local", sino que se convierte en parte de una red P2P (Peer-to-Peer). En lugar de subir el archivo a un servidor central gigante, lo compartes directamente con otros usuarios que también están descargando el mismo archivo.</text:p>
      <text:p text:style-name="P73"/>
      <text:p text:style-name="P73">Tu computadora: Funciona como un nodo que sirve los datos (los 1s y 0s) a otros.</text:p>
      <text:p text:style-name="P73">El servidor central: En BitTorrent, suele haber un "tracker" que solo ayuda a los usuarios a encontrarse entre sí, pero no necesariamente almacena el archivo completo.</text:p>
      <text:p text:style-name="P73">Cuando descargas un juego, el proceso es el mismo: los datos viajan en paquetes de bits. La diferencia es la arquitectura: en la web tradicional, descargas de un servidor central; en BitTorrent, descargas fragmentos de muchas personas a la vez.</text:p>
      <text:p text:style-name="P73"/>
      <text:p text:style-name="P73">Te recomiendo revisar:</text:p>
      <text:p text:style-name="P73"/>
      <text:p text:style-name="P73">"Modelo Cliente/Servidor: ¿Cómo funciona un sitio web?"</text:p>
      <text:p text:style-name="P73"/>
      <text:p text:style-name="P73"/>
      <text:p text:style-name="P73"><text:soft-page-break/>Publicar respuesta</text:p>
      <text:p text:style-name="P73">osea es como un cliente mas directo solo qie el coiente a la vez es servodpr?</text:p>
      <text:p text:style-name="P73">Santiago</text:p>
      <text:p text:style-name="P73">Freddy</text:p>
      <text:p text:style-name="P73">Notas de Freddy:</text:p>
      <text:p text:style-name="P73">¡Exactamente, Santiago! Has dado en el clavo. A ese modelo se le llama red P2P (Peer-to-Peer) o "de par a par".</text:p>
      <text:p text:style-name="P73"/>
      <text:p text:style-name="P73">En este esquema, no hay una jerarquía donde uno es siempre el servidor y otro siempre el cliente. Cada computadora en la red actúa como un "servidor" (cuando comparte o envía fragmentos del archivo) y como un "cliente" (cuando solicita y recibe fragmentos de otros).</text:p>
      <text:p text:style-name="P73"/>
      <text:p text:style-name="P73">Es una forma muy eficiente de distribuir archivos grandes, porque la carga de trabajo se reparte entre todos los usuarios en lugar de depender de un solo servidor central que podría colapsar.</text:p>
      <text:p text:style-name="P73"/>
      <text:p text:style-name="P73">Para entender mejor cómo se conectan estos equipos, te recomiendo revisar:</text:p>
      <text:p text:style-name="P73"/>
      <text:p text:style-name="P73">"Modelo Cliente/Servidor: ¿Cómo funciona un sitio web?"</text:p>
      <text:p text:style-name="P73">"Redes e Internet"</text:p>
      <text:p text:style-name="P73"/>
      <text:p text:style-name="P192">otra fprma es ver las 4 primeras letras del archivo si es textouno cualquiera e l sostema dira es teto oh no sabra lo que es <text:s text:c="2"/>pero con archivo como pdf vodeo se dara la defincion lo oe el archivo es</text:p>
      <text:p text:style-name="P192"/>
      <text:p text:style-name="P192">un archivo binario se representa como aski en teto normal en el lado izquierdo en <text:s/>el centr como exadecimal cada <text:s/>yse se expresa como un par de numeros hexadecimales a la derecha <text:s/>esta las 4 primera letras en bytes <text:s/><text:span text:style-name="T180">enci esta es la abecera y me indca qe tipo de acrchivo, esto es diferente con un doc wrd y pdf</text:span></text:p>
      <text:p text:style-name="P193">en los sevodpres we exosten subtipos de arcivos como texto imagen aplicación etc y estos son como texo plano, texto csv en imaen imagen png imagen jpg</text:p>
      <text:p text:style-name="P193"/>
      <text:p text:style-name="P193">los webp son optimizados parala web</text:p>
      <text:p text:style-name="P193">aplicación pdf</text:p>
      <text:p text:style-name="P193">estps son mmime types son una forma para qu e sevidores en internet sepan o qie esyan sirvoendo o leyendo</text:p>
      <text:p text:style-name="P193">aunque no es perfecto</text:p>
      <text:p text:style-name="P193">los sistemas operatovos definen el tipo de archivo miedoiante los primers 4 bytes <text:span text:style-name="T181">y la estructura de cabecera un archivo de teto plano es como su nombre lo indica texto solo</text:span></text:p>
      <text:p text:style-name="P194">ientras qe si tiene una extension como html, java aceript etc; indica qu ese texro posee una logoca detras</text:p>
      <text:p text:style-name="P193"/>
      <text:p text:style-name="P194">un comma separed values es un texto plano qe lo permite expresar como una tabña</text:p>
      <text:p text:style-name="P194"/>
      <text:p text:style-name="P194">esto sognifica qe si e habre un eedotor de tabñas esto lo camboa a una visulizacion tpo tabla.</text:p>
      <text:p text:style-name="P195">Aunque no sonofica de qe se excel aunqie es un archvo separado por comas qie se pueden ver mas facilmnte en una tabña</text:p>
      <text:p text:style-name="P195"/>
      <text:p text:style-name="P195">la cabecera <text:s/>es un cojunto de datoa represetadas en 0 donde se guardan metadatps.</text:p>
      <text:p text:style-name="P195"><text:soft-page-break/></text:p>
      <text:p text:style-name="P195">La cabecera <text:s/>es como tal la árte donde se idica omo se construyeron esos <text:s/>archivos</text:p>
      <text:p text:style-name="P195"/>
      <text:p text:style-name="P195">solo si eres un programador de esta estructira de datps neecesitas entenderlos <text:span text:style-name="T182">ya qie esto se decidio <text:s/>por 2que era una forma de ejorar eficiencoa con estps archivos.</text:span></text:p>
      <text:p text:style-name="P195"/>
      <text:p text:style-name="P196">Los metadatos son datos escondidos qe se pueden ver en sistemas operativos</text:p>
      <text:p text:style-name="P196">un ejemplo seroa <text:s/>el disposotivo con que se tomo oh creo el archivo, cuando se abrio <text:span text:style-name="T183">e</text:span>tc.</text:p>
      <text:p text:style-name="P196"/>
      <text:p text:style-name="P197">los pdf guardan muho metadatps</text:p>
      <text:p text:style-name="P197">la mayoria de los pdf no eran asi solo q<text:span text:style-name="T184">u</text:span>e v<text:span text:style-name="T184">i</text:span>enen de otros prpgramas como adobe ilustertor entre otros</text:p>
      <text:p text:style-name="P196"/>
      <text:p text:style-name="P198">se debe de teer cuidado cando crear el archivo original por qe si se puede ver el nombre original pueden surgir stuacipnes incomodas oh graciosas <text:span text:style-name="T185">pusto qe estainforacion puede envoarse por correo.</text:span></text:p>
      <text:p text:style-name="P198"/>
      <text:p text:style-name="P199">Los metadatps explican cual es la verson minima de una aplicación</text:p>
      <text:p text:style-name="P199">o como debes ejecutarlos</text:p>
      <text:p text:style-name="P199"/>
      <text:p text:style-name="P199"/>
      <text:p text:style-name="P199">en <text:s/>otros archovos en sus cabecera <text:s/>stab algomerados <text:s/>los tros tpos de archivos contnidos en este</text:p>
      <text:p text:style-name="P199"/>
      <text:p text:style-name="P199"/>
      <text:p text:style-name="P199">si se cambi la cabecera los archivos se vuelven ilegible<text:span text:style-name="T186">es</text:span></text:p>
      <text:p text:style-name="P200">un <text:s/>archovo no ds una base de datps</text:p>
      <text:p text:style-name="P199"/>
      <text:p text:style-name="P201">la estenanorafoa es <text:s/>esconder dats dentr de archivos ejemplo una imagen jpg se encoentra un xls</text:p>
      <text:p text:style-name="P201"/>
      <text:p text:style-name="P201">esta es unatecnica comun en districbisvion de virus en e l mundo de la inteligencia mlitar entre ptros</text:p>
      <text:p text:style-name="P201"/>
      <text:p text:style-name="P201"/>
      <text:p text:style-name="P201"/>
      <text:p text:style-name="P202">qe son las bases de datos</text:p>
      <text:p text:style-name="P203">las bases de datos son:<text:span text:style-name="T187">conjuntos de datos dividids en cam</text:span><text:span text:style-name="T188">pos con variables de tipo especifico que tienen reglas por lo cual no debn d</text:span><text:span text:style-name="T189">e</text:span><text:span text:style-name="T188"> tener redundacia.</text:span></text:p>
      <text:p text:style-name="P204">Luego se conectan entre si</text:p>
      <text:p text:style-name="P204"/>
      <text:p text:style-name="P204"><text:soft-page-break/>se revisa en ests los id numero unico de ifetificacion y demas datos como nombre contraseña oh correo.</text:p>
      <text:p text:style-name="P204"/>
      <text:p text:style-name="P204">Es una bueno idea guardam<text:span text:style-name="T190">o</text:span>s la fecha de reg<text:span text:style-name="T190">i</text:span>stro</text:p>
      <text:p text:style-name="P204"/>
      <text:p text:style-name="P205">pst son creados por el usuario por lo tanto en oira tabl se traen umeros de ese usuariio correspondietes al id del usuario</text:p>
      <text:p text:style-name="P205">aun asi ese post necesota su propio id</text:p>
      <text:p text:style-name="P205">este toene su <text:s/>propio contenido como fecha contadpr de comentarios contadpr me gudta</text:p>
      <text:p text:style-name="P205">una llave peimaria indntificador unico de los registros de la tabla</text:p>
      <text:p text:style-name="P205"/>
      <text:p text:style-name="P205">llave forenea llave de oitra tabla que puede trar esps datps</text:p>
      <text:p text:style-name="P205">llave primaria idenoficador unico de cada uno de los registros de la tabla.</text:p>
      <text:p text:style-name="P205"/>
      <text:p text:style-name="P205">Los comentraeros se gu<text:span text:style-name="T191">a</text:span>rdan en una tablase dejan comentarios tablas</text:p>
      <text:p text:style-name="P205"/>
      <text:p text:style-name="P205"><text:soft-page-break/></text:p>
      <text:p text:style-name="P206">llave foranea <text:s/>de post id se co<text:span text:style-name="T192">n</text:span>ecta con latabña post y el userid con e comentarios</text:p>
      <text:p text:style-name="P206"/>
      <text:p text:style-name="P207">las bases de datos son comljas</text:p>
      <text:p text:style-name="P207">y existen</text:p>
      <text:p text:style-name="P206"/>
      <text:p text:style-name="P206"/>
      <text:p text:style-name="P207">varoas eherramientas como microsoft</text:p>
      <text:p text:style-name="P205"><text:span text:style-name="T192">acess</text:span></text:p>
      <text:p text:style-name="P207">tambien sql lite</text:p>
      <text:p text:style-name="P207">lo mas uado es mysql</text:p>
      <text:p text:style-name="P207">oracle en nivel profesional</text:p>
      <text:p text:style-name="P207"/>
      <text:p text:style-name="P207">microsoft sql server</text:p>
      <text:p text:style-name="P207">los prpyecos peofsionales como platzi usan posgrest estps son motores de bases de datos</text:p>
      <text:p text:style-name="P207">que almacenan en el disco duro en doferentes archivos</text:p>
      <text:p text:style-name="P207"/>
      <text:p text:style-name="P207">en una gran compania millones de personas dben de modifocar ests archcbos muy probablemente</text:p>
      <text:p text:style-name="P207"/>
      <text:p text:style-name="P207"><text:soft-page-break/>sql es el lenfuaje de prgramacion para consultar la base de datos</text:p>
      <text:p text:style-name="P207"/>
      <text:p text:style-name="P207">sql <text:s/>significa structured query lenguage</text:p>
      <text:p text:style-name="P207"/>
      <text:p text:style-name="P208">sequel fue una de las primeras bases de datos</text:p>
      <text:p text:style-name="P207"/>
      <text:p text:style-name="P208">en sql si quisieramos</text:p>
      <text:p text:style-name="P207"/>
      <text:p text:style-name="P208">seleccionar los comentarios cuyo nombre comience por la f se selecciona toda la tabla de comentarios</text:p>
      <text:p text:style-name="P208">y demas que se ven <text:s/>otro crso</text:p>
      <text:p text:style-name="P208"/>
      <text:p text:style-name="P208"/>
      <text:p text:style-name="P208">las bases de datos se conecta con aplicaciones diferentes a los archivos, puestos qu estps tienen mas reglas dfrerentes <text:s/>a los archivo, lo mas comun al practocar backend oh de aplicación movil e s cmo conectar estas bases <text:s/>a las aplicacioes</text:p>
      <text:p text:style-name="P208">todo es comun y necesario para cualquier empeo de desarrollo de software</text:p>
      <text:p text:style-name="P208"/>
      <text:p text:style-name="P208"><text:soft-page-break/>las bases de datos <text:s/>dodcumentales <text:s/>osea nosql son como tablitas de excel</text:p>
      <text:p text:style-name="P208">base de datps grafcos y bases dellave y valor</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CO"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CO"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paragraph-rsid="01979a1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01T08:59:30.084703700</meta:creation-date>
    <dc:date>2026-04-02T14:50:34.058278500</dc:date>
    <meta:editing-duration>P3DT11H17M25S</meta:editing-duration>
    <meta:editing-cycles>236</meta:editing-cycles>
    <meta:generator>LibreOffice/25.8.5.2$Windows_X86_64 LibreOffice_project/9c8b85f387cc00a89945a79c9e6239f32e450ac2</meta:generator>
    <meta:document-statistic meta:table-count="0" meta:image-count="0" meta:object-count="0" meta:page-count="26" meta:paragraph-count="508" meta:word-count="8385" meta:character-count="47646" meta:non-whitespace-character-count="39412"/>
  </office:meta>
</office:document-meta>
</file>