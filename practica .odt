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4b6" officeooo:paragraph-rsid="000c64b6"/>
    </style:style>
    <style:style style:name="P2" style:family="paragraph" style:parent-style-name="Standard">
      <style:text-properties officeooo:rsid="000cc6c6" officeooo:paragraph-rsid="000cc6c6"/>
    </style:style>
    <style:style style:name="P3" style:family="paragraph" style:parent-style-name="Standard">
      <style:text-properties officeooo:rsid="000cd996" officeooo:paragraph-rsid="000cd996"/>
    </style:style>
    <style:style style:name="P4" style:family="paragraph" style:parent-style-name="Standard">
      <style:text-properties officeooo:rsid="000d7d4b" officeooo:paragraph-rsid="000d7d4b"/>
    </style:style>
    <style:style style:name="P5" style:family="paragraph" style:parent-style-name="Standard">
      <style:text-properties officeooo:rsid="000e6441" officeooo:paragraph-rsid="000e6441"/>
    </style:style>
    <style:style style:name="P6" style:family="paragraph" style:parent-style-name="Standard">
      <style:text-properties officeooo:rsid="000e6441" officeooo:paragraph-rsid="0011c2af"/>
    </style:style>
    <style:style style:name="P7" style:family="paragraph" style:parent-style-name="Standard">
      <style:text-properties officeooo:rsid="00135f42" officeooo:paragraph-rsid="00135f42"/>
    </style:style>
    <style:style style:name="P8" style:family="paragraph" style:parent-style-name="Standard">
      <style:text-properties officeooo:rsid="00141f41" officeooo:paragraph-rsid="00141f41"/>
    </style:style>
    <style:style style:name="P9" style:family="paragraph" style:parent-style-name="Standard">
      <style:text-properties officeooo:rsid="0014506e" officeooo:paragraph-rsid="0014506e"/>
    </style:style>
    <style:style style:name="P10" style:family="paragraph" style:parent-style-name="Standard">
      <style:text-properties officeooo:rsid="00189b08" officeooo:paragraph-rsid="00189b08"/>
    </style:style>
    <style:style style:name="P11" style:family="paragraph" style:parent-style-name="Standard">
      <style:text-properties officeooo:rsid="0014506e" officeooo:paragraph-rsid="00189b08"/>
    </style:style>
    <style:style style:name="P12" style:family="paragraph" style:parent-style-name="Standard">
      <style:text-properties officeooo:rsid="0018cbd9" officeooo:paragraph-rsid="0018cbd9"/>
    </style:style>
    <style:style style:name="P13" style:family="paragraph" style:parent-style-name="Standard">
      <style:text-properties officeooo:rsid="00191207" officeooo:paragraph-rsid="00191207"/>
    </style:style>
    <style:style style:name="P14" style:family="paragraph" style:parent-style-name="Standard">
      <style:text-properties officeooo:rsid="001b3831" officeooo:paragraph-rsid="001b3831"/>
    </style:style>
    <style:style style:name="P15" style:family="paragraph" style:parent-style-name="Standard">
      <style:text-properties officeooo:rsid="001b88b3" officeooo:paragraph-rsid="001b88b3"/>
    </style:style>
    <style:style style:name="P16" style:family="paragraph" style:parent-style-name="Standard">
      <style:text-properties officeooo:rsid="0020aacb" officeooo:paragraph-rsid="0020aacb"/>
    </style:style>
    <style:style style:name="P17" style:family="paragraph" style:parent-style-name="Standard">
      <style:text-properties officeooo:rsid="002211a9" officeooo:paragraph-rsid="002211a9"/>
    </style:style>
    <style:style style:name="P18" style:family="paragraph" style:parent-style-name="Standard">
      <style:text-properties fo:font-size="15pt" officeooo:rsid="000c64b6" officeooo:paragraph-rsid="000c64b6" style:font-size-asian="15pt" style:font-size-complex="15pt"/>
    </style:style>
    <style:style style:name="P19" style:family="paragraph" style:parent-style-name="Standard">
      <style:text-properties fo:font-variant="normal" fo:text-transform="none" fo:color="#1d1c1d" loext:opacity="100%" style:font-name="Monaco" fo:font-size="15pt" fo:letter-spacing="normal" fo:font-style="normal" fo:font-weight="normal" officeooo:rsid="000c64b6" officeooo:paragraph-rsid="000c64b6" style:font-size-asian="15pt" style:font-size-complex="15pt"/>
    </style:style>
    <style:style style:name="P20" style:family="paragraph" style:parent-style-name="Standard">
      <style:text-properties fo:font-variant="normal" fo:text-transform="none" fo:color="#1d1c1d" loext:opacity="100%" style:font-name="Monaco" fo:font-size="15pt" fo:letter-spacing="normal" fo:font-style="normal" fo:font-weight="normal" officeooo:rsid="00222e17" officeooo:paragraph-rsid="00222e17" style:font-size-asian="15pt" style:font-size-complex="15pt"/>
    </style:style>
    <style:style style:name="P21" style:family="paragraph" style:parent-style-name="Standard">
      <style:text-properties fo:font-variant="normal" fo:text-transform="none" fo:color="#1d1c1d" loext:opacity="100%" style:font-name="Monaco" fo:font-size="15pt" fo:letter-spacing="normal" fo:font-style="normal" fo:font-weight="normal" officeooo:rsid="00222e17" officeooo:paragraph-rsid="000c64b6" style:font-size-asian="15pt" style:font-size-complex="15pt"/>
    </style:style>
    <style:style style:name="P22" style:family="paragraph" style:parent-style-name="Standard">
      <style:text-properties fo:font-variant="normal" fo:text-transform="none" fo:color="#1d1c1d" loext:opacity="100%" style:font-name="Monaco" fo:font-size="15pt" fo:letter-spacing="normal" fo:font-style="normal" fo:font-weight="normal" officeooo:rsid="002301ae" officeooo:paragraph-rsid="002301ae" style:font-size-asian="15pt" style:font-size-complex="15pt"/>
    </style:style>
    <style:style style:name="P23" style:family="paragraph" style:parent-style-name="Standard">
      <style:text-properties fo:font-variant="normal" fo:text-transform="none" fo:color="#1d1c1d" loext:opacity="100%" style:font-name="Monaco" fo:font-size="15pt" fo:letter-spacing="normal" fo:font-style="normal" fo:font-weight="normal" officeooo:rsid="002b945a" officeooo:paragraph-rsid="002b945a" style:font-size-asian="15pt" style:font-size-complex="15pt"/>
    </style:style>
    <style:style style:name="P24" style:family="paragraph" style:parent-style-name="Standard">
      <style:text-properties fo:font-variant="normal" fo:text-transform="none" fo:color="#1d1c1d" loext:opacity="100%" style:font-name="Monaco" fo:font-size="15pt" fo:letter-spacing="normal" fo:font-style="normal" fo:font-weight="normal" officeooo:rsid="002d7512" officeooo:paragraph-rsid="002d7512" style:font-size-asian="15pt" style:font-size-complex="15pt"/>
    </style:style>
    <style:style style:name="P25" style:family="paragraph" style:parent-style-name="Standard">
      <style:text-properties fo:font-variant="normal" fo:text-transform="none" fo:color="#1d1c1d" loext:opacity="100%" style:font-name="Monaco" fo:font-size="15pt" fo:letter-spacing="normal" fo:font-style="normal" fo:font-weight="normal" officeooo:rsid="002fe1c3" officeooo:paragraph-rsid="002fe1c3" style:font-size-asian="15pt" style:font-size-complex="15pt"/>
    </style:style>
    <style:style style:name="P26" style:family="paragraph" style:parent-style-name="Standard">
      <style:text-properties fo:font-variant="normal" fo:text-transform="none" fo:color="#1d1c1d" loext:opacity="100%" style:font-name="Monaco" fo:font-size="15pt" fo:letter-spacing="normal" fo:font-style="normal" fo:font-weight="normal" officeooo:rsid="002d7512" officeooo:paragraph-rsid="002fe1c3"/>
    </style:style>
    <style:style style:name="P27" style:family="paragraph" style:parent-style-name="Standard">
      <style:text-properties fo:font-variant="normal" fo:text-transform="none" fo:color="#1d1c1d" loext:opacity="100%" style:font-name="Monaco" fo:font-size="15pt" fo:letter-spacing="normal" fo:font-style="normal" fo:font-weight="normal" officeooo:rsid="002d7512" officeooo:paragraph-rsid="002d7512"/>
    </style:style>
    <style:style style:name="P28" style:family="paragraph" style:parent-style-name="Standard">
      <style:text-properties fo:font-variant="normal" fo:text-transform="none" fo:color="#1d1c1d" loext:opacity="100%" style:font-name="Monaco" fo:font-size="15pt" fo:letter-spacing="normal" fo:font-style="normal" fo:font-weight="normal" officeooo:rsid="002e01c0" officeooo:paragraph-rsid="002e01c0" style:font-size-asian="15pt" style:font-size-complex="15pt"/>
    </style:style>
    <style:style style:name="P29" style:family="paragraph" style:parent-style-name="Standard">
      <style:text-properties fo:font-variant="normal" fo:text-transform="none" fo:color="#1d1c1d" loext:opacity="100%" style:font-name="Monaco" fo:font-size="15pt" fo:letter-spacing="normal" fo:font-style="normal" fo:font-weight="normal" officeooo:rsid="002d7512" officeooo:paragraph-rsid="002e01c0" style:font-size-asian="15pt" style:font-size-complex="15pt"/>
    </style:style>
    <style:style style:name="P30" style:family="paragraph" style:parent-style-name="Standard">
      <style:text-properties fo:font-variant="normal" fo:text-transform="none" fo:color="#1d1c1d" loext:opacity="100%" style:font-name="Monaco" fo:font-size="15pt" fo:letter-spacing="normal" fo:font-style="normal" fo:font-weight="normal" officeooo:rsid="002d7512" officeooo:paragraph-rsid="002e01c0"/>
    </style:style>
    <style:style style:name="P31" style:family="paragraph" style:parent-style-name="Standard">
      <style:text-properties fo:font-variant="normal" fo:text-transform="none" fo:color="#1d1c1d" loext:opacity="100%" style:font-name="Monaco" fo:font-size="14pt" fo:letter-spacing="normal" fo:font-style="normal" fo:font-weight="normal" officeooo:rsid="002d7512" officeooo:paragraph-rsid="002e01c0" style:font-size-asian="14pt" style:font-size-complex="14pt"/>
    </style:style>
    <style:style style:name="P32" style:family="paragraph" style:parent-style-name="Standard">
      <style:text-properties fo:font-variant="normal" fo:text-transform="none" fo:color="#1d1c1d" loext:opacity="100%" style:font-name="Droid Sans Fallback" fo:font-size="14pt" fo:letter-spacing="normal" fo:font-style="normal" fo:font-weight="normal" officeooo:rsid="002d7512" officeooo:paragraph-rsid="002e01c0" style:font-size-asian="14pt" style:font-size-complex="14pt"/>
    </style:style>
    <style:style style:name="P33" style:family="paragraph" style:parent-style-name="Standard">
      <style:text-properties style:font-name="Droid Sans Fallback" fo:font-size="14pt" officeooo:rsid="00312c28" officeooo:paragraph-rsid="00312c28" style:font-size-asian="14pt" style:font-size-complex="14pt"/>
    </style:style>
    <style:style style:name="P34" style:family="paragraph" style:parent-style-name="Standard">
      <style:text-properties style:font-name="Droid Sans Fallback" fo:font-size="14pt" officeooo:rsid="003693fd" officeooo:paragraph-rsid="003693fd" style:font-size-asian="14pt" style:font-size-complex="14pt"/>
    </style:style>
    <style:style style:name="P35" style:family="paragraph" style:parent-style-name="Standard">
      <style:text-properties style:font-name="Droid Sans Fallback" fo:font-size="14pt" officeooo:rsid="0034b629" officeooo:paragraph-rsid="0034b629" style:font-size-asian="14pt" style:font-size-complex="14pt"/>
    </style:style>
    <style:style style:name="T1" style:family="text">
      <style:text-properties officeooo:rsid="000cd996"/>
    </style:style>
    <style:style style:name="T2" style:family="text">
      <style:text-properties officeooo:rsid="00189b08"/>
    </style:style>
    <style:style style:name="T3" style:family="text">
      <style:text-properties officeooo:rsid="00164f27"/>
    </style:style>
    <style:style style:name="T4" style:family="text">
      <style:text-properties officeooo:rsid="0014506e"/>
    </style:style>
    <style:style style:name="T5" style:family="text">
      <style:text-properties officeooo:rsid="001a9a57"/>
    </style:style>
    <style:style style:name="T6" style:family="text">
      <style:text-properties officeooo:rsid="001ec171"/>
    </style:style>
    <style:style style:name="T7" style:family="text">
      <style:text-properties officeooo:rsid="001bb23c"/>
    </style:style>
    <style:style style:name="T8" style:family="text">
      <style:text-properties officeooo:rsid="001d47e8"/>
    </style:style>
    <style:style style:name="T9" style:family="text">
      <style:text-properties officeooo:rsid="002211a9"/>
    </style:style>
    <style:style style:name="T10" style:family="text">
      <style:text-properties officeooo:rsid="0025076a"/>
    </style:style>
    <style:style style:name="T11" style:family="text">
      <style:text-properties officeooo:rsid="00232bc2"/>
    </style:style>
    <style:style style:name="T12" style:family="text">
      <style:text-properties officeooo:rsid="00294a27"/>
    </style:style>
    <style:style style:name="T13" style:family="text">
      <style:text-properties officeooo:rsid="002301ae"/>
    </style:style>
    <style:style style:name="T14" style:family="text">
      <style:text-properties officeooo:rsid="002aa0a6"/>
    </style:style>
    <style:style style:name="T15" style:family="text">
      <style:text-properties officeooo:rsid="002fe1c3"/>
    </style:style>
    <style:style style:name="T16" style:family="text">
      <style:text-properties officeooo:rsid="002e01c0"/>
    </style:style>
    <style:style style:name="T17" style:family="text">
      <style:text-properties officeooo:rsid="002fe1c3" style:font-size-asian="15pt" style:font-size-complex="15pt"/>
    </style:style>
    <style:style style:name="T18" style:family="text">
      <style:text-properties style:font-size-asian="15pt" style:font-size-complex="15pt"/>
    </style:style>
    <style:style style:name="T19" style:family="text">
      <style:text-properties officeooo:rsid="002e01c0" style:font-size-asian="15pt" style:font-size-complex="15pt"/>
    </style:style>
    <style:style style:name="T20" style:family="text">
      <style:text-properties fo:font-size="14pt" officeooo:rsid="002e01c0" style:font-size-asian="14pt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officeooo:rsid="0032ed92"/>
    </style:style>
    <style:style style:name="T23" style:family="text">
      <style:text-properties officeooo:rsid="0033ce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cion: </text:p>
      <text:p text:style-name="P1"/>
      <text:p text:style-name="P1">algoritmo de mayor o menor</text:p>
      <text:p text:style-name="P1">inicio:</text:p>
      <text:p text:style-name="P1">introduce 2 valores <text:s/>distintos</text:p>
      <text:p text:style-name="P1"/>
      <text:p text:style-name="P2">12, 45</text:p>
      <text:p text:style-name="P2">si <text:s text:c="2"/>fueran igual se dira <text:s/>ambis numeros son iguales no hay uno mayor que el otro</text:p>
      <text:p text:style-name="P2">si por lo contrario aparece</text:p>
      <text:p text:style-name="P2">12 &lt; 45</text:p>
      <text:p text:style-name="P2">entonces 45 es mayor a 12</text:p>
      <text:p text:style-name="P2">por lo contario si aoarece diferente es 12 menor a 45</text:p>
      <text:p text:style-name="P2"/>
      <text:p text:style-name="P2">despues de que se presenten todos estos <text:span text:style-name="T1">caminos se termina la comparacion</text:span></text:p>
      <text:p text:style-name="P2"><text:s/></text:p>
      <text:p text:style-name="P3">algoritmo suma:</text:p>
      <text:p text:style-name="P3"/>
      <text:p text:style-name="P3">inicio</text:p>
      <text:p text:style-name="P3">introduce 2 numeros:</text:p>
      <text:p text:style-name="P3">2,2</text:p>
      <text:p text:style-name="P3">si son iguales la suma darra 4</text:p>
      <text:p text:style-name="P3">spor lo contrario la suma dara <text:s/>un numeo diferente</text:p>
      <text:p text:style-name="P3">fin se tyermina la suma</text:p>
      <text:p text:style-name="P3"/>
      <text:p text:style-name="P3">otro algoritmo suma:</text:p>
      <text:p text:style-name="P3"/>
      <text:p text:style-name="P4">inicio </text:p>
      <text:p text:style-name="P4">declaricion de variables suma</text:p>
      <text:p text:style-name="P4">n = 0 suma = 0</text:p>
      <text:p text:style-name="P4"/>
      <text:p text:style-name="P4">se asignar contador</text:p>
      <text:p text:style-name="P4">n = n +1</text:p>
      <text:p text:style-name="P4">asignación acumulador</text:p>
      <text:p text:style-name="P4">suma = suma +n</text:p>
      <text:p text:style-name="P4"><text:s/>si n es igual <text:s/>10 <text:s/>entonces escribir suma</text:p>
      <text:p text:style-name="P4">de lo contrario <text:s/>repetir paso 3</text:p>
      <text:p text:style-name="P4">se finaliza si n es igual a 10</text:p>
      <text:p text:style-name="P4"/>
      <text:p text:style-name="P5">igual a 100</text:p>
      <text:p text:style-name="P5"/>
      <text:p text:style-name="P6"/>
      <text:p text:style-name="P7">pares</text:p>
      <text:p text:style-name="P7">1.inicio</text:p>
      <text:p text:style-name="P7">2. <text:s/>n = 100 <text:s/>c = 1;</text:p>
      <text:p text:style-name="P7">3. el numero es numero par.</text:p>
      <text:p text:style-name="P7">4. si es par se suma <text:s text:c="3"/>contador</text:p>
      <text:p text:style-name="P7">5. sumar 1 al contador</text:p>
      <text:p text:style-name="P7">6. si c <text:s/>menor que 100 repeyir paso 3;</text:p>
      <text:p text:style-name="P7">7 retornar los numeros </text:p>
      <text:p text:style-name="P8">fin</text:p>
      <text:p text:style-name="P8"/>
      <text:p text:style-name="P8"/>
      <text:p text:style-name="P5"><text:soft-page-break/>primo:</text:p>
      <text:p text:style-name="P8">1. inicio</text:p>
      <text:p text:style-name="P8">2. n= 300 , c = 1;</text:p>
      <text:p text:style-name="P8">3. si el numero es positivo</text:p>
      <text:p text:style-name="P8">4. si el numero es impar</text:p>
      <text:p text:style-name="P8">5. se suma 1 al comtador</text:p>
      <text:p text:style-name="P8">6. si c es <text:s/>menor a 1 repetir paso 3</text:p>
      <text:p text:style-name="P8">7. imprimer sumatoria.</text:p>
      <text:p text:style-name="P8">8. fin</text:p>
      <text:p text:style-name="P8"/>
      <text:p text:style-name="P8"/>
      <text:p text:style-name="P9">hipotenysa triangulo</text:p>
      <text:p text:style-name="P9">1. inicio</text:p>
      <text:p text:style-name="P9">2. se declaran las variables catA y Catb.</text:p>
      <text:p text:style-name="P10">3. guardar catetos.</text:p>
      <text:p text:style-name="P9">3.se elevan al <text:span text:style-name="T2">cuiadrado</text:span> las variables.</text:p>
      <text:p text:style-name="P9">4. leeer el valor de cada <text:s/>cateto</text:p>
      <text:p text:style-name="P9">5. almacenarlos en las variables.</text:p>
      <text:p text:style-name="P9">6. se calcula el v<text:span text:style-name="T2">alor de la hiopotenusa sumando ambios catetetos = raiz <text:s/>h2</text:span>.</text:p>
      <text:p text:style-name="P9">7. el resultado se escvribe como valor de la hipotenusa <text:span text:style-name="T2">al cuadrado</text:span>.</text:p>
      <text:p text:style-name="P9">8. fin.</text:p>
      <text:p text:style-name="P9"/>
      <text:p text:style-name="P9">Area cuadrado</text:p>
      <text:p text:style-name="P9">1. inicio</text:p>
      <text:p text:style-name="P9">2. se declaran <text:s/>las variables l , l2= , <text:s/>a1 =<text:span text:style-name="T3">vacio</text:span>.</text:p>
      <text:p text:style-name="P9">3. se lee el va<text:span text:style-name="T3">l</text:span>or de cada lado.</text:p>
      <text:p text:style-name="P9">4. se multiplican las variables <text:s/>.</text:p>
      <text:p text:style-name="P9"><text:span text:style-name="T2">5</text:span>. se <text:s/>guarda en a1 <text:span text:style-name="T3">inclu</text:span><text:span text:style-name="T2">i</text:span><text:span text:style-name="T3">d</text:span><text:span text:style-name="T2">o</text:span><text:span text:style-name="T3"> las medisa al cuadrado</text:span>.</text:p>
      <text:p text:style-name="P11"><text:span text:style-name="T2">6</text:span>. se imprime el resultado.</text:p>
      <text:p text:style-name="P10"><text:s/><text:span text:style-name="T4">7. fin</text:span></text:p>
      <text:p text:style-name="P12"/>
      <text:p text:style-name="P13">imprimir numeros primos del 1 al 100 </text:p>
      <text:p text:style-name="P9"/>
      <text:p text:style-name="P13">1. inicio</text:p>
      <text:p text:style-name="P13">2. <text:span text:style-name="T5">declaracion de variables n <text:s/></text:span><text:span text:style-name="T6">y c</text:span></text:p>
      <text:p text:style-name="P14">3. se guardan los valores</text:p>
      <text:p text:style-name="P15">4. <text:span text:style-name="T7">s</text:span><text:span text:style-name="T8">e </text:span><text:span text:style-name="T6">efectúa el <text:s/>siguiente ciclo</text:span></text:p>
      <text:p text:style-name="P16">5 . si enumero es d<text:span text:style-name="T9">iv</text:span>isible por <text:s/>uno y el mismo <text:s/>numero se agregara uno mas al conta<text:span text:style-name="T9">d</text:span>or</text:p>
      <text:p text:style-name="P17">6. si no se sigue contando <text:s/>y solo se agrega cuando sea primo.</text:p>
      <text:p text:style-name="P17">7. una vez se termina el ciclo</text:p>
      <text:p text:style-name="P16"><text:span text:style-name="T9">8</text:span>.en caso de que sea se <text:span text:style-name="T9">imp</text:span>rimirá los valores dados.</text:p>
      <text:p text:style-name="P16"><text:span text:style-name="T9">9</text:span>. fin.</text:p>
      <text:p text:style-name="P15"/>
      <text:p text:style-name="P15"/>
      <text:p text:style-name="P8"/>
      <text:p text:style-name="P5"/>
      <text:p text:style-name="P5"/>
      <text:p text:style-name="P5"/>
      <text:p text:style-name="P4"/>
      <text:p text:style-name="P4"/>
      <text:p text:style-name="P4"/>
      <text:p text:style-name="P1"/>
      <text:p text:style-name="P1"><text:soft-page-break/></text:p>
      <text:p text:style-name="P18"/>
      <text:p text:style-name="P19">Dado dos arreglos A y B, Encontrar el numero de veces que aparece un elemento de A en B, Y dar como resultado un nuevo arreglo con dicho numero de veces por elemento.</text:p>
      <text:p text:style-name="P20">solución pseudocodigo</text:p>
      <text:p text:style-name="P21">1. inicio.</text:p>
      <text:p text:style-name="P20">2. <text:s/>se <text:span text:style-name="T10">leen</text:span> las variables.</text:p>
      <text:p text:style-name="P20">3 se crea un nuevo arreglo vació <text:span text:style-name="T11">llamado </text:span><text:span text:style-name="T12">result</text:span><text:span text:style-name="T11">.</text:span></text:p>
      <text:p text:style-name="P20">4. <text:span text:style-name="T13">para recorre el arreglo </text:span><text:span text:style-name="T14">b</text:span><text:span text:style-name="T13"> </text:span><text:span text:style-name="T10">después el arreglo </text:span><text:span text:style-name="T14">a</text:span><text:span text:style-name="T13"> </text:span><text:span text:style-name="T10">se cuentan</text:span><text:span text:style-name="T13"> los elementos de </text:span><text:span text:style-name="T10">a</text:span><text:span text:style-name="T13"> filtran-dolos para que se tengan en cuenta solo los que aparezcan en a y mover ese resultado al paso 3</text:span></text:p>
      <text:p text:style-name="P22">fin para</text:p>
      <text:p text:style-name="P20">5. se imprime este resultado e<text:span text:style-name="T13">n el arreglo </text:span><text:span text:style-name="T11">antes mencionado</text:span></text:p>
      <text:p text:style-name="P22">6. se guarda el resultado <text:span text:style-name="T11">en </text:span><text:span text:style-name="T12">result</text:span>.</text:p>
      <text:p text:style-name="P22">fin</text:p>
      <text:p text:style-name="P20"/>
      <text:p text:style-name="P23">aportar verdadero valor</text:p>
      <text:p text:style-name="P23"/>
      <text:p text:style-name="P23">Queremos guardar los nombres y la edades de los alumnos de un curso. Realiza un programa que introduzca el nombre y la edad de cada alumno. El proceso de lectura de datos terminará cuando se introduzca como nombre un asterisco (*) Al finalizar se mostrará los siguientes datos: Todos lo alumnos mayores de edad. Los alumnos mayores (los que tienen más edad)</text:p>
      <text:p text:style-name="P23"/>
      <text:p text:style-name="P24">lista de alumnos mayores de edad</text:p>
      <text:p text:style-name="P24">1. inicio</text:p>
      <text:p text:style-name="P24">2. se definen las variables nombre y edad de los alumnos de un curso</text:p>
      <text:p text:style-name="P25">3. se guardan las variables en 2 arreglos diferentes</text:p>
      <text:p text:style-name="P26"><text:span text:style-name="T15">4</text:span>.se crea el arreglo vacio <text:span text:style-name="T16">alumnos </text:span>+18.</text:p>
      <text:p text:style-name="P24"><text:span text:style-name="T15">5</text:span>.se crea el arreglo vacio +18.</text:p>
      <text:p text:style-name="P24"><text:span text:style-name="T15">6</text:span>. inicio ciclo mientras</text:p>
      <text:p text:style-name="P27"><text:soft-page-break/><text:span text:style-name="T17">7</text:span><text:span text:style-name="T18">.mientras nombre sea diferente a * <text:s/>se seguira recorriendo el arreglo hasta que lleg</text:span><text:span text:style-name="T19">u</text:span><text:span text:style-name="T18">e a * de lo contrario continuara <text:s/>el recorrido6. 6. Fin ciclo mientras.</text:span></text:p>
      <text:p text:style-name="P27"><text:span text:style-name="T17">8</text:span><text:span text:style-name="T18">. en el arreglo +18 se guardaran filtrados los <text:s/>alumnos mayores de 18 años</text:span></text:p>
      <text:p text:style-name="P24"><text:span text:style-name="T15">9</text:span>. se imprimen los resultados en la variable +18</text:p>
      <text:p text:style-name="P24"><text:span text:style-name="T15">10</text:span>.fin</text:p>
      <text:p text:style-name="P27"><text:span text:style-name="T18"/></text:p>
      <text:p text:style-name="P28">for</text:p>
      <text:p text:style-name="P29">lista de alumnos mayores de edad</text:p>
      <text:p text:style-name="P29">1. inicio</text:p>
      <text:p text:style-name="P29">2. se definen las variables nombre y edad de los alumnos de un curso</text:p>
      <text:p text:style-name="P25">3. se guardan las variables en 2 arreglos diferentes</text:p>
      <text:p text:style-name="P30"><text:span text:style-name="T17">4</text:span><text:span text:style-name="T18">.se crea el arreglo vacio </text:span><text:span text:style-name="T19">alumnos </text:span><text:span text:style-name="T18">+18.</text:span></text:p>
      <text:p text:style-name="P30"><text:span text:style-name="T17">5</text:span><text:span text:style-name="T18">. inicio ciclo </text:span><text:span text:style-name="T19">para</text:span></text:p>
      <text:p text:style-name="P30"><text:span text:style-name="T17">6</text:span><text:span text:style-name="T18">.</text:span><text:span text:style-name="T19">para</text:span><text:span text:style-name="T18"> nombre sea diferente a * <text:s/>se seguira recorriendo el arreglo </text:span><text:span text:style-name="T20">nombres</text:span><text:span text:style-name="T21"> hasta que lleg</text:span><text:span text:style-name="T20">u</text:span><text:span text:style-name="T21">e a * de lo contrario continuara <text:s/>el recorrido, </text:span><text:span text:style-name="T20">despues</text:span><text:span text:style-name="T21"> </text:span><text:span text:style-name="T20">se recorre el arreglo age para la edad</text:span><text:span text:style-name="T21">.</text:span></text:p>
      <text:p text:style-name="P31"><text:s/><text:span text:style-name="T15">7</text:span>. Fin c<text:span text:style-name="T16">iclo para</text:span>.</text:p>
      <text:p text:style-name="P31"><text:span text:style-name="T15">8</text:span>. en el arreglo <text:span text:style-name="T16">alumnos </text:span>+18 se guardaran filtrados los <text:s/>alumnos mayores de 18 años <text:span text:style-name="T16">junti al nombre de estos</text:span>.</text:p>
      <text:p text:style-name="P31"><text:span text:style-name="T15">9</text:span>. se imprimen los resultados en la variable +18</text:p>
      <text:p text:style-name="P31"><text:span text:style-name="T15">10</text:span>.fin</text:p>
      <text:p text:style-name="P32"/>
      <text:p text:style-name="P33">valores mayor y menor</text:p>
      <text:p text:style-name="P33">1. inicio</text:p>
      <text:p text:style-name="P33">2. se de<text:span text:style-name="T22">c</text:span>inen los valores</text:p>
      <text:p text:style-name="P33">3. <text:span text:style-name="T22">inicio fo</text:span><text:span text:style-name="T23">r</text:span></text:p>
      <text:p text:style-name="P34">4</text:p>
      <text:p text:style-name="P35">indice <text:s/>cuando es una matriz se lee tanto las columna como las filas generad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0:52:30.531460338</meta:creation-date>
    <dc:date>2025-03-14T17:40:18.734325823</dc:date>
    <meta:editing-duration>P1DT2H17M55S</meta:editing-duration>
    <meta:editing-cycles>17</meta:editing-cycles>
    <meta:generator>LibreOffice/24.8.5.2$Linux_X86_64 LibreOffice_project/27b361b745d0ea8f99bc93dfcb7a39098dfa5fff</meta:generator>
    <meta:document-statistic meta:table-count="0" meta:image-count="0" meta:object-count="0" meta:page-count="4" meta:paragraph-count="118" meta:word-count="822" meta:character-count="4252" meta:non-whitespace-character-count="3505"/>
  </office:meta>
</office:document-meta>
</file>